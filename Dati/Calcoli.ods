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.008cm" svg:height="9.004cm" svg:x="0.567cm" svg:y="26.857cm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18.535cm" svg:y1="28.639cm" svg:x2="18.507cm" svg:y2="32.197cm" svg:d="M18535 28639l-28 3558" svg:viewBox="0 0 29 3559">
            <text:p/>
          </draw:connector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style-name="Default"/>
          <table:table-cell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 </text:p>
          </table:table-cell>
          <table:table-cell table:style-name="Default"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2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5"/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5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3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2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2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2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5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5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office:value-type="float" office:value="1602.41" calcext:value-type="float">
            <text:p>1602.41</text:p>
          </table:table-cell>
          <table:table-cell table:number-columns-repeated="8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5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5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office:value-type="float" office:value="1600.65" calcext:value-type="float">
            <text:p>1600.65</text:p>
          </table:table-cell>
          <table:table-cell table:number-columns-repeated="8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office:value-type="float" office:value="1600.16" calcext:value-type="float">
            <text:p>1600.16</text:p>
          </table:table-cell>
          <table:table-cell table:number-columns-repeated="8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7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office:value-type="float" office:value="1598.7" calcext:value-type="float">
            <text:p>1598.70</text:p>
          </table:table-cell>
          <table:table-cell table:number-columns-repeated="8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office:value-type="float" office:value="1598.3" calcext:value-type="float">
            <text:p>1598.30</text:p>
          </table:table-cell>
          <table:table-cell table:number-columns-repeated="8"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5"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office:value-type="float" office:value="1597" calcext:value-type="float">
            <text:p>1597.00</text:p>
          </table:table-cell>
          <table:table-cell table:number-columns-repeated="8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office:value-type="float" office:value="1596.5" calcext:value-type="float">
            <text:p>1596.50</text:p>
          </table:table-cell>
          <table:table-cell table:number-columns-repeated="8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office:value-type="float" office:value="1596" calcext:value-type="float">
            <text:p>1596.00</text:p>
          </table:table-cell>
          <table:table-cell table:number-columns-repeated="8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office:value-type="float" office:value="1595.4" calcext:value-type="float">
            <text:p>1595.40</text:p>
          </table:table-cell>
          <table:table-cell table:number-columns-repeated="8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office:value-type="float" office:value="1594.25" calcext:value-type="float">
            <text:p>1594.25</text:p>
          </table:table-cell>
          <table:table-cell table:number-columns-repeated="8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office:value-type="float" office:value="1593.77" calcext:value-type="float">
            <text:p>1593.77</text:p>
          </table:table-cell>
          <table:table-cell table:number-columns-repeated="8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office:value-type="float" office:value="1593.12" calcext:value-type="float">
            <text:p>1593.12</text:p>
          </table:table-cell>
          <table:table-cell table:number-columns-repeated="8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office:value-type="float" office:value="1592.7" calcext:value-type="float">
            <text:p>1592.70</text:p>
          </table:table-cell>
          <table:table-cell table:number-columns-repeated="8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office:value-type="float" office:value="1592.09" calcext:value-type="float">
            <text:p>1592.09</text:p>
          </table:table-cell>
          <table:table-cell table:number-columns-repeated="8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office:value-type="float" office:value="1591.5" calcext:value-type="float">
            <text:p>1591.50</text:p>
          </table:table-cell>
          <table:table-cell table:number-columns-repeated="8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office:value-type="float" office:value="1590.99" calcext:value-type="float">
            <text:p>1590.99</text:p>
          </table:table-cell>
          <table:table-cell table:number-columns-repeated="8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office:value-type="float" office:value="1590.4" calcext:value-type="float">
            <text:p>1590.40</text:p>
          </table:table-cell>
          <table:table-cell table:number-columns-repeated="8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office:value-type="float" office:value="1589.78" calcext:value-type="float">
            <text:p>1589.78</text:p>
          </table:table-cell>
          <table:table-cell table:number-columns-repeated="8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office:value-type="float" office:value="1589.3" calcext:value-type="float">
            <text:p>1589.30</text:p>
          </table:table-cell>
          <table:table-cell table:number-columns-repeated="8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office:value-type="float" office:value="1588.8" calcext:value-type="float">
            <text:p>1588.80</text:p>
          </table:table-cell>
          <table:table-cell table:number-columns-repeated="8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office:value-type="float" office:value="1588.27" calcext:value-type="float">
            <text:p>1588.27</text:p>
          </table:table-cell>
          <table:table-cell table:number-columns-repeated="8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office:value-type="float" office:value="1587.62" calcext:value-type="float">
            <text:p>1587.62</text:p>
          </table:table-cell>
          <table:table-cell table:number-columns-repeated="8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office:value-type="float" office:value="1587.08" calcext:value-type="float">
            <text:p>1587.08</text:p>
          </table:table-cell>
          <table:table-cell table:number-columns-repeated="8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office:value-type="float" office:value="1586.59" calcext:value-type="float">
            <text:p>1586.59</text:p>
          </table:table-cell>
          <table:table-cell table:number-columns-repeated="8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5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5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5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5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5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5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5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5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5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5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5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5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5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5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table:style-name="Default"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03:09.498647801</meta:creation-date>
    <dc:date>2026-07-06T17:11:55.613440932</dc:date>
    <meta:editing-duration>PT4M51S</meta:editing-duration>
    <meta:editing-cycles>3</meta:editing-cycles>
    <meta:generator>LibreOffice/26.2.4.2$Linux_X86_64 LibreOffice_project/df4f15f06f7b375c1d16aa35fba92d50b262cd01</meta:generator>
    <meta:document-statistic meta:table-count="1" meta:cell-count="17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1cm" chart:symbol-height="0.1cm"/>
    </style:style>
    <style:style style:name="ch14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svg:x="1.331cm" svg:y="0.18cm" svg:width="14.358cm" svg:height="7.664cm">
          <chart:coordinate-region svg:x="2.825cm" svg:y="0.379cm" svg:width="12.48cm" svg:height="6.818cm"/>
          <chart:axis chart:dimension="x" chart:name="primary-x" chart:style-name="ch3">
            <chart:title svg:x="8.197cm" svg:y="8.024cm" chart:style-name="ch4">
              <text:p><text:span text:style-name="T1">t [s]</text:span></text:p>
            </chart:title>
          </chart:axis>
          <chart:axis chart:dimension="y" chart:name="primary-y" chart:style-name="ch5">
            <chart:title svg:x="0.451cm" svg:y="4.757cm" chart:style-name="ch6">
              <text:p><text:span text:style-name="T1">massa [g]</text:span></text:p>
            </chart:title>
          </chart:axis>
          <chart:series chart:style-name="ch7" chart:values-cell-range-address="Sheet1.B6:Sheet1.B19" chart:class="chart:scatter">
            <chart:domain table:cell-range-address="Sheet1.A6:Sheet1.A19"/>
            <chart:regression-curve chart:style-name="ch8"/>
            <chart:data-point chart:repeated="14"/>
          </chart:series>
          <chart:series chart:style-name="ch9" chart:values-cell-range-address="Sheet1.J63:Sheet1.J64" chart:class="chart:scatter">
            <chart:domain table:cell-range-address="Sheet1.I63:Sheet1.I64"/>
            <chart:data-point chart:style-name="ch10" chart:repeated="2"/>
          </chart:series>
          <chart:series chart:style-name="ch11" chart:values-cell-range-address="Sheet1.B44:Sheet1.B57" chart:class="chart:scatter">
            <chart:domain table:cell-range-address="Sheet1.A44:Sheet1.A57"/>
            <chart:regression-curve chart:style-name="ch12"/>
            <chart:data-point/>
            <chart:data-point chart:style-name="ch13"/>
            <chart:data-point chart:repeated="12"/>
          </chart:series>
          <chart:series chart:style-name="ch14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