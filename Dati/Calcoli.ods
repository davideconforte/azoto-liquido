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fo:background-color="#5983b0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0787in"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6.3024in" svg:height="3.5449in" svg:x="0.2232in" svg:y="10.5736in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7.2972in" svg:y1="11.2752in" svg:x2="7.2862in" svg:y2="12.676in" svg:d="M18535 28639l-28 3558" svg:viewBox="0 0 29 3559">
            <text:p/>
          </draw:connector>
          <draw:frame draw:z-index="2" draw:style-name="gr1" draw:text-style-name="P1" svg:width="6.2988in" svg:height="3.5429in" svg:x="15.3626in" svg:y="4.2256in">
            <draw:object draw:notify-on-update-of-ranges="Sheet1.O6:Sheet1.O12 Sheet1.P6:Sheet1.P12 Sheet1.Z22:Sheet1.Z23 Sheet1.AA22:Sheet1.AA23 Sheet1.O24:Sheet1.O30 Sheet1.P24:Sheet1.P30 Sheet1.O13:Sheet1.O23 Sheet1.P13:Sheet1.P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9"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number-columns-repeated="2"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 table:number-columns-repeated="3"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5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style-name="ce3"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8"/>
        </table:table-row>
        <table:table-row table:style-name="ro1">
          <table:table-cell office:value-type="float" office:value="40.41" calcext:value-type="float">
            <text:p>40.41</text:p>
          </table:table-cell>
          <table:table-cell table:style-name="ce3"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table:style-name="ce3"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8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table:style-name="ce3"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table:style-name="ce3"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5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table:style-name="ce3"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table:style-name="ce3"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8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table:style-name="ce3"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table:style-name="ce3"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8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table:style-name="ce3"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table:style-name="ce3" office:value-type="float" office:value="1477.39" calcext:value-type="float">
            <text:p>1477.39</text:p>
          </table:table-cell>
          <table:table-cell table:number-columns-repeated="11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table:style-name="ce3"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8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table:style-name="ce3"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table:style-name="ce3"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8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table:style-name="ce3"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table:style-name="ce3" office:value-type="float" office:value="1476.12" calcext:value-type="float">
            <text:p>1476.12</text:p>
          </table:table-cell>
          <table:table-cell table:number-columns-repeated="11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table:style-name="ce3"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table:style-name="ce3"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6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table:style-name="ce3"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table:style-name="ce3"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6" calcext:value-type="float">
            <text:p>0.0601327687304526</text:p>
          </table:table-cell>
          <table:table-cell table:number-columns-repeated="5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table:style-name="ce3"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table:style-name="ce3"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5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table:style-name="ce3"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table:style-name="ce3"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5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table:style-name="ce3"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table:style-name="ce3" office:value-type="float" office:value="1473.33" calcext:value-type="float">
            <text:p>1473.33</text:p>
          </table:table-cell>
          <table:table-cell table:number-columns-repeated="11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table:style-name="ce3" office:value-type="float" office:value="1472.83" calcext:value-type="float">
            <text:p>1472.83</text:p>
          </table:table-cell>
          <table:table-cell table:number-columns-repeated="11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table:style-name="ce3"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table:style-name="ce3" office:value-type="float" office:value="1472.38" calcext:value-type="float">
            <text:p>1472.38</text:p>
          </table:table-cell>
          <table:table-cell table:number-columns-repeated="11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table:style-name="ce3"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table:style-name="ce3"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table:style-name="ce3"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table:style-name="ce3"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table:style-name="ce3"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0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table:style-name="ce3"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table:style-name="ce3" office:value-type="float" office:value="1470.11" calcext:value-type="float">
            <text:p>1470.11</text:p>
          </table:table-cell>
          <table:table-cell table:number-columns-repeated="11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table:style-name="ce3"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table:style-name="ce3" office:value-type="float" office:value="1469.93" calcext:value-type="float">
            <text:p>1469.93</text:p>
          </table:table-cell>
          <table:table-cell table:number-columns-repeated="11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table:style-name="ce3"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table:style-name="ce3" office:value-type="float" office:value="1469.66" calcext:value-type="float">
            <text:p>1469.66</text:p>
          </table:table-cell>
          <table:table-cell table:number-columns-repeated="11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table:style-name="ce3"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table:style-name="ce3" office:value-type="float" office:value="1469.4" calcext:value-type="float">
            <text:p>1469.40</text:p>
          </table:table-cell>
          <table:table-cell table:number-columns-repeated="11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table:style-name="ce3"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table:style-name="ce3" office:value-type="float" office:value="1469.11" calcext:value-type="float">
            <text:p>1469.11</text:p>
          </table:table-cell>
          <table:table-cell table:number-columns-repeated="11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table:style-name="ce3"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table:style-name="ce3" office:value-type="float" office:value="1468.81" calcext:value-type="float">
            <text:p>1468.81</text:p>
          </table:table-cell>
          <table:table-cell table:number-columns-repeated="11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table:style-name="ce3" office:value-type="float" office:value="1592.7" calcext:value-type="float">
            <text:p>1592.70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table:style-name="ce3" office:value-type="float" office:value="1592.09" calcext:value-type="float">
            <text:p>1592.09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table:style-name="ce3" office:value-type="float" office:value="1591.5" calcext:value-type="float">
            <text:p>1591.50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table:style-name="ce3" office:value-type="float" office:value="1590.99" calcext:value-type="float">
            <text:p>1590.99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table:style-name="ce3" office:value-type="float" office:value="1590.4" calcext:value-type="float">
            <text:p>1590.40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table:style-name="ce3" office:value-type="float" office:value="1589.78" calcext:value-type="float">
            <text:p>1589.78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table:style-name="ce3" office:value-type="float" office:value="1589.3" calcext:value-type="float">
            <text:p>1589.30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table:style-name="ce3" office:value-type="float" office:value="1588.8" calcext:value-type="float">
            <text:p>1588.80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table:style-name="ce3" office:value-type="float" office:value="1588.27" calcext:value-type="float">
            <text:p>1588.27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table:style-name="ce3" office:value-type="float" office:value="1587.62" calcext:value-type="float">
            <text:p>1587.62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table:style-name="ce3" office:value-type="float" office:value="1587.08" calcext:value-type="float">
            <text:p>1587.08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table:style-name="ce3" office:value-type="float" office:value="1586.59" calcext:value-type="float">
            <text:p>1586.59</text:p>
          </table:table-cell>
          <table:table-cell table:number-columns-repeated="13"/>
          <table:table-cell table:style-name="ce3"/>
          <table:table-cell table:number-columns-repeated="11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table:style-name="ce3"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table:style-name="ce3"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table:style-name="ce3"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table:style-name="ce3"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table:style-name="ce3"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table:style-name="ce3"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table:style-name="ce3"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table:style-name="ce3"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table:style-name="ce3"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table:style-name="ce3"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table:style-name="ce3"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table:style-name="ce3"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table:style-name="ce3"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0"/>
          <table:table-cell table:style-name="ce3"/>
          <table:table-cell table:number-columns-repeated="11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17"/>
        </table:table-row>
        <table:table-row table:style-name="ro1" table:number-rows-repeated="19">
          <table:table-cell table:number-columns-repeated="27"/>
        </table:table-row>
        <table:table-row table:style-name="ro1">
          <table:table-cell/>
          <table:table-cell office:value-type="string" calcext:value-type="string">
            <text:p>TABELLA GRAFITE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GRAFITE SECONDA VOLTA</text:p>
          </table:table-cell>
          <table:table-cell table:number-columns-repeated="3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[.S23]" office:value-type="float" office:value="171.762353051882" calcext:value-type="float">
            <text:p>171.76235305188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1"/>
          <table:table-cell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[.S23]" office:value-type="float" office:value="171.762353051882" calcext:value-type="float">
            <text:p>171.76235305188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55.56" calcext:value-type="float">
            <text:p>1555.56</text:p>
          </table:table-cell>
          <table:table-cell/>
          <table:table-cell office:value-type="string" calcext:value-type="string">
            <text:p>t_start</text:p>
          </table:table-cell>
          <table:table-cell table:formula="of:=[.B103]" office:value-type="float" office:value="320.55" calcext:value-type="float">
            <text:p>320.5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/>
          <table:table-cell office:value-type="string" calcext:value-type="string">
            <text:p>t_start</text:p>
          </table:table-cell>
          <table:table-cell table:formula="of:=[.T94]" office:value-type="float" office:value="140.12" calcext:value-type="float">
            <text:p>140.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table:style-name="ce3" office:value-type="float" office:value="1555.34" calcext:value-type="float">
            <text:p>1555.34</text:p>
          </table:table-cell>
          <table:table-cell/>
          <table:table-cell office:value-type="string" calcext:value-type="string">
            <text:p>t_stop</text:p>
          </table:table-cell>
          <table:table-cell table:formula="of:=[.B104]" office:value-type="float" office:value="390.6" calcext:value-type="float">
            <text:p>390.6</text:p>
          </table:table-cell>
          <table:table-cell table:number-columns-repeated="12"/>
          <table:table-cell office:value-type="float" office:value="20.32" calcext:value-type="float">
            <text:p>20.32</text:p>
          </table:table-cell>
          <table:table-cell table:formula="of:=[.T87]+[.S88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/>
          <table:table-cell office:value-type="string" calcext:value-type="string">
            <text:p>t_stop</text:p>
          </table:table-cell>
          <table:table-cell table:formula="of:=[.T99]" office:value-type="float" office:value="165.28" calcext:value-type="float">
            <text:p>165.28</text:p>
          </table:table-cell>
          <table:table-cell table:number-columns-repeated="3"/>
        </table:table-row>
        <table:table-row table:style-name="ro1">
          <table:table-cell/>
          <table:table-cell table:formula="of:=[.B88]+20.16" office:value-type="float" office:value="40.07" calcext:value-type="float">
            <text:p>40.07</text:p>
          </table:table-cell>
          <table:table-cell table:style-name="ce3" office:value-type="float" office:value="1555.01" calcext:value-type="float">
            <text:p>1555.01</text:p>
          </table:table-cell>
          <table:table-cell/>
          <table:table-cell office:value-type="string" calcext:value-type="string">
            <text:p>dt</text:p>
          </table:table-cell>
          <table:table-cell table:formula="of:=[.F88]-[.F87]" office:value-type="float" office:value="70.05" calcext:value-type="float">
            <text:p>70.05</text:p>
          </table:table-cell>
          <table:table-cell table:number-columns-repeated="12"/>
          <table:table-cell office:value-type="float" office:value="20.14" calcext:value-type="float">
            <text:p>20.14</text:p>
          </table:table-cell>
          <table:table-cell table:formula="of:=[.T88]+[.S89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/>
          <table:table-cell office:value-type="string" calcext:value-type="string">
            <text:p>dt</text:p>
          </table:table-cell>
          <table:table-cell table:formula="of:=[.X88]-[.X87]" office:value-type="float" office:value="25.16" calcext:value-type="float">
            <text:p>25.16</text:p>
          </table:table-cell>
          <table:table-cell table:number-columns-repeated="3"/>
        </table:table-row>
        <table:table-row table:style-name="ro1">
          <table:table-cell office:value-type="float" office:value="20.16" calcext:value-type="float">
            <text:p>20.16</text:p>
          </table:table-cell>
          <table:table-cell table:formula="of:=[.B89]+[.A90]" office:value-type="float" office:value="60.23" calcext:value-type="float">
            <text:p>60.23</text:p>
          </table:table-cell>
          <table:table-cell table:style-name="ce3" office:value-type="float" office:value="1554.4" calcext:value-type="float">
            <text:p>1554.40</text:p>
          </table:table-cell>
          <table:table-cell/>
          <table:table-cell office:value-type="string" calcext:value-type="string">
            <text:p>t_medio</text:p>
          </table:table-cell>
          <table:table-cell table:formula="of:=([.F87]+[.F88])/2" office:value-type="float" office:value="355.575" calcext:value-type="float">
            <text:p>355.575</text:p>
          </table:table-cell>
          <table:table-cell table:number-columns-repeated="12"/>
          <table:table-cell table:formula="of:=0.35+19.32" office:value-type="float" office:value="19.67" calcext:value-type="float">
            <text:p>19.67</text:p>
          </table:table-cell>
          <table:table-cell table:formula="of:=[.T89]+[.S90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/>
          <table:table-cell office:value-type="string" calcext:value-type="string">
            <text:p>t_medio</text:p>
          </table:table-cell>
          <table:table-cell table:formula="of:=([.X87]+[.X88])/2" office:value-type="float" office:value="152.7" calcext:value-type="float">
            <text:p>152.7</text:p>
          </table:table-cell>
          <table:table-cell table:number-columns-repeated="3"/>
        </table:table-row>
        <table:table-row table:style-name="ro1">
          <table:table-cell office:value-type="float" office:value="20.21" calcext:value-type="float">
            <text:p>20.21</text:p>
          </table:table-cell>
          <table:table-cell table:formula="of:=[.B90]+[.A91]" office:value-type="float" office:value="80.44" calcext:value-type="float">
            <text:p>80.44</text:p>
          </table:table-cell>
          <table:table-cell table:style-name="ce3" office:value-type="float" office:value="1554.63" calcext:value-type="float">
            <text:p>1554.63</text:p>
          </table:table-cell>
          <table:table-cell table:number-columns-repeated="15"/>
          <table:table-cell office:value-type="float" office:value="20.06" calcext:value-type="float">
            <text:p>20.06</text:p>
          </table:table-cell>
          <table:table-cell table:formula="of:=[.T90]+[.S91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6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B91]+[.A92]" office:value-type="float" office:value="100.14" calcext:value-type="float">
            <text:p>100.14</text:p>
          </table:table-cell>
          <table:table-cell table:style-name="ce3" office:value-type="float" office:value="1554.35" calcext:value-type="float">
            <text:p>1554.35</text:p>
          </table:table-cell>
          <table:table-cell/>
          <table:table-cell office:value-type="string" calcext:value-type="string">
            <text:p>PENDENZA1</text:p>
          </table:table-cell>
          <table:table-cell table:formula="of:=SLOPE([.C87:.C102];[.B87:.B102])" office:value-type="float" office:value="-0.0150871894978227" calcext:value-type="float">
            <text:p>-0.0150871894978227</text:p>
          </table:table-cell>
          <table:table-cell table:number-columns-repeated="12"/>
          <table:table-cell office:value-type="float" office:value="20.12" calcext:value-type="float">
            <text:p>20.12</text:p>
          </table:table-cell>
          <table:table-cell table:formula="of:=[.T91]+[.S92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/>
          <table:table-cell office:value-type="string" calcext:value-type="string">
            <text:p>PENDENZA1</text:p>
          </table:table-cell>
          <table:table-cell table:formula="of:=SLOPE([.U87:.U93];[.T87:.T93])" office:value-type="float" office:value="-0.0130605349539274" calcext:value-type="float">
            <text:p>-0.0130605349539274</text:p>
          </table:table-cell>
          <table:table-cell table:number-columns-repeated="3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B92]+[.A93]" office:value-type="float" office:value="120.44" calcext:value-type="float">
            <text:p>120.44</text:p>
          </table:table-cell>
          <table:table-cell table:style-name="ce3" office:value-type="float" office:value="1554.01" calcext:value-type="float">
            <text:p>1554.01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87:.C102];[.B87:.B102])" office:value-type="float" office:value="1555.67097474835" calcext:value-type="float">
            <text:p>1555.67097474835</text:p>
          </table:table-cell>
          <table:table-cell table:number-columns-repeated="12"/>
          <table:table-cell office:value-type="float" office:value="19.94" calcext:value-type="float">
            <text:p>19.94</text:p>
          </table:table-cell>
          <table:table-cell table:formula="of:=[.T92]+[.S93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U87:.U93];[.T87:.T93])" office:value-type="float" office:value="1467.88530073838" calcext:value-type="float">
            <text:p>1467.8853007383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3]+[.A94]" office:value-type="float" office:value="140.44" calcext:value-type="float">
            <text:p>140.44</text:p>
          </table:table-cell>
          <table:table-cell table:style-name="ce3" office:value-type="float" office:value="1553.68" calcext:value-type="float">
            <text:p>1553.68</text:p>
          </table:table-cell>
          <table:table-cell table:number-columns-repeated="15"/>
          <table:table-cell table:style-name="ce8" office:value-type="float" office:value="19.87" calcext:value-type="float">
            <text:p>19.87</text:p>
          </table:table-cell>
          <table:table-cell table:style-name="ce8" table:formula="of:=[.T93]+[.S94]" office:value-type="float" office:value="140.12" calcext:value-type="float">
            <text:p>140.12</text:p>
          </table:table-cell>
          <table:table-cell table:style-name="ce8" office:value-type="float" office:value="1460.41" calcext:value-type="float">
            <text:p>1460.41</text:p>
          </table:table-cell>
          <table:table-cell office:value-type="string" calcext:value-type="string">
            <text:p>IMMERS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4]+[.A95]" office:value-type="float" office:value="160.44" calcext:value-type="float">
            <text:p>160.44</text:p>
          </table:table-cell>
          <table:table-cell table:style-name="ce3" office:value-type="float" office:value="1553.35" calcext:value-type="float">
            <text:p>1553.35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05:.C144];[.B105:.B144])" office:value-type="float" office:value="-0.0165799547471474" calcext:value-type="float">
            <text:p>-0.0165799547471474</text:p>
          </table:table-cell>
          <table:table-cell table:number-columns-repeated="12"/>
          <table:table-cell office:value-type="float" office:value="5.24" calcext:value-type="float">
            <text:p>5.24</text:p>
          </table:table-cell>
          <table:table-cell table:formula="of:=[.T94]+[.S95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/>
          <table:table-cell office:value-type="string" calcext:value-type="string">
            <text:p>PENDENZA3</text:p>
          </table:table-cell>
          <table:table-cell table:formula="of:=SLOPE([.U100:.U117];[.T100:.T117])" office:value-type="float" office:value="-0.0106935144115225" calcext:value-type="float">
            <text:p>-0.0106935144115225</text:p>
          </table:table-cell>
          <table:table-cell table:number-columns-repeated="3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95]+[.A96]" office:value-type="float" office:value="180.43" calcext:value-type="float">
            <text:p>180.43</text:p>
          </table:table-cell>
          <table:table-cell table:style-name="ce3" office:value-type="float" office:value="1553.02" calcext:value-type="float">
            <text:p>1553.02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05:.C144];[.B105:.B144])" office:value-type="float" office:value="1547.08647291981" calcext:value-type="float">
            <text:p>1547.08647291981</text:p>
          </table:table-cell>
          <table:table-cell table:number-columns-repeated="12"/>
          <table:table-cell office:value-type="float" office:value="4.8" calcext:value-type="float">
            <text:p>4.8</text:p>
          </table:table-cell>
          <table:table-cell table:formula="of:=[.T95]+[.S96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U100:.U117];[.T100:.T117])" office:value-type="float" office:value="1458.84189029066" calcext:value-type="float">
            <text:p>1458.84189029066</text:p>
          </table:table-cell>
          <table:table-cell table:number-columns-repeated="3"/>
        </table:table-row>
        <table:table-row table:style-name="ro1">
          <table:table-cell office:value-type="float" office:value="20.01" calcext:value-type="float">
            <text:p>20.01</text:p>
          </table:table-cell>
          <table:table-cell table:formula="of:=[.B96]+[.A97]" office:value-type="float" office:value="200.44" calcext:value-type="float">
            <text:p>200.44</text:p>
          </table:table-cell>
          <table:table-cell table:style-name="ce3" office:value-type="float" office:value="1552.65" calcext:value-type="float">
            <text:p>1552.65</text:p>
          </table:table-cell>
          <table:table-cell table:number-columns-repeated="15"/>
          <table:table-cell office:value-type="float" office:value="5.19" calcext:value-type="float">
            <text:p>5.19</text:p>
          </table:table-cell>
          <table:table-cell table:formula="of:=[.T96]+[.S97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6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97]+[.A98]" office:value-type="float" office:value="220.5" calcext:value-type="float">
            <text:p>220.5</text:p>
          </table:table-cell>
          <table:table-cell table:style-name="ce3" office:value-type="float" office:value="1552.35" calcext:value-type="float">
            <text:p>1552.35</text:p>
          </table:table-cell>
          <table:table-cell/>
          <table:table-cell office:value-type="string" calcext:value-type="string">
            <text:p>massa_i_extrp</text:p>
          </table:table-cell>
          <table:table-cell table:formula="of:=[.F93]+[.F92]*[.F90]" office:value-type="float" office:value="1550.30634734266" calcext:value-type="float">
            <text:p>1550.30634734266</text:p>
          </table:table-cell>
          <table:table-cell table:number-columns-repeated="12"/>
          <table:table-cell office:value-type="float" office:value="6.51" calcext:value-type="float">
            <text:p>6.51</text:p>
          </table:table-cell>
          <table:table-cell table:formula="of:=[.T97]+[.S98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/>
          <table:table-cell office:value-type="string" calcext:value-type="string">
            <text:p>massa_i_extrp</text:p>
          </table:table-cell>
          <table:table-cell table:formula="of:=[.X93]+[.X92]*[.X90]" office:value-type="float" office:value="1465.89095705092" calcext:value-type="float">
            <text:p>1465.89095705092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B98]+[.A99]" office:value-type="float" office:value="240.3" calcext:value-type="float">
            <text:p>240.3</text:p>
          </table:table-cell>
          <table:table-cell table:style-name="ce3" office:value-type="float" office:value="1552.05" calcext:value-type="float">
            <text:p>1552.05</text:p>
          </table:table-cell>
          <table:table-cell/>
          <table:table-cell office:value-type="string" calcext:value-type="string">
            <text:p>massa_f_extrp</text:p>
          </table:table-cell>
          <table:table-cell table:formula="of:=[.F96]+[.F95]*[.F90]" office:value-type="float" office:value="1541.19105551059" calcext:value-type="float">
            <text:p>1541.19105551059</text:p>
          </table:table-cell>
          <table:table-cell table:number-columns-repeated="12"/>
          <table:table-cell office:value-type="float" office:value="3.42" calcext:value-type="float">
            <text:p>3.42</text:p>
          </table:table-cell>
          <table:table-cell table:formula="of:=[.T98]+[.S99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/>
          <table:table-cell office:value-type="string" calcext:value-type="string">
            <text:p>massa_f_extrp</text:p>
          </table:table-cell>
          <table:table-cell table:formula="of:=[.X96]+[.X95]*[.X90]" office:value-type="float" office:value="1457.20899064002" calcext:value-type="float">
            <text:p>1457.20899064002</text:p>
          </table:table-cell>
          <table:table-cell table:number-columns-repeated="3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99]+[.A100]" office:value-type="float" office:value="260.45" calcext:value-type="float">
            <text:p>260.45</text:p>
          </table:table-cell>
          <table:table-cell table:style-name="ce3" office:value-type="float" office:value="1551.67" calcext:value-type="float">
            <text:p>1551.67</text:p>
          </table:table-cell>
          <table:table-cell table:number-columns-repeated="15"/>
          <table:table-cell office:value-type="float" office:value="5.13" calcext:value-type="float">
            <text:p>5.13</text:p>
          </table:table-cell>
          <table:table-cell table:formula="of:=[.T99]+[.S100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6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100]+[.A101]" office:value-type="float" office:value="280.44" calcext:value-type="float">
            <text:p>280.44</text:p>
          </table:table-cell>
          <table:table-cell table:style-name="ce3" office:value-type="float" office:value="1551.36" calcext:value-type="float">
            <text:p>1551.3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98]-[.F99]" office:value-type="float" office:value="9.11529183207222" calcext:value-type="float">
            <text:p>9.11529183207222</text:p>
          </table:table-cell>
          <table:table-cell table:number-columns-repeated="12"/>
          <table:table-cell office:value-type="float" office:value="9.65" calcext:value-type="float">
            <text:p>9.65</text:p>
          </table:table-cell>
          <table:table-cell table:formula="of:=[.T100]+[.S101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/>
          <table:table-cell office:value-type="string" calcext:value-type="string">
            <text:p>massa netta evap</text:p>
          </table:table-cell>
          <table:table-cell table:formula="of:=[.X98]-[.X99]" office:value-type="float" office:value="8.68196641089594" calcext:value-type="float">
            <text:p>8.68196641089594</text:p>
          </table:table-cell>
          <table:table-cell table:number-columns-repeated="3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[.B101]+[.A102]" office:value-type="float" office:value="300.39" calcext:value-type="float">
            <text:p>300.39</text:p>
          </table:table-cell>
          <table:table-cell table:style-name="ce3" office:value-type="float" office:value="1551.02" calcext:value-type="float">
            <text:p>1551.02</text:p>
          </table:table-cell>
          <table:table-cell table:number-columns-repeated="15"/>
          <table:table-cell office:value-type="float" office:value="20.03" calcext:value-type="float">
            <text:p>20.03</text:p>
          </table:table-cell>
          <table:table-cell table:formula="of:=[.T101]+[.S102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6"/>
        </table:table-row>
        <table:table-row table:style-name="ro1">
          <table:table-cell table:style-name="ce8" office:value-type="float" office:value="20.16" calcext:value-type="float">
            <text:p>20.16</text:p>
          </table:table-cell>
          <table:table-cell table:style-name="ce8" table:formula="of:=[.B102]+[.A103]" office:value-type="float" office:value="320.55" calcext:value-type="float">
            <text:p>320.55</text:p>
          </table:table-cell>
          <table:table-cell table:style-name="ce15"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table:number-columns-repeated="14"/>
          <table:table-cell office:value-type="float" office:value="10.1" calcext:value-type="float">
            <text:p>10.1</text:p>
          </table:table-cell>
          <table:table-cell table:formula="of:=[.T102]+[.S103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6"/>
        </table:table-row>
        <table:table-row table:style-name="ro1">
          <table:table-cell table:formula="of:=60.91+0.61+8.53" office:value-type="float" office:value="70.05" calcext:value-type="float">
            <text:p>70.05</text:p>
          </table:table-cell>
          <table:table-cell table:formula="of:=[.B103]+[.A104]" office:value-type="float" office:value="390.6" calcext:value-type="float">
            <text:p>390.6</text:p>
          </table:table-cell>
          <table:table-cell table:style-name="ce3" office:value-type="float" office:value="1540.33" calcext:value-type="float">
            <text:p>1540.33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F101]*[.F85])/([.F84]*([.H84]-[.H85]))*([.H86]/4.184)" office:value-type="float" office:value="1.20232302980717" calcext:value-type="float">
            <text:p>1.20232302980717</text:p>
          </table:table-cell>
          <table:table-cell table:number-columns-repeated="12"/>
          <table:table-cell office:value-type="float" office:value="10.06" calcext:value-type="float">
            <text:p>10.06</text:p>
          </table:table-cell>
          <table:table-cell table:formula="of:=[.T103]+[.S104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X101]*[.X85])/([.X84]*([.Z84]-[.Z85]))*([.Z86]/4.184)" office:value-type="float" office:value="1.14516664437494" calcext:value-type="float">
            <text:p>1.14516664437494</text:p>
          </table:table-cell>
          <table:table-cell table:number-columns-repeated="3"/>
        </table:table-row>
        <table:table-row table:style-name="ro1">
          <table:table-cell office:value-type="float" office:value="9.98" calcext:value-type="float">
            <text:p>9.98</text:p>
          </table:table-cell>
          <table:table-cell table:formula="of:=[.B104]+[.A105]" office:value-type="float" office:value="400.58" calcext:value-type="float">
            <text:p>400.58</text:p>
          </table:table-cell>
          <table:table-cell table:style-name="ce3" office:value-type="float" office:value="1540.26" calcext:value-type="float">
            <text:p>1540.26</text:p>
          </table:table-cell>
          <table:table-cell table:number-columns-repeated="15"/>
          <table:table-cell office:value-type="float" office:value="10.05" calcext:value-type="float">
            <text:p>10.05</text:p>
          </table:table-cell>
          <table:table-cell table:formula="of:=[.T104]+[.S105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6"/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B105]+[.A106]" office:value-type="float" office:value="410.44" calcext:value-type="float">
            <text:p>410.44</text:p>
          </table:table-cell>
          <table:table-cell table:style-name="ce3" office:value-type="float" office:value="1540.14" calcext:value-type="float">
            <text:p>1540.14</text:p>
          </table:table-cell>
          <table:table-cell table:number-columns-repeated="15"/>
          <table:table-cell office:value-type="float" office:value="9.98" calcext:value-type="float">
            <text:p>9.98</text:p>
          </table:table-cell>
          <table:table-cell table:formula="of:=[.T105]+[.S106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6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06]+[.A107]" office:value-type="float" office:value="420.37" calcext:value-type="float">
            <text:p>420.37</text:p>
          </table:table-cell>
          <table:table-cell table:style-name="ce3" office:value-type="float" office:value="1540.01" calcext:value-type="float">
            <text:p>1540.01</text:p>
          </table:table-cell>
          <table:table-cell table:number-columns-repeated="15"/>
          <table:table-cell office:value-type="float" office:value="9.92" calcext:value-type="float">
            <text:p>9.92</text:p>
          </table:table-cell>
          <table:table-cell table:formula="of:=[.T106]+[.S107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6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B107]+[.A108]" office:value-type="float" office:value="430.47" calcext:value-type="float">
            <text:p>430.47</text:p>
          </table:table-cell>
          <table:table-cell table:style-name="ce3" office:value-type="float" office:value="1539.85" calcext:value-type="float">
            <text:p>1539.85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07]+[.S108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6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B108]+[.A109]" office:value-type="float" office:value="440.37" calcext:value-type="float">
            <text:p>440.37</text:p>
          </table:table-cell>
          <table:table-cell table:style-name="ce3" office:value-type="float" office:value="1539.7" calcext:value-type="float">
            <text:p>1539.70</text:p>
          </table:table-cell>
          <table:table-cell table:number-columns-repeated="15"/>
          <table:table-cell office:value-type="float" office:value="9.94" calcext:value-type="float">
            <text:p>9.94</text:p>
          </table:table-cell>
          <table:table-cell table:formula="of:=[.T108]+[.S109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6"/>
        </table:table-row>
        <table:table-row table:style-name="ro1">
          <table:table-cell office:value-type="float" office:value="10.13" calcext:value-type="float">
            <text:p>10.13</text:p>
          </table:table-cell>
          <table:table-cell table:formula="of:=[.B109]+[.A110]" office:value-type="float" office:value="450.5" calcext:value-type="float">
            <text:p>450.5</text:p>
          </table:table-cell>
          <table:table-cell table:style-name="ce3" office:value-type="float" office:value="1539.56" calcext:value-type="float">
            <text:p>1539.56</text:p>
          </table:table-cell>
          <table:table-cell table:number-columns-repeated="15"/>
          <table:table-cell office:value-type="float" office:value="10.07" calcext:value-type="float">
            <text:p>10.07</text:p>
          </table:table-cell>
          <table:table-cell table:formula="of:=[.T109]+[.S110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6"/>
        </table:table-row>
        <table:table-row table:style-name="ro1">
          <table:table-cell office:value-type="float" office:value="9.81" calcext:value-type="float">
            <text:p>9.81</text:p>
          </table:table-cell>
          <table:table-cell table:formula="of:=[.B110]+[.A111]" office:value-type="float" office:value="460.31" calcext:value-type="float">
            <text:p>460.31</text:p>
          </table:table-cell>
          <table:table-cell table:style-name="ce3" office:value-type="float" office:value="1539.43" calcext:value-type="float">
            <text:p>1539.43</text:p>
          </table:table-cell>
          <table:table-cell table:number-columns-repeated="15"/>
          <table:table-cell office:value-type="float" office:value="9.87" calcext:value-type="float">
            <text:p>9.87</text:p>
          </table:table-cell>
          <table:table-cell table:formula="of:=[.T110]+[.S111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6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1]+[.A112]" office:value-type="float" office:value="470.36" calcext:value-type="float">
            <text:p>470.36</text:p>
          </table:table-cell>
          <table:table-cell table:style-name="ce3" office:value-type="float" office:value="1539.27" calcext:value-type="float">
            <text:p>1539.27</text:p>
          </table:table-cell>
          <table:table-cell table:number-columns-repeated="15"/>
          <table:table-cell office:value-type="float" office:value="10.14" calcext:value-type="float">
            <text:p>10.14</text:p>
          </table:table-cell>
          <table:table-cell table:formula="of:=[.T111]+[.S112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6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[.B112]+[.A113]" office:value-type="float" office:value="480.44" calcext:value-type="float">
            <text:p>480.44</text:p>
          </table:table-cell>
          <table:table-cell table:style-name="ce3" office:value-type="float" office:value="1539.14" calcext:value-type="float">
            <text:p>1539.14</text:p>
          </table:table-cell>
          <table:table-cell table:number-columns-repeated="15"/>
          <table:table-cell office:value-type="float" office:value="9.99" calcext:value-type="float">
            <text:p>9.99</text:p>
          </table:table-cell>
          <table:table-cell table:formula="of:=[.T112]+[.S113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6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3]+[.A114]" office:value-type="float" office:value="490.49" calcext:value-type="float">
            <text:p>490.49</text:p>
          </table:table-cell>
          <table:table-cell table:style-name="ce3" office:value-type="float" office:value="1538.86" calcext:value-type="float">
            <text:p>1538.86</text:p>
          </table:table-cell>
          <table:table-cell table:number-columns-repeated="15"/>
          <table:table-cell office:value-type="float" office:value="9.91" calcext:value-type="float">
            <text:p>9.91</text:p>
          </table:table-cell>
          <table:table-cell table:formula="of:=[.T113]+[.S114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6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[.B114]+[.A115]" office:value-type="float" office:value="501" calcext:value-type="float">
            <text:p>501</text:p>
          </table:table-cell>
          <table:table-cell table:style-name="ce3" office:value-type="float" office:value="1538.78" calcext:value-type="float">
            <text:p>1538.78</text:p>
          </table:table-cell>
          <table:table-cell table:number-columns-repeated="15"/>
          <table:table-cell office:value-type="float" office:value="10.06" calcext:value-type="float">
            <text:p>10.06</text:p>
          </table:table-cell>
          <table:table-cell table:formula="of:=[.T114]+[.S115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6"/>
        </table:table-row>
        <table:table-row table:style-name="ro1">
          <table:table-cell office:value-type="float" office:value="9.43" calcext:value-type="float">
            <text:p>9.43</text:p>
          </table:table-cell>
          <table:table-cell table:formula="of:=[.B115]+[.A116]" office:value-type="float" office:value="510.43" calcext:value-type="float">
            <text:p>510.43</text:p>
          </table:table-cell>
          <table:table-cell table:style-name="ce3" office:value-type="float" office:value="1538.66" calcext:value-type="float">
            <text:p>1538.66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15]+[.S116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6]+[.A117]" office:value-type="float" office:value="520.43" calcext:value-type="float">
            <text:p>520.43</text:p>
          </table:table-cell>
          <table:table-cell table:style-name="ce3" office:value-type="float" office:value="1538.52" calcext:value-type="float">
            <text:p>1538.52</text:p>
          </table:table-cell>
          <table:table-cell table:number-columns-repeated="15"/>
          <table:table-cell office:value-type="float" office:value="9.72" calcext:value-type="float">
            <text:p>9.72</text:p>
          </table:table-cell>
          <table:table-cell table:formula="of:=[.T116]+[.S117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6"/>
        </table:table-row>
        <table:table-row table:style-name="ro1">
          <table:table-cell office:value-type="float" office:value="9.88" calcext:value-type="float">
            <text:p>9.88</text:p>
          </table:table-cell>
          <table:table-cell table:formula="of:=[.B117]+[.A118]" office:value-type="float" office:value="530.31" calcext:value-type="float">
            <text:p>530.31</text:p>
          </table:table-cell>
          <table:table-cell table:style-name="ce3" office:value-type="float" office:value="1538.38" calcext:value-type="float">
            <text:p>1538.38</text:p>
          </table:table-cell>
          <table:table-cell table:number-columns-repeated="24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18]+[.A119]" office:value-type="float" office:value="540.37" calcext:value-type="float">
            <text:p>540.37</text:p>
          </table:table-cell>
          <table:table-cell table:style-name="ce3" office:value-type="float" office:value="1538.2" calcext:value-type="float">
            <text:p>1538.20</text:p>
          </table:table-cell>
          <table:table-cell table:number-columns-repeated="24"/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[.B119]+[.A120]" office:value-type="float" office:value="550.33" calcext:value-type="float">
            <text:p>550.33</text:p>
          </table:table-cell>
          <table:table-cell table:style-name="ce3" office:value-type="float" office:value="1538.05" calcext:value-type="float">
            <text:p>1538.05</text:p>
          </table:table-cell>
          <table:table-cell table:number-columns-repeated="24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0]+[.A121]" office:value-type="float" office:value="560.36" calcext:value-type="float">
            <text:p>560.36</text:p>
          </table:table-cell>
          <table:table-cell table:style-name="ce3" office:value-type="float" office:value="1537.92" calcext:value-type="float">
            <text:p>1537.92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1]+[.A122]" office:value-type="float" office:value="570.36" calcext:value-type="float">
            <text:p>570.36</text:p>
          </table:table-cell>
          <table:table-cell table:style-name="ce3" office:value-type="float" office:value="1537.76" calcext:value-type="float">
            <text:p>1537.76</text:p>
          </table:table-cell>
          <table:table-cell table:number-columns-repeated="24"/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[.B122]+[.A123]" office:value-type="float" office:value="580.31" calcext:value-type="float">
            <text:p>580.31</text:p>
          </table:table-cell>
          <table:table-cell table:style-name="ce3" office:value-type="float" office:value="1537.61" calcext:value-type="float">
            <text:p>1537.61</text:p>
          </table:table-cell>
          <table:table-cell table:number-columns-repeated="24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3]+[.A124]" office:value-type="float" office:value="590.34" calcext:value-type="float">
            <text:p>590.34</text:p>
          </table:table-cell>
          <table:table-cell table:style-name="ce3" office:value-type="float" office:value="1537.42" calcext:value-type="float">
            <text:p>1537.42</text:p>
          </table:table-cell>
          <table:table-cell table:number-columns-repeated="24"/>
        </table:table-row>
        <table:table-row table:style-name="ro1">
          <table:table-cell office:value-type="float" office:value="10.23" calcext:value-type="float">
            <text:p>10.23</text:p>
          </table:table-cell>
          <table:table-cell table:formula="of:=[.B124]+[.A125]" office:value-type="float" office:value="600.57" calcext:value-type="float">
            <text:p>600.57</text:p>
          </table:table-cell>
          <table:table-cell table:style-name="ce3" office:value-type="float" office:value="1537.28" calcext:value-type="float">
            <text:p>1537.28</text:p>
          </table:table-cell>
          <table:table-cell table:number-columns-repeated="24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formula="of:=[.B125]+[.A126]" office:value-type="float" office:value="610.35" calcext:value-type="float">
            <text:p>610.35</text:p>
          </table:table-cell>
          <table:table-cell table:style-name="ce3" office:value-type="float" office:value="1537.15" calcext:value-type="float">
            <text:p>1537.15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6]+[.A127]" office:value-type="float" office:value="620.35" calcext:value-type="float">
            <text:p>620.35</text:p>
          </table:table-cell>
          <table:table-cell table:style-name="ce3" office:value-type="float" office:value="1536.97" calcext:value-type="float">
            <text:p>1536.97</text:p>
          </table:table-cell>
          <table:table-cell table:number-columns-repeated="24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27]+[.A128]" office:value-type="float" office:value="630.28" calcext:value-type="float">
            <text:p>630.28</text:p>
          </table:table-cell>
          <table:table-cell table:style-name="ce3" office:value-type="float" office:value="1536.83" calcext:value-type="float">
            <text:p>1536.83</text:p>
          </table:table-cell>
          <table:table-cell table:number-columns-repeated="24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B128]+[.A129]" office:value-type="float" office:value="640.48" calcext:value-type="float">
            <text:p>640.48</text:p>
          </table:table-cell>
          <table:table-cell table:style-name="ce3" office:value-type="float" office:value="1536.4" calcext:value-type="float">
            <text:p>1536.40</text:p>
          </table:table-cell>
          <table:table-cell table:number-columns-repeated="24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29]+[.A130]" office:value-type="float" office:value="650.31" calcext:value-type="float">
            <text:p>650.31</text:p>
          </table:table-cell>
          <table:table-cell table:style-name="ce3" office:value-type="float" office:value="1536.19" calcext:value-type="float">
            <text:p>1536.19</text:p>
          </table:table-cell>
          <table:table-cell table:number-columns-repeated="24"/>
        </table:table-row>
        <table:table-row table:style-name="ro1">
          <table:table-cell office:value-type="float" office:value="19.96" calcext:value-type="float">
            <text:p>19.96</text:p>
          </table:table-cell>
          <table:table-cell table:formula="of:=[.B130]+[.A131]" office:value-type="float" office:value="670.27" calcext:value-type="float">
            <text:p>670.27</text:p>
          </table:table-cell>
          <table:table-cell table:style-name="ce3" office:value-type="float" office:value="1535.87" calcext:value-type="float">
            <text:p>1535.87</text:p>
          </table:table-cell>
          <table:table-cell table:number-columns-repeated="24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31]+[.A132]" office:value-type="float" office:value="690.47" calcext:value-type="float">
            <text:p>690.47</text:p>
          </table:table-cell>
          <table:table-cell table:style-name="ce3" office:value-type="float" office:value="1535.57" calcext:value-type="float">
            <text:p>1535.57</text:p>
          </table:table-cell>
          <table:table-cell table:number-columns-repeated="24"/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[.B132]+[.A133]" office:value-type="float" office:value="710.22" calcext:value-type="float">
            <text:p>710.22</text:p>
          </table:table-cell>
          <table:table-cell table:style-name="ce3" office:value-type="float" office:value="1535.24" calcext:value-type="float">
            <text:p>1535.24</text:p>
          </table:table-cell>
          <table:table-cell table:number-columns-repeated="24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133]+[.A134]" office:value-type="float" office:value="730.37" calcext:value-type="float">
            <text:p>730.37</text:p>
          </table:table-cell>
          <table:table-cell table:style-name="ce3" office:value-type="float" office:value="1534.92" calcext:value-type="float">
            <text:p>1534.92</text:p>
          </table:table-cell>
          <table:table-cell table:number-columns-repeated="24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4]+[.A135]" office:value-type="float" office:value="750.3" calcext:value-type="float">
            <text:p>750.3</text:p>
          </table:table-cell>
          <table:table-cell table:style-name="ce3" office:value-type="float" office:value="1534.61" calcext:value-type="float">
            <text:p>1534.61</text:p>
          </table:table-cell>
          <table:table-cell table:number-columns-repeated="24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formula="of:=[.B135]+[.A136]" office:value-type="float" office:value="770.33" calcext:value-type="float">
            <text:p>770.33</text:p>
          </table:table-cell>
          <table:table-cell table:style-name="ce3" office:value-type="float" office:value="1534.31" calcext:value-type="float">
            <text:p>1534.31</text:p>
          </table:table-cell>
          <table:table-cell table:number-columns-repeated="24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136]+[.A137]" office:value-type="float" office:value="790.39" calcext:value-type="float">
            <text:p>790.39</text:p>
          </table:table-cell>
          <table:table-cell table:style-name="ce3" office:value-type="float" office:value="1533.98" calcext:value-type="float">
            <text:p>1533.98</text:p>
          </table:table-cell>
          <table:table-cell table:number-columns-repeated="24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7]+[.A138]" office:value-type="float" office:value="810.32" calcext:value-type="float">
            <text:p>810.32</text:p>
          </table:table-cell>
          <table:table-cell table:style-name="ce3" office:value-type="float" office:value="1533.64" calcext:value-type="float">
            <text:p>1533.64</text:p>
          </table:table-cell>
          <table:table-cell table:number-columns-repeated="24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38]+[.A139]" office:value-type="float" office:value="830.3" calcext:value-type="float">
            <text:p>830.3</text:p>
          </table:table-cell>
          <table:table-cell table:style-name="ce3" office:value-type="float" office:value="1533.3" calcext:value-type="float">
            <text:p>1533.30</text:p>
          </table:table-cell>
          <table:table-cell table:number-columns-repeated="24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formula="of:=[.B139]+[.A140]" office:value-type="float" office:value="850.18" calcext:value-type="float">
            <text:p>850.18</text:p>
          </table:table-cell>
          <table:table-cell table:style-name="ce3" office:value-type="float" office:value="1532.93" calcext:value-type="float">
            <text:p>1532.93</text:p>
          </table:table-cell>
          <table:table-cell table:number-columns-repeated="24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B140]+[.A141]" office:value-type="float" office:value="870.04" calcext:value-type="float">
            <text:p>870.04</text:p>
          </table:table-cell>
          <table:table-cell table:style-name="ce3" office:value-type="float" office:value="1532.65" calcext:value-type="float">
            <text:p>1532.65</text:p>
          </table:table-cell>
          <table:table-cell table:number-columns-repeated="24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41]+[.A142]" office:value-type="float" office:value="890.24" calcext:value-type="float">
            <text:p>890.24</text:p>
          </table:table-cell>
          <table:table-cell table:style-name="ce3" office:value-type="float" office:value="1532.2" calcext:value-type="float">
            <text:p>1532.20</text:p>
          </table:table-cell>
          <table:table-cell table:number-columns-repeated="24"/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[.B142]+[.A143]" office:value-type="float" office:value="910.49" calcext:value-type="float">
            <text:p>910.49</text:p>
          </table:table-cell>
          <table:table-cell table:style-name="ce3" office:value-type="float" office:value="1531.99" calcext:value-type="float">
            <text:p>1531.99</text:p>
          </table:table-cell>
          <table:table-cell table:number-columns-repeated="24"/>
        </table:table-row>
        <table:table-row table:style-name="ro1">
          <table:table-cell office:value-type="float" office:value="19.58" calcext:value-type="float">
            <text:p>19.58</text:p>
          </table:table-cell>
          <table:table-cell table:formula="of:=[.B143]+[.A144]" office:value-type="float" office:value="930.07" calcext:value-type="float">
            <text:p>930.07</text:p>
          </table:table-cell>
          <table:table-cell office:value-type="float" office:value="1531.65" calcext:value-type="float">
            <text:p>1531.65</text:p>
          </table:table-cell>
          <table:table-cell table:number-columns-repeated="24"/>
        </table:table-row>
        <table:table-row table:style-name="ro1" table:number-rows-repeated="26">
          <table:table-cell table:number-columns-repeated="27"/>
        </table:table-row>
        <table:table-row table:style-name="ro1">
          <table:table-cell/>
          <table:table-cell office:value-type="string" calcext:value-type="string">
            <text:p>TABELLA PIOMBO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PIOMBO SECOND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[.S23]" office:value-type="float" office:value="171.762353051882" calcext:value-type="float">
            <text:p>171.76235305188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0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[.S23]" office:value-type="float" office:value="171.762353051882" calcext:value-type="float">
            <text:p>171.76235305188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38.2" calcext:value-type="float">
            <text:p>1538.20</text:p>
          </table:table-cell>
          <table:table-cell/>
          <table:table-cell office:value-type="string" calcext:value-type="string">
            <text:p>t_start</text:p>
          </table:table-cell>
          <table:table-cell table:formula="of:=[.B189]" office:value-type="float" office:value="301.8" calcext:value-type="float">
            <text:p>301.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  <table:table-cell/>
          <table:table-cell office:value-type="string" calcext:value-type="string">
            <text:p>t_start</text:p>
          </table:table-cell>
          <table:table-cell table:formula="of:=[.S184]" office:value-type="float" office:value="190.03" calcext:value-type="float">
            <text:p>190.03</text:p>
          </table:table-cell>
          <table:table-cell table:number-columns-repeated="4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formula="of:=[.B174]+[.A175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/>
          <table:table-cell office:value-type="string" calcext:value-type="string">
            <text:p>t_stop</text:p>
          </table:table-cell>
          <table:table-cell table:formula="of:=[.B193]" office:value-type="float" office:value="341.87" calcext:value-type="float">
            <text:p>341.87</text:p>
          </table:table-cell>
          <table:table-cell table:number-columns-repeated="11"/>
          <table:table-cell office:value-type="float" office:value="20.22" calcext:value-type="float">
            <text:p>20.22</text:p>
          </table:table-cell>
          <table:table-cell table:formula="of:=[.S174]+[.R175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  <table:table-cell/>
          <table:table-cell office:value-type="string" calcext:value-type="string">
            <text:p>t_stop</text:p>
          </table:table-cell>
          <table:table-cell table:formula="of:=[.S187]" office:value-type="float" office:value="205.4" calcext:value-type="float">
            <text:p>205.4</text:p>
          </table:table-cell>
          <table:table-cell table:number-columns-repeated="4"/>
        </table:table-row>
        <table:table-row table:style-name="ro1">
          <table:table-cell office:value-type="float" office:value="20.39" calcext:value-type="float">
            <text:p>20.39</text:p>
          </table:table-cell>
          <table:table-cell table:formula="of:=[.B175]+[.A176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/>
          <table:table-cell office:value-type="string" calcext:value-type="string">
            <text:p>dt</text:p>
          </table:table-cell>
          <table:table-cell table:formula="of:=[.F175]-[.F174]" office:value-type="float" office:value="40.07" calcext:value-type="float">
            <text:p>40.07</text:p>
          </table:table-cell>
          <table:table-cell table:number-columns-repeated="11"/>
          <table:table-cell office:value-type="float" office:value="20.09" calcext:value-type="float">
            <text:p>20.09</text:p>
          </table:table-cell>
          <table:table-cell table:formula="of:=[.S175]+[.R176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  <table:table-cell/>
          <table:table-cell office:value-type="string" calcext:value-type="string">
            <text:p>dt</text:p>
          </table:table-cell>
          <table:table-cell table:formula="of:=[.W175]-[.W174]" office:value-type="float" office:value="15.37" calcext:value-type="float">
            <text:p>15.37</text:p>
          </table:table-cell>
          <table:table-cell table:number-columns-repeated="4"/>
        </table:table-row>
        <table:table-row table:style-name="ro1">
          <table:table-cell office:value-type="float" office:value="19.66" calcext:value-type="float">
            <text:p>19.66</text:p>
          </table:table-cell>
          <table:table-cell table:formula="of:=[.B176]+[.A177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/>
          <table:table-cell office:value-type="string" calcext:value-type="string">
            <text:p>t_medio</text:p>
          </table:table-cell>
          <table:table-cell table:formula="of:=([.F174]+[.F175])/2" office:value-type="float" office:value="321.835" calcext:value-type="float">
            <text:p>321.835</text:p>
          </table:table-cell>
          <table:table-cell table:number-columns-repeated="11"/>
          <table:table-cell office:value-type="float" office:value="19.84" calcext:value-type="float">
            <text:p>19.84</text:p>
          </table:table-cell>
          <table:table-cell table:formula="of:=[.S176]+[.R177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  <table:table-cell/>
          <table:table-cell office:value-type="string" calcext:value-type="string">
            <text:p>t_medio</text:p>
          </table:table-cell>
          <table:table-cell table:formula="of:=([.W174]+[.W175])/2" office:value-type="float" office:value="197.715" calcext:value-type="float">
            <text:p>197.715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77]+[.A178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14"/>
          <table:table-cell office:value-type="float" office:value="20.03" calcext:value-type="float">
            <text:p>20.03</text:p>
          </table:table-cell>
          <table:table-cell table:formula="of:=[.S177]+[.R178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  <table:table-cell table:number-columns-repeated="7"/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B178]+[.A179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/>
          <table:table-cell office:value-type="string" calcext:value-type="string">
            <text:p>PENDENZA1</text:p>
          </table:table-cell>
          <table:table-cell table:formula="of:=SLOPE([.C174:.C188];[.B174:.B188])" office:value-type="float" office:value="-0.0156402388367962" calcext:value-type="float">
            <text:p>-0.0156402388367962</text:p>
          </table:table-cell>
          <table:table-cell table:number-columns-repeated="11"/>
          <table:table-cell office:value-type="float" office:value="19.94" calcext:value-type="float">
            <text:p>19.94</text:p>
          </table:table-cell>
          <table:table-cell table:formula="of:=[.S178]+[.R179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  <table:table-cell/>
          <table:table-cell office:value-type="string" calcext:value-type="string">
            <text:p>PENDENZA1</text:p>
          </table:table-cell>
          <table:table-cell table:formula="of:=SLOPE([.T174:.T183];[.S174:.S183])" office:value-type="float" office:value="-0.0128146991732574" calcext:value-type="float">
            <text:p>-0.0128146991732574</text:p>
          </table:table-cell>
          <table:table-cell table:number-columns-repeated="4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79]+[.A180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174:.C188];[.B174:.B188])" office:value-type="float" office:value="1537.99791881503" calcext:value-type="float">
            <text:p>1537.99791881503</text:p>
          </table:table-cell>
          <table:table-cell table:number-columns-repeated="11"/>
          <table:table-cell office:value-type="float" office:value="20.17" calcext:value-type="float">
            <text:p>20.17</text:p>
          </table:table-cell>
          <table:table-cell table:formula="of:=[.S179]+[.R180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T174:.T183];[.S174:.S183])" office:value-type="float" office:value="1471.97698838302" calcext:value-type="float">
            <text:p>1471.97698838302</text:p>
          </table:table-cell>
          <table:table-cell table:number-columns-repeated="4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0]+[.A181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14"/>
          <table:table-cell office:value-type="float" office:value="19.9" calcext:value-type="float">
            <text:p>19.9</text:p>
          </table:table-cell>
          <table:table-cell table:formula="of:=[.S180]+[.R181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  <table:table-cell table:number-columns-repeated="7"/>
        </table:table-row>
        <table:table-row table:style-name="ro1">
          <table:table-cell office:value-type="float" office:value="20.26" calcext:value-type="float">
            <text:p>20.26</text:p>
          </table:table-cell>
          <table:table-cell table:formula="of:=[.B181]+[.A182]" office:value-type="float" office:value="161.85" calcext:value-type="float">
            <text:p>161.85</text:p>
          </table:table-cell>
          <table:table-cell table:style-name="ce3" office:value-type="float" office:value="1535.5" calcext:value-type="float">
            <text:p>1535.50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94:.C208];[.B194:.B208])" office:value-type="float" office:value="-0.0108346332780463" calcext:value-type="float">
            <text:p>-0.0108346332780463</text:p>
          </table:table-cell>
          <table:table-cell table:number-columns-repeated="11"/>
          <table:table-cell office:value-type="float" office:value="20.07" calcext:value-type="float">
            <text:p>20.07</text:p>
          </table:table-cell>
          <table:table-cell table:formula="of:=[.S181]+[.R182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  <table:table-cell/>
          <table:table-cell office:value-type="string" calcext:value-type="string">
            <text:p>PENDENZA3</text:p>
          </table:table-cell>
          <table:table-cell table:formula="of:=SLOPE([.T188:.T204];[.S188:.S204])" office:value-type="float" office:value="-0.00669089944053993" calcext:value-type="float">
            <text:p>-0.00669089944053993</text:p>
          </table:table-cell>
          <table:table-cell table:number-columns-repeated="4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[.B182]+[.A183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94:.C208];[.B194:.B208])" office:value-type="float" office:value="1529.49406690474" calcext:value-type="float">
            <text:p>1529.49406690474</text:p>
          </table:table-cell>
          <table:table-cell table:number-columns-repeated="11"/>
          <table:table-cell office:value-type="float" office:value="20.1" calcext:value-type="float">
            <text:p>20.1</text:p>
          </table:table-cell>
          <table:table-cell table:formula="of:=[.S182]+[.R183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T188:.T204];[.S188:.S204])" office:value-type="float" office:value="1463.70713884415" calcext:value-type="float">
            <text:p>1463.70713884415</text:p>
          </table:table-cell>
          <table:table-cell table:number-columns-repeated="4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83]+[.A184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14"/>
          <table:table-cell table:style-name="ce10" office:value-type="float" office:value="9.67" calcext:value-type="float">
            <text:p>9.67</text:p>
          </table:table-cell>
          <table:table-cell table:style-name="ce10" table:formula="of:=[.S183]+[.R184]" office:value-type="float" office:value="190.03" calcext:value-type="float">
            <text:p>190.03</text:p>
          </table:table-cell>
          <table:table-cell table:style-name="ce10" office:value-type="float" office:value="1466.46" calcext:value-type="float">
            <text:p>1466.46</text:p>
          </table:table-cell>
          <table:table-cell office:value-type="string" calcext:value-type="string">
            <text:p>IMMERSO</text:p>
          </table:table-cell>
          <table:table-cell table:number-columns-repeated="6"/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[.B184]+[.A185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/>
          <table:table-cell office:value-type="string" calcext:value-type="string">
            <text:p>massa_i_extrp</text:p>
          </table:table-cell>
          <table:table-cell table:formula="of:=[.F180]+[.F179]*[.F177]" office:value-type="float" office:value="1532.96434254899" calcext:value-type="float">
            <text:p>1532.96434254899</text:p>
          </table:table-cell>
          <table:table-cell table:number-columns-repeated="11"/>
          <table:table-cell office:value-type="float" office:value="5.14" calcext:value-type="float">
            <text:p>5.14</text:p>
          </table:table-cell>
          <table:table-cell table:formula="of:=[.S184]+[.R185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  <table:table-cell/>
          <table:table-cell office:value-type="string" calcext:value-type="string">
            <text:p>massa_i_extrp</text:p>
          </table:table-cell>
          <table:table-cell table:formula="of:=[.W180]+[.W179]*[.W177]" office:value-type="float" office:value="1469.44333013598" calcext:value-type="float">
            <text:p>1469.44333013598</text:p>
          </table:table-cell>
          <table:table-cell table:number-columns-repeated="4"/>
        </table:table-row>
        <table:table-row table:style-name="ro1">
          <table:table-cell office:value-type="float" office:value="20.08" calcext:value-type="float">
            <text:p>20.08</text:p>
          </table:table-cell>
          <table:table-cell table:formula="of:=[.B185]+[.A186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/>
          <table:table-cell office:value-type="string" calcext:value-type="string">
            <text:p>massa_f_extrp</text:p>
          </table:table-cell>
          <table:table-cell table:formula="of:=[.F183]+[.F182]*[.F177]" office:value-type="float" office:value="1526.0071027037" calcext:value-type="float">
            <text:p>1526.0071027037</text:p>
          </table:table-cell>
          <table:table-cell table:number-columns-repeated="11"/>
          <table:table-cell office:value-type="float" office:value="4.89" calcext:value-type="float">
            <text:p>4.89</text:p>
          </table:table-cell>
          <table:table-cell table:formula="of:=[.S185]+[.R186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  <table:table-cell/>
          <table:table-cell office:value-type="string" calcext:value-type="string">
            <text:p>massa_f_extrp</text:p>
          </table:table-cell>
          <table:table-cell table:formula="of:=[.W183]+[.W182]*[.W177]" office:value-type="float" office:value="1462.38424766127" calcext:value-type="float">
            <text:p>1462.38424766127</text:p>
          </table:table-cell>
          <table:table-cell table:number-columns-repeated="4"/>
        </table:table-row>
        <table:table-row table:style-name="ro1">
          <table:table-cell office:value-type="float" office:value="19.91" calcext:value-type="float">
            <text:p>19.91</text:p>
          </table:table-cell>
          <table:table-cell table:formula="of:=[.B186]+[.A187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14"/>
          <table:table-cell office:value-type="float" office:value="5.34" calcext:value-type="float">
            <text:p>5.34</text:p>
          </table:table-cell>
          <table:table-cell table:formula="of:=[.S186]+[.R187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  <table:table-cell table:number-columns-repeated="7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7]+[.A188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185]-[.F186]" office:value-type="float" office:value="6.95723984528945" calcext:value-type="float">
            <text:p>6.95723984528945</text:p>
          </table:table-cell>
          <table:table-cell table:number-columns-repeated="11"/>
          <table:table-cell office:value-type="float" office:value="5.12" calcext:value-type="float">
            <text:p>5.12</text:p>
          </table:table-cell>
          <table:table-cell table:formula="of:=[.S187]+[.R188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  <table:table-cell/>
          <table:table-cell office:value-type="string" calcext:value-type="string">
            <text:p>massa netta evap</text:p>
          </table:table-cell>
          <table:table-cell table:formula="of:=[.W185]-[.W186]" office:value-type="float" office:value="7.05908247471416" calcext:value-type="float">
            <text:p>7.05908247471416</text:p>
          </table:table-cell>
          <table:table-cell table:number-columns-repeated="4"/>
        </table:table-row>
        <table:table-row table:style-name="ro1">
          <table:table-cell table:style-name="ce10" office:value-type="float" office:value="19.95" calcext:value-type="float">
            <text:p>19.95</text:p>
          </table:table-cell>
          <table:table-cell table:style-name="ce10" table:formula="of:=[.B188]+[.A189]" office:value-type="float" office:value="301.8" calcext:value-type="float">
            <text:p>301.8</text:p>
          </table:table-cell>
          <table:table-cell table:style-name="ce10"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 table:number-columns-repeated="13"/>
          <table:table-cell office:value-type="float" office:value="4.79" calcext:value-type="float">
            <text:p>4.79</text:p>
          </table:table-cell>
          <table:table-cell table:formula="of:=[.S188]+[.R189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+[.A190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4.8" calcext:value-type="float">
            <text:p>4.8</text:p>
          </table:table-cell>
          <table:table-cell table:formula="of:=[.S189]+[.R190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  <table:table-cell table:number-columns-repeated="7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90]+[.A191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F188]*[.F172])/([.F171]*([.H171]-[.H172]))*([.H173]/4.184)" office:value-type="float" office:value="7.06430659235653" calcext:value-type="float">
            <text:p>7.06430659235653</text:p>
          </table:table-cell>
          <table:table-cell table:number-columns-repeated="11"/>
          <table:table-cell office:value-type="float" office:value="5.13" calcext:value-type="float">
            <text:p>5.13</text:p>
          </table:table-cell>
          <table:table-cell table:formula="of:=[.S190]+[.R191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W188]*[.W172])/([.W171]*([.Y171]-[.Y172]))*([.Y173]/4.184)" office:value-type="float" office:value="7.16771650410695" calcext:value-type="float">
            <text:p>7.16771650410695</text:p>
          </table:table-cell>
          <table:table-cell table:number-columns-repeated="4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91]+[.A192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14"/>
          <table:table-cell office:value-type="float" office:value="4.86" calcext:value-type="float">
            <text:p>4.86</text:p>
          </table:table-cell>
          <table:table-cell table:formula="of:=[.S191]+[.R192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  <table:table-cell table:number-columns-repeated="7"/>
        </table:table-row>
        <table:table-row table:style-name="ro1">
          <table:table-cell office:value-type="float" office:value="10.31" calcext:value-type="float">
            <text:p>10.31</text:p>
          </table:table-cell>
          <table:table-cell table:formula="of:=[.B192]+[.A193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table:number-columns-repeated="14"/>
          <table:table-cell office:value-type="float" office:value="5.17" calcext:value-type="float">
            <text:p>5.17</text:p>
          </table:table-cell>
          <table:table-cell table:formula="of:=[.S192]+[.R193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  <table:table-cell table:number-columns-repeated="7"/>
        </table:table-row>
        <table:table-row table:style-name="ro1">
          <table:table-cell office:value-type="float" office:value="9.61" calcext:value-type="float">
            <text:p>9.61</text:p>
          </table:table-cell>
          <table:table-cell table:formula="of:=[.B193]+[.A194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14"/>
          <table:table-cell office:value-type="float" office:value="4.93" calcext:value-type="float">
            <text:p>4.93</text:p>
          </table:table-cell>
          <table:table-cell table:formula="of:=[.S193]+[.R194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  <table:table-cell table:number-columns-repeated="7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94]+[.A195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14"/>
          <table:table-cell office:value-type="float" office:value="5.14" calcext:value-type="float">
            <text:p>5.14</text:p>
          </table:table-cell>
          <table:table-cell table:formula="of:=[.S194]+[.R195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  <table:table-cell table:number-columns-repeated="7"/>
        </table:table-row>
        <table:table-row table:style-name="ro1">
          <table:table-cell office:value-type="float" office:value="10.38" calcext:value-type="float">
            <text:p>10.38</text:p>
          </table:table-cell>
          <table:table-cell table:formula="of:=[.B195]+[.A196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14"/>
          <table:table-cell office:value-type="float" office:value="4.99" calcext:value-type="float">
            <text:p>4.99</text:p>
          </table:table-cell>
          <table:table-cell table:formula="of:=[.S195]+[.R196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  <table:table-cell table:number-columns-repeated="7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formula="of:=[.B196]+[.A197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14"/>
          <table:table-cell office:value-type="float" office:value="9.93" calcext:value-type="float">
            <text:p>9.93</text:p>
          </table:table-cell>
          <table:table-cell table:formula="of:=[.S196]+[.R197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  <table:table-cell table:number-columns-repeated="7"/>
        </table:table-row>
        <table:table-row table:style-name="ro1">
          <table:table-cell office:value-type="float" office:value="10.01" calcext:value-type="float">
            <text:p>10.01</text:p>
          </table:table-cell>
          <table:table-cell table:formula="of:=[.B197]+[.A198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14"/>
          <table:table-cell office:value-type="float" office:value="10.07" calcext:value-type="float">
            <text:p>10.07</text:p>
          </table:table-cell>
          <table:table-cell table:formula="of:=[.S197]+[.R198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  <table:table-cell table:number-columns-repeated="7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98]+[.A199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14"/>
          <table:table-cell office:value-type="float" office:value="10.51" calcext:value-type="float">
            <text:p>10.51</text:p>
          </table:table-cell>
          <table:table-cell table:formula="of:=[.S198]+[.R199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  <table:table-cell table:number-columns-repeated="7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B199]+[.A200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14"/>
          <table:table-cell office:value-type="float" office:value="19.36" calcext:value-type="float">
            <text:p>19.36</text:p>
          </table:table-cell>
          <table:table-cell table:formula="of:=[.S199]+[.R200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  <table:table-cell table:number-columns-repeated="7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B200]+[.A201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14"/>
          <table:table-cell office:value-type="float" office:value="10.22" calcext:value-type="float">
            <text:p>10.22</text:p>
          </table:table-cell>
          <table:table-cell table:formula="of:=[.S200]+[.R201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  <table:table-cell table:number-columns-repeated="7"/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B201]+[.A202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14"/>
          <table:table-cell office:value-type="float" office:value="9.99" calcext:value-type="float">
            <text:p>9.99</text:p>
          </table:table-cell>
          <table:table-cell table:formula="of:=[.S201]+[.R202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  <table:table-cell table:number-columns-repeated="7"/>
        </table:table-row>
        <table:table-row table:style-name="ro1">
          <table:table-cell office:value-type="float" office:value="20.48" calcext:value-type="float">
            <text:p>20.48</text:p>
          </table:table-cell>
          <table:table-cell table:formula="of:=[.B202]+[.A203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14"/>
          <table:table-cell office:value-type="float" office:value="9.92" calcext:value-type="float">
            <text:p>9.92</text:p>
          </table:table-cell>
          <table:table-cell table:formula="of:=[.S202]+[.R203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  <table:table-cell table:number-columns-repeated="7"/>
        </table:table-row>
        <table:table-row table:style-name="ro1">
          <table:table-cell office:value-type="float" office:value="20.33" calcext:value-type="float">
            <text:p>20.33</text:p>
          </table:table-cell>
          <table:table-cell table:formula="of:=[.B203]+[.A204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14"/>
          <table:table-cell office:value-type="float" office:value="9.86" calcext:value-type="float">
            <text:p>9.86</text:p>
          </table:table-cell>
          <table:table-cell table:formula="of:=[.S203]+[.R204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  <table:table-cell table:number-columns-repeated="7"/>
        </table:table-row>
        <table:table-row table:style-name="ro1">
          <table:table-cell office:value-type="float" office:value="20.27" calcext:value-type="float">
            <text:p>20.27</text:p>
          </table:table-cell>
          <table:table-cell table:formula="of:=[.B204]+[.A205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24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B205]+[.A206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24"/>
        </table:table-row>
        <table:table-row table:style-name="ro1">
          <table:table-cell office:value-type="float" office:value="20.38" calcext:value-type="float">
            <text:p>20.38</text:p>
          </table:table-cell>
          <table:table-cell table:formula="of:=[.B206]+[.A207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24"/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B207]+[.A208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14:08:00.373920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5:03:09.498647801</meta:creation-date>
    <dc:date>2026-07-08T15:27:19.356144335</dc:date>
    <meta:editing-duration>PT1H58M</meta:editing-duration>
    <meta:editing-cycles>11</meta:editing-cycles>
    <meta:generator>LibreOffice/24.2.7.2$Linux_X86_64 LibreOffice_project/420$Build-2</meta:generator>
    <meta:document-statistic meta:table-count="1" meta:cell-count="91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table:cell-range-address="Sheet1.A6:Sheet1.B19 Sheet1.J63:Sheet1.J64 Sheet1.B20:Sheet1.B57" svg:x="0.32cm" svg:y="0.18cm" svg:width="15.369cm" svg:height="8.645cm">
          <chart:coordinate-region svg:x="1.788cm" svg:y="0.379cm" svg:width="13.529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O6:Sheet1.P12 Sheet1.AA22:Sheet1.AA23 Sheet1.P13:Sheet1.P30" svg:x="0.345cm" svg:y="0.178cm" svg:width="15.323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