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8in"/>
    </style:style>
    <style:style style:name="co3" style:family="table-column">
      <style:table-column-properties fo:break-before="auto" style:column-width="1.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5983b0"/>
    </style:style>
    <style:style style:name="ce10" style:family="table-cell" style:parent-style-name="Default">
      <style:table-cell-properties fo:background-color="#b4c7dc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158466"/>
    </style:style>
    <style:style style:name="ce5" style:family="table-cell" style:parent-style-name="Default" style:data-style-name="N2">
      <style:table-cell-properties fo:background-color="#ff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2">
      <style:table-cell-properties fo:background-color="#5983b0"/>
    </style:style>
    <style:style style:name="ce12" style:family="table-cell" style:parent-style-name="Default" style:data-style-name="N2">
      <style:table-cell-properties fo:background-color="#81d41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marker-start="Arrow" draw:marker-start-width="0.0787in"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6.3024in" svg:height="3.5449in" svg:x="0.2232in" svg:y="10.5441in">
            <draw:object draw:notify-on-update-of-ranges="Sheet1.A6:Sheet1.A19 Sheet1.B6:Sheet1.B19 Sheet1.I63:Sheet1.I64 Sheet1.J63:Sheet1.J64 Sheet1.A44:Sheet1.A57 Sheet1.B44:Sheet1.B57 Sheet1.A20:Sheet1.A43 Sheet1.B20:Sheet1.B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nector draw:z-index="1" draw:name="Object Connectors 1" draw:style-name="gr2" draw:text-style-name="P2" draw:type="line" svg:x1="7.2972in" svg:y1="11.2752in" svg:x2="7.2862in" svg:y2="12.676in" svg:d="M18535 28639l-28 3558" svg:viewBox="0 0 29 3559">
            <text:p/>
          </draw:connector>
          <draw:frame draw:z-index="2" draw:style-name="gr1" draw:text-style-name="P1" svg:width="6.2988in" svg:height="3.5429in" svg:x="15.3626in" svg:y="4.2256in">
            <draw:object draw:notify-on-update-of-ranges="Sheet1.O6:Sheet1.O12 Sheet1.P6:Sheet1.P12 Sheet1.Z22:Sheet1.Z23 Sheet1.AA22:Sheet1.AA23 Sheet1.O24:Sheet1.O30 Sheet1.P24:Sheet1.P30 Sheet1.O13:Sheet1.O23 Sheet1.P13:Sheet1.P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6.2988in" svg:height="3.5429in" svg:x="3.8311in" svg:y="19.3291in">
            <draw:object draw:notify-on-update-of-ranges="Sheet1.B87:Sheet1.B103 Sheet1.C87:Sheet1.C103 Sheet1.H103:Sheet1.H104 Sheet1.I103:Sheet1.I104 Sheet1.B104:Sheet1.B144 Sheet1.C104:Sheet1.C1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6.2988in" svg:height="3.5429in" svg:x="19.7547in" svg:y="18.7748in">
            <draw:object draw:notify-on-update-of-ranges="Sheet1.AD107:Sheet1.AD107 Sheet1.T87:Sheet1.T93 Sheet1.U87:Sheet1.U93 Sheet1.Z103:Sheet1.Z104 Sheet1.AA103:Sheet1.AA104 Sheet1.T94:Sheet1.T99 Sheet1.U94:Sheet1.U99 Sheet1.T100:Sheet1.T117 Sheet1.U100:Sheet1.U1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tstart</text:p>
          </table:table-cell>
          <table:table-cell table:formula="of:=[.A20]" office:value-type="float" office:value="306.7" calcext:value-type="float">
            <text:p>306.7</text:p>
          </table:table-cell>
          <table:table-cell/>
          <table:table-cell table:number-matrix-columns-spanned="2" table:number-matrix-rows-spanned="2" table:formula="of:=LINEST([.B5:.B19];[.A5:.A19];1;1)" office:value-type="float" office:value="-0.0224400022857336" calcext:value-type="float">
            <text:p>-0.0224400022857336</text:p>
          </table:table-cell>
          <table:table-cell office:value-type="float" office:value="1606.5893832331" calcext:value-type="float">
            <text:p>1606.5893832331</text:p>
          </table:table-cell>
          <table:table-cell table:number-columns-repeated="9"/>
          <table:table-cell office:value-type="string" calcext:value-type="string">
            <text:p>tstart</text:p>
          </table:table-cell>
          <table:table-cell table:style-name="ce3" table:formula="of:=[.O12]" office:value-type="float" office:value="113.07" calcext:value-type="float">
            <text:p>113.07</text:p>
          </table:table-cell>
          <table:table-cell/>
          <table:table-cell table:number-matrix-columns-spanned="2" table:number-matrix-rows-spanned="2" table:formula="of:=LINEST([.P6:.P11];[.O6:.O11];1;1)" office:value-type="float" office:value="-0.0170479604895515" calcext:value-type="float">
            <text:p>-0.0170479604895515</text:p>
          </table:table-cell>
          <table:table-cell office:value-type="float" office:value="1479.14545090052" calcext:value-type="float">
            <text:p>1479.14545090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ELLA AZOTO LIQUIDO PRIMA VOLTA</text:p>
          </table:table-cell>
          <table:table-cell table:number-columns-repeated="2"/>
          <table:table-cell office:value-type="string" calcext:value-type="string">
            <text:p>tstop</text:p>
          </table:table-cell>
          <table:table-cell table:formula="of:=[.A43]" office:value-type="float" office:value="603.03" calcext:value-type="float">
            <text:p>603.03</text:p>
          </table:table-cell>
          <table:table-cell/>
          <table:table-cell office:value-type="float" office:value="0.000086300170540989" calcext:value-type="float">
            <text:p>8.6300170540989E-05</text:p>
          </table:table-cell>
          <table:table-cell office:value-type="float" office:value="0.0145064782170904" calcext:value-type="float">
            <text:p>0.0145064782170904</text:p>
          </table:table-cell>
          <table:table-cell table:number-columns-repeated="5"/>
          <table:table-cell office:value-type="string" calcext:value-type="string">
            <text:p>TABELLA AZOTO LIQUIDO SECONDA VOLTA</text:p>
          </table:table-cell>
          <table:table-cell table:number-columns-repeated="3"/>
          <table:table-cell office:value-type="string" calcext:value-type="string">
            <text:p>tstop</text:p>
          </table:table-cell>
          <table:table-cell table:style-name="ce3" table:formula="of:=[.O24]" office:value-type="float" office:value="238.57" calcext:value-type="float">
            <text:p>238.57</text:p>
          </table:table-cell>
          <table:table-cell/>
          <table:table-cell office:value-type="float" office:value="0.000252571273041298" calcext:value-type="float">
            <text:p>0.000252571273041298</text:p>
          </table:table-cell>
          <table:table-cell office:value-type="float" office:value="0.0157256875043316" calcext:value-type="float">
            <text:p>0.01572568750433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t</text:p>
          </table:table-cell>
          <table:table-cell table:formula="of:=[.E2]-[.E1]" office:value-type="float" office:value="296.33" calcext:value-type="float">
            <text:p>296.33</text:p>
          </table:table-cell>
          <table:table-cell table:number-columns-repeated="9"/>
          <table:table-cell table:style-name="ce11" table:number-columns-spanned="2" table:number-rows-spanned="1"/>
          <table:covered-table-cell/>
          <table:table-cell/>
          <table:table-cell office:value-type="string" calcext:value-type="string">
            <text:p>dt</text:p>
          </table:table-cell>
          <table:table-cell table:formula="of:=[.S2]-[.S1]" office:value-type="float" office:value="125.5" calcext:value-type="float">
            <text:p>125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MASSA</text:p>
          </table:table-cell>
          <table:table-cell/>
          <table:table-cell office:value-type="string" calcext:value-type="string">
            <text:p>tmedio</text:p>
          </table:table-cell>
          <table:table-cell table:formula="of:=([.E1]+[.E2])/2" office:value-type="float" office:value="454.865" calcext:value-type="float">
            <text:p>454.865</text:p>
          </table:table-cell>
          <table:table-cell/>
          <table:table-cell table:number-matrix-columns-spanned="2" table:number-matrix-rows-spanned="2" table:formula="of:=LINEST([.B44:.B57];[.E44:.E57];1;1)" office:value-type="float" office:value="-0.014350165741148" calcext:value-type="float">
            <text:p>-0.014350165741148</text:p>
          </table:table-cell>
          <table:table-cell office:value-type="float" office:value="1587.9186050768" calcext:value-type="float">
            <text:p>1587.9186050768</text:p>
          </table:table-cell>
          <table:table-cell table:number-columns-repeated="6"/>
          <table:table-cell table:style-name="ce11" table:number-columns-spanned="2" table:number-rows-spanned="1"/>
          <table:covered-table-cell/>
          <table:table-cell/>
          <table:table-cell office:value-type="string" calcext:value-type="string">
            <text:p>tmedio</text:p>
          </table:table-cell>
          <table:table-cell table:formula="of:=([.S1]+[.S2])/2" office:value-type="float" office:value="175.82" calcext:value-type="float">
            <text:p>175.82</text:p>
          </table:table-cell>
          <table:table-cell/>
          <table:table-cell table:number-matrix-columns-spanned="2" table:number-matrix-rows-spanned="2" table:formula="of:=LINEST([.P25:.P30];[.O25:.O30];1;1)" office:value-type="float" office:value="-0.0129065691618351" calcext:value-type="float">
            <text:p>-0.0129065691618351</text:p>
          </table:table-cell>
          <table:table-cell office:value-type="float" office:value="1473.50507963481" calcext:value-type="float">
            <text:p>1473.5050796348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606.58" calcext:value-type="float">
            <text:p>1606.58</text:p>
          </table:table-cell>
          <table:table-cell table:number-columns-repeated="4"/>
          <table:table-cell office:value-type="float" office:value="0.0013134560720139" calcext:value-type="float">
            <text:p>0.0013134560720139</text:p>
          </table:table-cell>
          <table:table-cell office:value-type="float" office:value="0.410547375929102" calcext:value-type="float">
            <text:p>0.410547375929102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4"/>
          <table:table-cell office:value-type="float" office:value="0.000469987359814172" calcext:value-type="float">
            <text:p>0.000469987359814172</text:p>
          </table:table-cell>
          <table:table-cell office:value-type="float" office:value="0.146639845373177" calcext:value-type="float">
            <text:p>0.146639845373177</text:p>
          </table:table-cell>
          <table:table-cell table:number-columns-repeated="6"/>
        </table:table-row>
        <table:table-row table:style-name="ro1">
          <table:table-cell office:value-type="float" office:value="20.35" calcext:value-type="float">
            <text:p>20.35</text:p>
          </table:table-cell>
          <table:table-cell table:style-name="ce3" office:value-type="float" office:value="1606.2" calcext:value-type="float">
            <text:p>1606.20</text:p>
          </table:table-cell>
          <table:table-cell/>
          <table:table-cell office:value-type="string" calcext:value-type="string">
            <text:p>PENDENZA1</text:p>
          </table:table-cell>
          <table:table-cell table:formula="of:=SLOPE([.B5:.B19];[.A5:.A19])" office:value-type="float" office:value="-0.0224400022857336" calcext:value-type="float">
            <text:p>-0.0224400022857336</text:p>
          </table:table-cell>
          <table:table-cell table:number-columns-repeated="9"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479.17" calcext:value-type="float">
            <text:p>1479.17</text:p>
          </table:table-cell>
          <table:table-cell/>
          <table:table-cell office:value-type="string" calcext:value-type="string">
            <text:p>PENDENZA1</text:p>
          </table:table-cell>
          <table:table-cell table:formula="of:=SLOPE([.P6:.P11];[.O6:.O11])" office:value-type="float" office:value="-0.0170479604895515" calcext:value-type="float">
            <text:p>-0.0170479604895515</text:p>
          </table:table-cell>
          <table:table-cell table:number-columns-repeated="9"/>
        </table:table-row>
        <table:table-row table:style-name="ro1">
          <table:table-cell office:value-type="float" office:value="40.41" calcext:value-type="float">
            <text:p>40.41</text:p>
          </table:table-cell>
          <table:table-cell table:style-name="ce3" office:value-type="float" office:value="1605.65" calcext:value-type="float">
            <text:p>1605.65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B5:.B19];[.A5:.A19])" office:value-type="float" office:value="1606.5893832331" calcext:value-type="float">
            <text:p>1606.5893832331</text:p>
          </table:table-cell>
          <table:table-cell table:number-columns-repeated="8"/>
          <table:table-cell office:value-type="float" office:value="20.7" calcext:value-type="float">
            <text:p>20.7</text:p>
          </table:table-cell>
          <table:table-cell table:style-name="ce3" table:formula="of:=[.O6]+[.N7]" office:value-type="float" office:value="20.7" calcext:value-type="float">
            <text:p>20.70</text:p>
          </table:table-cell>
          <table:table-cell table:style-name="ce3" office:value-type="float" office:value="1478.77" calcext:value-type="float">
            <text:p>1478.77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P6:.P11];[.O6:.O11])" office:value-type="float" office:value="1479.14545090052" calcext:value-type="float">
            <text:p>1479.14545090052</text:p>
          </table:table-cell>
          <table:table-cell table:number-columns-repeated="9"/>
        </table:table-row>
        <table:table-row table:style-name="ro1">
          <table:table-cell table:formula="of:=[.A7]+19.7" office:value-type="float" office:value="60.11" calcext:value-type="float">
            <text:p>60.11</text:p>
          </table:table-cell>
          <table:table-cell table:style-name="ce3" office:value-type="float" office:value="1605.25" calcext:value-type="float">
            <text:p>1605.25</text:p>
          </table:table-cell>
          <table:table-cell table:number-columns-repeated="4"/>
          <table:table-cell office:value-type="string" calcext:value-type="string">
            <text:p>ERRORE MASSA</text:p>
          </table:table-cell>
          <table:table-cell table:number-columns-repeated="6"/>
          <table:table-cell office:value-type="float" office:value="20.58" calcext:value-type="float">
            <text:p>20.58</text:p>
          </table:table-cell>
          <table:table-cell table:style-name="ce3" table:formula="of:=[.O7]+[.N8]" office:value-type="float" office:value="41.28" calcext:value-type="float">
            <text:p>41.28</text:p>
          </table:table-cell>
          <table:table-cell table:style-name="ce3" office:value-type="float" office:value="1478.42" calcext:value-type="float">
            <text:p>1478.42</text:p>
          </table:table-cell>
          <table:table-cell table:number-columns-repeated="5"/>
          <table:table-cell table:formula="of:=175.2-113.07" office:value-type="float" office:value="62.13" calcext:value-type="float">
            <text:p>62.13</text:p>
          </table:table-cell>
          <table:table-cell table:number-columns-repeated="6"/>
        </table:table-row>
        <table:table-row table:style-name="ro1">
          <table:table-cell table:formula="of:=[.A8]+20.51" office:value-type="float" office:value="80.62" calcext:value-type="float">
            <text:p>80.62</text:p>
          </table:table-cell>
          <table:table-cell table:style-name="ce3" office:value-type="float" office:value="1604.75" calcext:value-type="float">
            <text:p>1604.75</text:p>
          </table:table-cell>
          <table:table-cell/>
          <table:table-cell office:value-type="string" calcext:value-type="string">
            <text:p>PENDENZA3</text:p>
          </table:table-cell>
          <table:table-cell table:formula="of:=SLOPE([.B44:.B57];[.A44:.A57])" office:value-type="float" office:value="-0.014350165741148" calcext:value-type="float">
            <text:p>-0.014350165741148</text:p>
          </table:table-cell>
          <table:table-cell/>
          <table:table-cell office:value-type="string" calcext:value-type="string">
            <text:p>Fase 1</text:p>
          </table:table-cell>
          <table:table-cell table:formula="of:=[.H2]+[.E4]*[.G2]" office:value-type="float" office:value="0.0537614052902174" calcext:value-type="float">
            <text:p>0.0537614052902174</text:p>
          </table:table-cell>
          <table:table-cell table:number-columns-repeated="5"/>
          <table:table-cell office:value-type="float" office:value="20.57" calcext:value-type="float">
            <text:p>20.57</text:p>
          </table:table-cell>
          <table:table-cell table:style-name="ce3" table:formula="of:=[.O8]+[.N9]" office:value-type="float" office:value="61.85" calcext:value-type="float">
            <text:p>61.85</text:p>
          </table:table-cell>
          <table:table-cell table:style-name="ce3" office:value-type="float" office:value="1478.1" calcext:value-type="float">
            <text:p>1478.10</text:p>
          </table:table-cell>
          <table:table-cell/>
          <table:table-cell office:value-type="string" calcext:value-type="string">
            <text:p>PENDENZA3</text:p>
          </table:table-cell>
          <table:table-cell table:formula="of:=SLOPE([.P25:.P30];[.O25:.O30])" office:value-type="float" office:value="-0.0129065691618351" calcext:value-type="float">
            <text:p>-0.0129065691618351</text:p>
          </table:table-cell>
          <table:table-cell table:number-columns-repeated="9"/>
        </table:table-row>
        <table:table-row table:style-name="ro1">
          <table:table-cell table:formula="of:=[.A9]+20.31" office:value-type="float" office:value="100.93" calcext:value-type="float">
            <text:p>100.93</text:p>
          </table:table-cell>
          <table:table-cell table:style-name="ce3" office:value-type="float" office:value="1604.3" calcext:value-type="float">
            <text:p>1604.30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B44:.B57];[.A44:.A57])" office:value-type="float" office:value="1594.44599321664" calcext:value-type="float">
            <text:p>1594.44599321664</text:p>
          </table:table-cell>
          <table:table-cell/>
          <table:table-cell office:value-type="string" calcext:value-type="string">
            <text:p>Fase 2</text:p>
          </table:table-cell>
          <table:table-cell table:formula="of:=[.H5]" office:value-type="float" office:value="0.410547375929102" calcext:value-type="float">
            <text:p>0.410547375929102</text:p>
          </table:table-cell>
          <table:table-cell table:number-columns-repeated="5"/>
          <table:table-cell office:value-type="float" office:value="20.26" calcext:value-type="float">
            <text:p>20.26</text:p>
          </table:table-cell>
          <table:table-cell table:style-name="ce3" table:formula="of:=[.O9]+[.N10]" office:value-type="float" office:value="82.11" calcext:value-type="float">
            <text:p>82.11</text:p>
          </table:table-cell>
          <table:table-cell table:style-name="ce3" office:value-type="float" office:value="1477.76" calcext:value-type="float">
            <text:p>1477.76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P25:.P30];[.O25:.O30])" office:value-type="float" office:value="1473.50507963481" calcext:value-type="float">
            <text:p>1473.50507963481</text:p>
          </table:table-cell>
          <table:table-cell table:number-columns-repeated="9"/>
        </table:table-row>
        <table:table-row table:style-name="ro1">
          <table:table-cell table:formula="of:=[.A10]+21.08" office:value-type="float" office:value="122.01" calcext:value-type="float">
            <text:p>122.01</text:p>
          </table:table-cell>
          <table:table-cell table:style-name="ce3" office:value-type="float" office:value="1603.87" calcext:value-type="float">
            <text:p>1603.87</text:p>
          </table:table-cell>
          <table:table-cell table:number-columns-repeated="4"/>
          <table:table-cell office:value-type="string" calcext:value-type="string">
            <text:p>1+2</text:p>
          </table:table-cell>
          <table:table-cell table:formula="of:=[.H10]+[.H9]" office:value-type="float" office:value="0.464308781219319" calcext:value-type="float">
            <text:p>0.464308781219319</text:p>
          </table:table-cell>
          <table:table-cell table:number-columns-repeated="5"/>
          <table:table-cell office:value-type="float" office:value="20.65" calcext:value-type="float">
            <text:p>20.65</text:p>
          </table:table-cell>
          <table:table-cell table:style-name="ce3" table:formula="of:=[.O10]+[.N11]" office:value-type="float" office:value="102.76" calcext:value-type="float">
            <text:p>102.76</text:p>
          </table:table-cell>
          <table:table-cell table:style-name="ce3" office:value-type="float" office:value="1477.39" calcext:value-type="float">
            <text:p>1477.39</text:p>
          </table:table-cell>
          <table:table-cell table:number-columns-repeated="12"/>
        </table:table-row>
        <table:table-row table:style-name="ro1">
          <table:table-cell table:formula="of:=[.A11]+20.21" office:value-type="float" office:value="142.22" calcext:value-type="float">
            <text:p>142.22</text:p>
          </table:table-cell>
          <table:table-cell table:style-name="ce3" office:value-type="float" office:value="1603.38" calcext:value-type="float">
            <text:p>1603.38</text:p>
          </table:table-cell>
          <table:table-cell/>
          <table:table-cell office:value-type="string" calcext:value-type="string">
            <text:p>massa_i_extrp</text:p>
          </table:table-cell>
          <table:table-cell table:formula="of:=[.E7]+[.E6]*[.E4]" office:value-type="float" office:value="1596.3822115934" calcext:value-type="float">
            <text:p>1596.3822115934</text:p>
          </table:table-cell>
          <table:table-cell table:number-columns-repeated="8"/>
          <table:table-cell office:value-type="float" office:value="10.31" calcext:value-type="float">
            <text:p>10.31</text:p>
          </table:table-cell>
          <table:table-cell table:style-name="ce12" table:formula="of:=[.O11]+[.N12]" office:value-type="float" office:value="113.07" calcext:value-type="float">
            <text:p>113.07</text:p>
          </table:table-cell>
          <table:table-cell table:style-name="ce12" office:value-type="float" office:value="1477.15" calcext:value-type="float">
            <text:p>1477.15</text:p>
          </table:table-cell>
          <table:table-cell office:value-type="string" calcext:value-type="string">
            <text:p>ACCESO</text:p>
          </table:table-cell>
          <table:table-cell office:value-type="string" calcext:value-type="string">
            <text:p>massa_i_extrp</text:p>
          </table:table-cell>
          <table:table-cell table:formula="of:=[.S7]+[.S6]*[.S4]" office:value-type="float" office:value="1476.14807848725" calcext:value-type="float">
            <text:p>1476.14807848725</text:p>
          </table:table-cell>
          <table:table-cell table:number-columns-repeated="9"/>
        </table:table-row>
        <table:table-row table:style-name="ro1">
          <table:table-cell table:formula="of:=[.A12]+20.45" office:value-type="float" office:value="162.67" calcext:value-type="float">
            <text:p>162.67</text:p>
          </table:table-cell>
          <table:table-cell table:style-name="ce3" office:value-type="float" office:value="1602.96" calcext:value-type="float">
            <text:p>1602.96</text:p>
          </table:table-cell>
          <table:table-cell/>
          <table:table-cell office:value-type="string" calcext:value-type="string">
            <text:p>massa_f_extrp</text:p>
          </table:table-cell>
          <table:table-cell table:formula="of:=[.E10]+[.E9]*[.E4]" office:value-type="float" office:value="1587.9186050768" calcext:value-type="float">
            <text:p>1587.9186050768</text:p>
          </table:table-cell>
          <table:table-cell table:number-columns-repeated="8"/>
          <table:table-cell office:value-type="float" office:value="10.32" calcext:value-type="float">
            <text:p>10.32</text:p>
          </table:table-cell>
          <table:table-cell table:style-name="ce3" table:formula="of:=[.O12]+[.N13]" office:value-type="float" office:value="123.39" calcext:value-type="float">
            <text:p>123.39</text:p>
          </table:table-cell>
          <table:table-cell table:style-name="ce3" office:value-type="float" office:value="1476.7" calcext:value-type="float">
            <text:p>1476.70</text:p>
          </table:table-cell>
          <table:table-cell/>
          <table:table-cell office:value-type="string" calcext:value-type="string">
            <text:p>massa_f_extrp</text:p>
          </table:table-cell>
          <table:table-cell table:formula="of:=[.S10]+[.S9]*[.S4]" office:value-type="float" office:value="1471.23584664477" calcext:value-type="float">
            <text:p>1471.23584664477</text:p>
          </table:table-cell>
          <table:table-cell table:number-columns-repeated="9"/>
        </table:table-row>
        <table:table-row table:style-name="ro1">
          <table:table-cell table:formula="of:=[.A13]+21.93" office:value-type="float" office:value="184.6" calcext:value-type="float">
            <text:p>184.6</text:p>
          </table:table-cell>
          <table:table-cell table:style-name="ce3" office:value-type="float" office:value="1602.41" calcext:value-type="float">
            <text:p>1602.41</text:p>
          </table:table-cell>
          <table:table-cell table:number-columns-repeated="11"/>
          <table:table-cell office:value-type="float" office:value="10.39" calcext:value-type="float">
            <text:p>10.39</text:p>
          </table:table-cell>
          <table:table-cell table:style-name="ce3" table:formula="of:=[.O13]+[.N14]" office:value-type="float" office:value="133.78" calcext:value-type="float">
            <text:p>133.78</text:p>
          </table:table-cell>
          <table:table-cell table:style-name="ce3" office:value-type="float" office:value="1476.12" calcext:value-type="float">
            <text:p>1476.12</text:p>
          </table:table-cell>
          <table:table-cell table:number-columns-repeated="12"/>
        </table:table-row>
        <table:table-row table:style-name="ro1">
          <table:table-cell table:formula="of:=[.A14]+20.36" office:value-type="float" office:value="204.96" calcext:value-type="float">
            <text:p>204.96</text:p>
          </table:table-cell>
          <table:table-cell table:style-name="ce3" office:value-type="float" office:value="1602" calcext:value-type="float">
            <text:p>1602.00</text:p>
          </table:table-cell>
          <table:table-cell/>
          <table:table-cell office:value-type="string" calcext:value-type="string">
            <text:p>massa netta evap</text:p>
          </table:table-cell>
          <table:table-cell table:formula="of:=[.E12]-[.E13]" office:value-type="float" office:value="8.4636065166012" calcext:value-type="float">
            <text:p>8.4636065166012</text:p>
          </table:table-cell>
          <table:table-cell table:number-columns-repeated="8"/>
          <table:table-cell office:value-type="float" office:value="10.51" calcext:value-type="float">
            <text:p>10.51</text:p>
          </table:table-cell>
          <table:table-cell table:style-name="ce3" table:formula="of:=[.O14]+[.N15]" office:value-type="float" office:value="144.29" calcext:value-type="float">
            <text:p>144.29</text:p>
          </table:table-cell>
          <table:table-cell table:style-name="ce3" office:value-type="float" office:value="1475.55" calcext:value-type="float">
            <text:p>1475.55</text:p>
          </table:table-cell>
          <table:table-cell/>
          <table:table-cell office:value-type="string" calcext:value-type="string">
            <text:p>massa netta evap</text:p>
          </table:table-cell>
          <table:table-cell table:formula="of:=[.S12]-[.S13]" office:value-type="float" office:value="4.91223184247565" calcext:value-type="float">
            <text:p>4.91223184247565</text:p>
          </table:table-cell>
          <table:table-cell/>
          <table:table-cell office:value-type="string" calcext:value-type="string">
            <text:p>ERRORE MASSA</text:p>
          </table:table-cell>
          <table:table-cell table:number-columns-repeated="7"/>
        </table:table-row>
        <table:table-row table:style-name="ro1">
          <table:table-cell table:formula="of:=[.A15]+20.73" office:value-type="float" office:value="225.69" calcext:value-type="float">
            <text:p>225.69</text:p>
          </table:table-cell>
          <table:table-cell table:style-name="ce3" office:value-type="float" office:value="1601.55" calcext:value-type="float">
            <text:p>1601.55</text:p>
          </table:table-cell>
          <table:table-cell/>
          <table:table-cell office:value-type="string" calcext:value-type="string">
            <text:p>TENSIONE</text:p>
          </table:table-cell>
          <table:table-cell office:value-type="float" office:value="8.3" calcext:value-type="float">
            <text:p>8.3</text:p>
          </table:table-cell>
          <table:table-cell table:number-columns-repeated="8"/>
          <table:table-cell office:value-type="float" office:value="10.41" calcext:value-type="float">
            <text:p>10.41</text:p>
          </table:table-cell>
          <table:table-cell table:style-name="ce3" table:formula="of:=[.O15]+[.N16]" office:value-type="float" office:value="154.7" calcext:value-type="float">
            <text:p>154.70</text:p>
          </table:table-cell>
          <table:table-cell table:style-name="ce3" office:value-type="float" office:value="1474.93" calcext:value-type="float">
            <text:p>1474.93</text:p>
          </table:table-cell>
          <table:table-cell/>
          <table:table-cell office:value-type="string" calcext:value-type="string">
            <text:p>TENSIONE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Fase 1</text:p>
          </table:table-cell>
          <table:table-cell table:formula="of:=[.V2]+[.S4]*[.U2]" office:value-type="float" office:value="0.0601327687304526" calcext:value-type="float">
            <text:p>0.0601327687304526</text:p>
          </table:table-cell>
          <table:table-cell table:number-columns-repeated="6"/>
        </table:table-row>
        <table:table-row table:style-name="ro1">
          <table:table-cell table:formula="of:=[.A16]+19.97" office:value-type="float" office:value="245.66" calcext:value-type="float">
            <text:p>245.66</text:p>
          </table:table-cell>
          <table:table-cell table:style-name="ce3" office:value-type="float" office:value="1601.06" calcext:value-type="float">
            <text:p>1601.06</text:p>
          </table:table-cell>
          <table:table-cell/>
          <table:table-cell office:value-type="string" calcext:value-type="string">
            <text:p>CORRENTE</text:p>
          </table:table-cell>
          <table:table-cell office:value-type="float" office:value="0.81" calcext:value-type="float">
            <text:p>0.81</text:p>
          </table:table-cell>
          <table:table-cell table:number-columns-repeated="8"/>
          <table:table-cell office:value-type="float" office:value="10.3" calcext:value-type="float">
            <text:p>10.3</text:p>
          </table:table-cell>
          <table:table-cell table:style-name="ce3" table:formula="of:=[.O16]+[.N17]" office:value-type="float" office:value="165" calcext:value-type="float">
            <text:p>165.00</text:p>
          </table:table-cell>
          <table:table-cell table:style-name="ce3" office:value-type="float" office:value="1474.44" calcext:value-type="float">
            <text:p>1474.44</text:p>
          </table:table-cell>
          <table:table-cell/>
          <table:table-cell office:value-type="string" calcext:value-type="string">
            <text:p>CORRENTE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Fase 2</text:p>
          </table:table-cell>
          <table:table-cell table:formula="of:=[.V5]" office:value-type="float" office:value="0.146639845373177" calcext:value-type="float">
            <text:p>0.146639845373177</text:p>
          </table:table-cell>
          <table:table-cell table:number-columns-repeated="6"/>
        </table:table-row>
        <table:table-row table:style-name="ro1">
          <table:table-cell table:formula="of:=[.A17]+20.11" office:value-type="float" office:value="265.77" calcext:value-type="float">
            <text:p>265.77</text:p>
          </table:table-cell>
          <table:table-cell table:style-name="ce3" office:value-type="float" office:value="1600.65" calcext:value-type="float">
            <text:p>1600.65</text:p>
          </table:table-cell>
          <table:table-cell table:number-columns-repeated="11"/>
          <table:table-cell office:value-type="float" office:value="10.51" calcext:value-type="float">
            <text:p>10.51</text:p>
          </table:table-cell>
          <table:table-cell table:style-name="ce3" table:formula="of:=[.O17]+[.N18]" office:value-type="float" office:value="175.51" calcext:value-type="float">
            <text:p>175.51</text:p>
          </table:table-cell>
          <table:table-cell table:style-name="ce3" office:value-type="float" office:value="1473.9" calcext:value-type="float">
            <text:p>1473.90</text:p>
          </table:table-cell>
          <table:table-cell table:number-columns-repeated="4"/>
          <table:table-cell office:value-type="string" calcext:value-type="string">
            <text:p>1+2</text:p>
          </table:table-cell>
          <table:table-cell table:formula="of:=[.V17]+[.V16]" office:value-type="float" office:value="0.206772614103629" calcext:value-type="float">
            <text:p>0.206772614103629</text:p>
          </table:table-cell>
          <table:table-cell table:number-columns-repeated="6"/>
        </table:table-row>
        <table:table-row table:style-name="ro1">
          <table:table-cell table:formula="of:=[.A18]+20.42" office:value-type="float" office:value="286.19" calcext:value-type="float">
            <text:p>286.19</text:p>
          </table:table-cell>
          <table:table-cell table:style-name="ce3" office:value-type="float" office:value="1600.16" calcext:value-type="float">
            <text:p>1600.16</text:p>
          </table:table-cell>
          <table:table-cell table:number-columns-repeated="11"/>
          <table:table-cell office:value-type="float" office:value="10.42" calcext:value-type="float">
            <text:p>10.42</text:p>
          </table:table-cell>
          <table:table-cell table:style-name="ce3" table:formula="of:=[.O18]+[.N19]" office:value-type="float" office:value="185.93" calcext:value-type="float">
            <text:p>185.93</text:p>
          </table:table-cell>
          <table:table-cell table:style-name="ce3" office:value-type="float" office:value="1473.33" calcext:value-type="float">
            <text:p>1473.33</text:p>
          </table:table-cell>
          <table:table-cell table:number-columns-repeated="12"/>
        </table:table-row>
        <table:table-row table:style-name="ro1">
          <table:table-cell table:style-name="ce1" table:formula="of:=[.A19]+20.51" office:value-type="float" office:value="306.7" calcext:value-type="float">
            <text:p>306.7</text:p>
          </table:table-cell>
          <table:table-cell table:style-name="ce4" office:value-type="float" office:value="1599.7" calcext:value-type="float">
            <text:p>1599.70</text:p>
          </table:table-cell>
          <table:table-cell office:value-type="string" calcext:value-type="string">
            <text:p>ACCENDO RESISTENZA</text:p>
          </table:table-cell>
          <table:table-cell table:number-columns-repeated="10"/>
          <table:table-cell office:value-type="float" office:value="10.45" calcext:value-type="float">
            <text:p>10.45</text:p>
          </table:table-cell>
          <table:table-cell table:style-name="ce3" table:formula="of:=[.O19]+[.N20]" office:value-type="float" office:value="196.38" calcext:value-type="float">
            <text:p>196.38</text:p>
          </table:table-cell>
          <table:table-cell table:style-name="ce3" office:value-type="float" office:value="1472.83" calcext:value-type="float">
            <text:p>1472.83</text:p>
          </table:table-cell>
          <table:table-cell table:number-columns-repeated="12"/>
        </table:table-row>
        <table:table-row table:style-name="ro1">
          <table:table-cell table:formula="of:=[.A20]+48.4+10.38" office:value-type="float" office:value="365.48" calcext:value-type="float">
            <text:p>365.48</text:p>
          </table:table-cell>
          <table:table-cell table:style-name="ce3" office:value-type="float" office:value="1598.7" calcext:value-type="float">
            <text:p>1598.70</text:p>
          </table:table-cell>
          <table:table-cell table:number-columns-repeated="11"/>
          <table:table-cell office:value-type="float" office:value="10.44" calcext:value-type="float">
            <text:p>10.44</text:p>
          </table:table-cell>
          <table:table-cell table:style-name="ce3" table:formula="of:=[.O20]+[.N21]" office:value-type="float" office:value="206.82" calcext:value-type="float">
            <text:p>206.82</text:p>
          </table:table-cell>
          <table:table-cell table:style-name="ce3" office:value-type="float" office:value="1472.38" calcext:value-type="float">
            <text:p>1472.38</text:p>
          </table:table-cell>
          <table:table-cell table:number-columns-repeated="12"/>
        </table:table-row>
        <table:table-row table:style-name="ro1">
          <table:table-cell table:formula="of:=[.A21]+10.38" office:value-type="float" office:value="375.86" calcext:value-type="float">
            <text:p>375.86</text:p>
          </table:table-cell>
          <table:table-cell table:style-name="ce3" office:value-type="float" office:value="1598.3" calcext:value-type="float">
            <text:p>1598.30</text:p>
          </table:table-cell>
          <table:table-cell table:number-columns-repeated="11"/>
          <table:table-cell office:value-type="float" office:value="10.16" calcext:value-type="float">
            <text:p>10.16</text:p>
          </table:table-cell>
          <table:table-cell table:style-name="ce3" table:formula="of:=[.O21]+[.N22]" office:value-type="float" office:value="216.98" calcext:value-type="float">
            <text:p>216.98</text:p>
          </table:table-cell>
          <table:table-cell table:style-name="ce3" office:value-type="float" office:value="1471.91" calcext:value-type="float">
            <text:p>1471.91</text:p>
          </table:table-cell>
          <table:table-cell table:number-columns-repeated="9"/>
          <table:table-cell office:value-type="float" office:value="172.82" calcext:value-type="float">
            <text:p>172.82</text:p>
          </table:table-cell>
          <table:table-cell office:value-type="float" office:value="1470" calcext:value-type="float">
            <text:p>1470</text:p>
          </table:table-cell>
          <table:table-cell/>
        </table:table-row>
        <table:table-row table:style-name="ro1">
          <table:table-cell table:formula="of:=[.A22]+10.34" office:value-type="float" office:value="386.2" calcext:value-type="float">
            <text:p>386.2</text:p>
          </table:table-cell>
          <table:table-cell table:style-name="ce3" office:value-type="float" office:value="1597.5" calcext:value-type="float">
            <text:p>1597.50</text:p>
          </table:table-cell>
          <table:table-cell/>
          <table:table-cell office:value-type="string" calcext:value-type="string">
            <text:p>RISULTATO</text:p>
          </table:table-cell>
          <table:table-cell table:formula="of:=([.E16]*[.E17]*[.E3])/[.E15]" office:value-type="float" office:value="235.387430416606" calcext:value-type="float">
            <text:p>235.387430416606</text:p>
          </table:table-cell>
          <table:table-cell table:number-columns-repeated="8"/>
          <table:table-cell office:value-type="float" office:value="10.59" calcext:value-type="float">
            <text:p>10.59</text:p>
          </table:table-cell>
          <table:table-cell table:style-name="ce3" table:formula="of:=[.O22]+[.N23]" office:value-type="float" office:value="227.57" calcext:value-type="float">
            <text:p>227.57</text:p>
          </table:table-cell>
          <table:table-cell table:style-name="ce3" office:value-type="float" office:value="1471.33" calcext:value-type="float">
            <text:p>1471.33</text:p>
          </table:table-cell>
          <table:table-cell/>
          <table:table-cell office:value-type="string" calcext:value-type="string">
            <text:p>RISULTATO</text:p>
          </table:table-cell>
          <table:table-cell table:formula="of:=([.S16]*[.S17]*[.S3])/[.S15]" office:value-type="float" office:value="171.762353051882" calcext:value-type="float">
            <text:p>171.762353051882</text:p>
          </table:table-cell>
          <table:table-cell office:value-type="string" calcext:value-type="string">
            <text:p>+- 11.44</text:p>
          </table:table-cell>
          <table:table-cell table:number-columns-repeated="5"/>
          <table:table-cell office:value-type="float" office:value="172.82" calcext:value-type="float">
            <text:p>172.82</text:p>
          </table:table-cell>
          <table:table-cell office:value-type="float" office:value="1480" calcext:value-type="float">
            <text:p>1480</text:p>
          </table:table-cell>
          <table:table-cell/>
        </table:table-row>
        <table:table-row table:style-name="ro1">
          <table:table-cell table:formula="of:=[.A23]+10.64" office:value-type="float" office:value="396.84" calcext:value-type="float">
            <text:p>396.84</text:p>
          </table:table-cell>
          <table:table-cell table:style-name="ce3" office:value-type="float" office:value="1597" calcext:value-type="float">
            <text:p>1597.00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style-name="ce5" table:formula="of:=[.O23]+[.N24]" office:value-type="float" office:value="238.57" calcext:value-type="float">
            <text:p>238.57</text:p>
          </table:table-cell>
          <table:table-cell table:style-name="ce5" office:value-type="float" office:value="1470.8" calcext:value-type="float">
            <text:p>1470.80</text:p>
          </table:table-cell>
          <table:table-cell office:value-type="string" calcext:value-type="string">
            <text:p>SPENTO</text:p>
          </table:table-cell>
          <table:table-cell table:number-columns-repeated="11"/>
        </table:table-row>
        <table:table-row table:style-name="ro1">
          <table:table-cell table:formula="of:=[.A24]+9.98" office:value-type="float" office:value="406.82" calcext:value-type="float">
            <text:p>406.82</text:p>
          </table:table-cell>
          <table:table-cell table:style-name="ce3" office:value-type="float" office:value="1596.5" calcext:value-type="float">
            <text:p>1596.50</text:p>
          </table:table-cell>
          <table:table-cell table:number-columns-repeated="11"/>
          <table:table-cell office:value-type="float" office:value="20.43" calcext:value-type="float">
            <text:p>20.43</text:p>
          </table:table-cell>
          <table:table-cell table:style-name="ce3" table:formula="of:=[.O24]+[.N25]" office:value-type="float" office:value="259" calcext:value-type="float">
            <text:p>259.00</text:p>
          </table:table-cell>
          <table:table-cell table:style-name="ce3" office:value-type="float" office:value="1470.11" calcext:value-type="float">
            <text:p>1470.11</text:p>
          </table:table-cell>
          <table:table-cell table:number-columns-repeated="12"/>
        </table:table-row>
        <table:table-row table:style-name="ro1">
          <table:table-cell table:formula="of:=[.A25]+10.47" office:value-type="float" office:value="417.29" calcext:value-type="float">
            <text:p>417.29</text:p>
          </table:table-cell>
          <table:table-cell table:style-name="ce3" office:value-type="float" office:value="1596" calcext:value-type="float">
            <text:p>1596.00</text:p>
          </table:table-cell>
          <table:table-cell table:number-columns-repeated="11"/>
          <table:table-cell office:value-type="float" office:value="20.37" calcext:value-type="float">
            <text:p>20.37</text:p>
          </table:table-cell>
          <table:table-cell table:style-name="ce3" table:formula="of:=[.O25]+[.N26]" office:value-type="float" office:value="279.37" calcext:value-type="float">
            <text:p>279.37</text:p>
          </table:table-cell>
          <table:table-cell table:style-name="ce3" office:value-type="float" office:value="1469.93" calcext:value-type="float">
            <text:p>1469.93</text:p>
          </table:table-cell>
          <table:table-cell table:number-columns-repeated="12"/>
        </table:table-row>
        <table:table-row table:style-name="ro1">
          <table:table-cell table:formula="of:=[.A26]+10.24" office:value-type="float" office:value="427.53" calcext:value-type="float">
            <text:p>427.53</text:p>
          </table:table-cell>
          <table:table-cell table:style-name="ce3" office:value-type="float" office:value="1595.4" calcext:value-type="float">
            <text:p>1595.40</text:p>
          </table:table-cell>
          <table:table-cell table:number-columns-repeated="11"/>
          <table:table-cell office:value-type="float" office:value="20.64" calcext:value-type="float">
            <text:p>20.64</text:p>
          </table:table-cell>
          <table:table-cell table:style-name="ce3" table:formula="of:=[.O26]+[.N27]" office:value-type="float" office:value="300.01" calcext:value-type="float">
            <text:p>300.01</text:p>
          </table:table-cell>
          <table:table-cell table:style-name="ce3" office:value-type="float" office:value="1469.66" calcext:value-type="float">
            <text:p>1469.66</text:p>
          </table:table-cell>
          <table:table-cell table:number-columns-repeated="12"/>
        </table:table-row>
        <table:table-row table:style-name="ro1">
          <table:table-cell table:formula="of:=[.A27]+10.12" office:value-type="float" office:value="437.65" calcext:value-type="float">
            <text:p>437.65</text:p>
          </table:table-cell>
          <table:table-cell table:style-name="ce3" office:value-type="float" office:value="1594.25" calcext:value-type="float">
            <text:p>1594.25</text:p>
          </table:table-cell>
          <table:table-cell table:number-columns-repeated="11"/>
          <table:table-cell office:value-type="float" office:value="20.23" calcext:value-type="float">
            <text:p>20.23</text:p>
          </table:table-cell>
          <table:table-cell table:style-name="ce3" table:formula="of:=[.O27]+[.N28]" office:value-type="float" office:value="320.24" calcext:value-type="float">
            <text:p>320.24</text:p>
          </table:table-cell>
          <table:table-cell table:style-name="ce3" office:value-type="float" office:value="1469.4" calcext:value-type="float">
            <text:p>1469.40</text:p>
          </table:table-cell>
          <table:table-cell table:number-columns-repeated="12"/>
        </table:table-row>
        <table:table-row table:style-name="ro1">
          <table:table-cell table:formula="of:=[.A28]+18.66" office:value-type="float" office:value="456.31" calcext:value-type="float">
            <text:p>456.31</text:p>
          </table:table-cell>
          <table:table-cell table:style-name="ce3" office:value-type="float" office:value="1593.77" calcext:value-type="float">
            <text:p>1593.77</text:p>
          </table:table-cell>
          <table:table-cell table:number-columns-repeated="11"/>
          <table:table-cell office:value-type="float" office:value="20.43" calcext:value-type="float">
            <text:p>20.43</text:p>
          </table:table-cell>
          <table:table-cell table:style-name="ce3" table:formula="of:=[.O28]+[.N29]" office:value-type="float" office:value="340.67" calcext:value-type="float">
            <text:p>340.67</text:p>
          </table:table-cell>
          <table:table-cell table:style-name="ce3" office:value-type="float" office:value="1469.11" calcext:value-type="float">
            <text:p>1469.11</text:p>
          </table:table-cell>
          <table:table-cell table:number-columns-repeated="12"/>
        </table:table-row>
        <table:table-row table:style-name="ro1">
          <table:table-cell table:formula="of:=[.A29]+10.36" office:value-type="float" office:value="466.67" calcext:value-type="float">
            <text:p>466.67</text:p>
          </table:table-cell>
          <table:table-cell table:style-name="ce3" office:value-type="float" office:value="1593.12" calcext:value-type="float">
            <text:p>1593.12</text:p>
          </table:table-cell>
          <table:table-cell table:number-columns-repeated="11"/>
          <table:table-cell office:value-type="float" office:value="20.37" calcext:value-type="float">
            <text:p>20.37</text:p>
          </table:table-cell>
          <table:table-cell table:style-name="ce3" table:formula="of:=[.O29]+[.N30]" office:value-type="float" office:value="361.04" calcext:value-type="float">
            <text:p>361.04</text:p>
          </table:table-cell>
          <table:table-cell table:style-name="ce3" office:value-type="float" office:value="1468.81" calcext:value-type="float">
            <text:p>1468.81</text:p>
          </table:table-cell>
          <table:table-cell table:number-columns-repeated="12"/>
        </table:table-row>
        <table:table-row table:style-name="ro1">
          <table:table-cell table:formula="of:=[.A30]+10.46" office:value-type="float" office:value="477.13" calcext:value-type="float">
            <text:p>477.13</text:p>
          </table:table-cell>
          <table:table-cell table:style-name="ce3" office:value-type="float" office:value="1592.7" calcext:value-type="float">
            <text:p>1592.70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1]+10.3" office:value-type="float" office:value="487.43" calcext:value-type="float">
            <text:p>487.43</text:p>
          </table:table-cell>
          <table:table-cell table:style-name="ce3" office:value-type="float" office:value="1592.09" calcext:value-type="float">
            <text:p>1592.09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2]+10.32" office:value-type="float" office:value="497.75" calcext:value-type="float">
            <text:p>497.75</text:p>
          </table:table-cell>
          <table:table-cell table:style-name="ce3" office:value-type="float" office:value="1591.5" calcext:value-type="float">
            <text:p>1591.50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3]+10.24" office:value-type="float" office:value="507.99" calcext:value-type="float">
            <text:p>507.99</text:p>
          </table:table-cell>
          <table:table-cell table:style-name="ce3" office:value-type="float" office:value="1590.99" calcext:value-type="float">
            <text:p>1590.99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4]+10.57" office:value-type="float" office:value="518.56" calcext:value-type="float">
            <text:p>518.56</text:p>
          </table:table-cell>
          <table:table-cell table:style-name="ce3" office:value-type="float" office:value="1590.4" calcext:value-type="float">
            <text:p>1590.40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5]+10.42" office:value-type="float" office:value="528.98" calcext:value-type="float">
            <text:p>528.98</text:p>
          </table:table-cell>
          <table:table-cell table:style-name="ce3" office:value-type="float" office:value="1589.78" calcext:value-type="float">
            <text:p>1589.78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6]+10.92" office:value-type="float" office:value="539.9" calcext:value-type="float">
            <text:p>539.9</text:p>
          </table:table-cell>
          <table:table-cell table:style-name="ce3" office:value-type="float" office:value="1589.3" calcext:value-type="float">
            <text:p>1589.30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7]+10.38" office:value-type="float" office:value="550.28" calcext:value-type="float">
            <text:p>550.28</text:p>
          </table:table-cell>
          <table:table-cell table:style-name="ce3" office:value-type="float" office:value="1588.8" calcext:value-type="float">
            <text:p>1588.80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8]+10.58" office:value-type="float" office:value="560.86" calcext:value-type="float">
            <text:p>560.86</text:p>
          </table:table-cell>
          <table:table-cell table:style-name="ce3" office:value-type="float" office:value="1588.27" calcext:value-type="float">
            <text:p>1588.27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9]+11.1" office:value-type="float" office:value="571.96" calcext:value-type="float">
            <text:p>571.96</text:p>
          </table:table-cell>
          <table:table-cell table:style-name="ce3" office:value-type="float" office:value="1587.62" calcext:value-type="float">
            <text:p>1587.62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10.31+[.A40]" office:value-type="float" office:value="582.27" calcext:value-type="float">
            <text:p>582.27</text:p>
          </table:table-cell>
          <table:table-cell table:style-name="ce3" office:value-type="float" office:value="1587.08" calcext:value-type="float">
            <text:p>1587.08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41]+10.38" office:value-type="float" office:value="592.65" calcext:value-type="float">
            <text:p>592.65</text:p>
          </table:table-cell>
          <table:table-cell table:style-name="ce3" office:value-type="float" office:value="1586.59" calcext:value-type="float">
            <text:p>1586.59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style-name="ce2" table:formula="of:=[.A42]+10.38" office:value-type="float" office:value="603.03" calcext:value-type="float">
            <text:p>603.03</text:p>
          </table:table-cell>
          <table:table-cell table:style-name="ce5" office:value-type="float" office:value="1585.98" calcext:value-type="float">
            <text:p>1585.98</text:p>
          </table:table-cell>
          <table:table-cell office:value-type="string" calcext:value-type="string">
            <text:p>SPENTO RESISTENZA</text:p>
          </table:table-cell>
          <table:table-cell/>
          <table:table-cell office:value-type="string" calcext:value-type="string">
            <text:p>Tempo traslato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3]+20.37" office:value-type="float" office:value="623.4" calcext:value-type="float">
            <text:p>623.4</text:p>
          </table:table-cell>
          <table:table-cell table:style-name="ce3" office:value-type="float" office:value="1585.16" calcext:value-type="float">
            <text:p>1585.16</text:p>
          </table:table-cell>
          <table:table-cell table:number-columns-repeated="2"/>
          <table:table-cell table:formula="of:=[.A44]-[.$E$4]" office:value-type="float" office:value="168.535" calcext:value-type="float">
            <text:p>168.53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4]+20.45" office:value-type="float" office:value="643.85" calcext:value-type="float">
            <text:p>643.85</text:p>
          </table:table-cell>
          <table:table-cell table:style-name="ce3" office:value-type="float" office:value="1584.9" calcext:value-type="float">
            <text:p>1584.90</text:p>
          </table:table-cell>
          <table:table-cell table:number-columns-repeated="2"/>
          <table:table-cell table:formula="of:=[.A45]-[.$E$4]" office:value-type="float" office:value="188.985" calcext:value-type="float">
            <text:p>188.98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5]+20.36" office:value-type="float" office:value="664.21" calcext:value-type="float">
            <text:p>664.21</text:p>
          </table:table-cell>
          <table:table-cell table:style-name="ce3" office:value-type="float" office:value="1584.7" calcext:value-type="float">
            <text:p>1584.70</text:p>
          </table:table-cell>
          <table:table-cell table:number-columns-repeated="2"/>
          <table:table-cell table:formula="of:=[.A46]-[.$E$4]" office:value-type="float" office:value="209.345" calcext:value-type="float">
            <text:p>209.34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6]+20.49" office:value-type="float" office:value="684.7" calcext:value-type="float">
            <text:p>684.7</text:p>
          </table:table-cell>
          <table:table-cell table:style-name="ce3" office:value-type="float" office:value="1584.4" calcext:value-type="float">
            <text:p>1584.40</text:p>
          </table:table-cell>
          <table:table-cell table:number-columns-repeated="2"/>
          <table:table-cell table:formula="of:=[.A47]-[.$E$4]" office:value-type="float" office:value="229.835" calcext:value-type="float">
            <text:p>229.83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7]+20.36" office:value-type="float" office:value="705.06" calcext:value-type="float">
            <text:p>705.06</text:p>
          </table:table-cell>
          <table:table-cell table:style-name="ce3" office:value-type="float" office:value="1584.94" calcext:value-type="float">
            <text:p>1584.94</text:p>
          </table:table-cell>
          <table:table-cell table:number-columns-repeated="2"/>
          <table:table-cell table:formula="of:=[.A48]-[.$E$4]" office:value-type="float" office:value="250.195" calcext:value-type="float">
            <text:p>250.19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8]+20.73" office:value-type="float" office:value="725.79" calcext:value-type="float">
            <text:p>725.79</text:p>
          </table:table-cell>
          <table:table-cell table:style-name="ce3" office:value-type="float" office:value="1584.45" calcext:value-type="float">
            <text:p>1584.45</text:p>
          </table:table-cell>
          <table:table-cell table:number-columns-repeated="2"/>
          <table:table-cell table:formula="of:=[.A49]-[.$E$4]" office:value-type="float" office:value="270.925" calcext:value-type="float">
            <text:p>270.92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9]+20.24" office:value-type="float" office:value="746.03" calcext:value-type="float">
            <text:p>746.03</text:p>
          </table:table-cell>
          <table:table-cell table:style-name="ce3" office:value-type="float" office:value="1584.02" calcext:value-type="float">
            <text:p>1584.02</text:p>
          </table:table-cell>
          <table:table-cell table:number-columns-repeated="2"/>
          <table:table-cell table:formula="of:=[.A50]-[.$E$4]" office:value-type="float" office:value="291.165" calcext:value-type="float">
            <text:p>291.16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0]+20.45" office:value-type="float" office:value="766.48" calcext:value-type="float">
            <text:p>766.48</text:p>
          </table:table-cell>
          <table:table-cell table:style-name="ce3" office:value-type="float" office:value="1583.63" calcext:value-type="float">
            <text:p>1583.63</text:p>
          </table:table-cell>
          <table:table-cell table:number-columns-repeated="2"/>
          <table:table-cell table:formula="of:=[.A51]-[.$E$4]" office:value-type="float" office:value="311.615" calcext:value-type="float">
            <text:p>311.61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1]+20.76" office:value-type="float" office:value="787.24" calcext:value-type="float">
            <text:p>787.24</text:p>
          </table:table-cell>
          <table:table-cell table:style-name="ce3" office:value-type="float" office:value="1583.25" calcext:value-type="float">
            <text:p>1583.25</text:p>
          </table:table-cell>
          <table:table-cell table:number-columns-repeated="2"/>
          <table:table-cell table:formula="of:=[.A52]-[.$E$4]" office:value-type="float" office:value="332.375" calcext:value-type="float">
            <text:p>332.37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2]+20.5" office:value-type="float" office:value="807.74" calcext:value-type="float">
            <text:p>807.74</text:p>
          </table:table-cell>
          <table:table-cell table:style-name="ce3" office:value-type="float" office:value="1582.8" calcext:value-type="float">
            <text:p>1582.80</text:p>
          </table:table-cell>
          <table:table-cell table:number-columns-repeated="2"/>
          <table:table-cell table:formula="of:=[.A53]-[.$E$4]" office:value-type="float" office:value="352.875" calcext:value-type="float">
            <text:p>352.87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3]+20.41" office:value-type="float" office:value="828.15" calcext:value-type="float">
            <text:p>828.15</text:p>
          </table:table-cell>
          <table:table-cell table:style-name="ce3" office:value-type="float" office:value="1582.4" calcext:value-type="float">
            <text:p>1582.40</text:p>
          </table:table-cell>
          <table:table-cell table:number-columns-repeated="2"/>
          <table:table-cell table:formula="of:=[.A54]-[.$E$4]" office:value-type="float" office:value="373.285" calcext:value-type="float">
            <text:p>373.28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4]+20.21" office:value-type="float" office:value="848.36" calcext:value-type="float">
            <text:p>848.36</text:p>
          </table:table-cell>
          <table:table-cell table:style-name="ce3" office:value-type="float" office:value="1582.96" calcext:value-type="float">
            <text:p>1582.96</text:p>
          </table:table-cell>
          <table:table-cell table:number-columns-repeated="2"/>
          <table:table-cell table:formula="of:=[.A55]-[.$E$4]" office:value-type="float" office:value="393.495" calcext:value-type="float">
            <text:p>393.49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5]+20.42" office:value-type="float" office:value="868.78" calcext:value-type="float">
            <text:p>868.78</text:p>
          </table:table-cell>
          <table:table-cell table:style-name="ce3" office:value-type="float" office:value="1581.55" calcext:value-type="float">
            <text:p>1581.55</text:p>
          </table:table-cell>
          <table:table-cell table:number-columns-repeated="2"/>
          <table:table-cell table:formula="of:=[.A56]-[.$E$4]" office:value-type="float" office:value="413.915" calcext:value-type="float">
            <text:p>413.91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6]+20.43" office:value-type="float" office:value="889.21" calcext:value-type="float">
            <text:p>889.21</text:p>
          </table:table-cell>
          <table:table-cell office:value-type="float" office:value="1581.13" calcext:value-type="float">
            <text:p>1581.13</text:p>
          </table:table-cell>
          <table:table-cell table:number-columns-repeated="2"/>
          <table:table-cell table:formula="of:=[.A57]-[.$E$4]" office:value-type="float" office:value="434.345" calcext:value-type="float">
            <text:p>434.34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 table:number-rows-repeated="4">
          <table:table-cell table:number-columns-repeated="15"/>
          <table:table-cell table:style-name="ce3"/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8"/>
          <table:table-cell office:value-type="float" office:value="454.87" calcext:value-type="float">
            <text:p>454.87</text:p>
          </table:table-cell>
          <table:table-cell office:value-type="float" office:value="1585" calcext:value-type="float">
            <text:p>1585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float" office:value="454.87" calcext:value-type="float">
            <text:p>454.87</text:p>
          </table:table-cell>
          <table:table-cell office:value-type="float" office:value="1600" calcext:value-type="float">
            <text:p>1600</text:p>
          </table:table-cell>
          <table:table-cell table:number-columns-repeated="18"/>
        </table:table-row>
        <table:table-row table:style-name="ro1" table:number-rows-repeated="19">
          <table:table-cell table:number-columns-repeated="28"/>
        </table:table-row>
        <table:table-row table:style-name="ro1">
          <table:table-cell/>
          <table:table-cell office:value-type="string" calcext:value-type="string">
            <text:p>TABELLA GRAFITE PRIMA VOLTA</text:p>
          </table:table-cell>
          <table:table-cell table:number-columns-repeated="2"/>
          <table:table-cell office:value-type="string" calcext:value-type="string">
            <text:p>massa_grafite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T_amb</text:p>
          </table:table-cell>
          <table:table-cell office:value-type="float" office:value="295" calcext:value-type="float">
            <text:p>295</text:p>
          </table:table-cell>
          <table:table-cell table:number-columns-repeated="10"/>
          <table:table-cell office:value-type="string" calcext:value-type="string">
            <text:p>TABELLA GRAFITE SECONDA VOLTA</text:p>
          </table:table-cell>
          <table:table-cell table:number-columns-repeated="3"/>
          <table:table-cell office:value-type="string" calcext:value-type="string">
            <text:p>massa_grafite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T_amb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/>
          <table:table-cell office:value-type="string" calcext:value-type="string">
            <text:p>calore_latente_azoto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11"/>
          <table:table-cell table:number-columns-spanned="2" table:number-rows-spanned="1"/>
          <table:covered-table-cell/>
          <table:table-cell/>
          <table:table-cell office:value-type="string" calcext:value-type="string">
            <text:p>calore_latente_azoto</text:p>
          </table:table-cell>
          <table:table-cell table:formula="of:=172" office:value-type="float" office:value="172" calcext:value-type="float">
            <text:p>172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<text:s/>MASSA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12.01" calcext:value-type="float">
            <text:p>12.01</text:p>
          </table:table-cell>
          <table:table-cell table:number-columns-repeated="11"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12.01" calcext:value-type="float">
            <text:p>12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1555.56" calcext:value-type="float">
            <text:p>1555.56</text:p>
          </table:table-cell>
          <table:table-cell/>
          <table:table-cell office:value-type="string" calcext:value-type="string">
            <text:p>t_start</text:p>
          </table:table-cell>
          <table:table-cell table:formula="of:=[.B103]" office:value-type="float" office:value="320.55" calcext:value-type="float">
            <text:p>320.55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467.88" calcext:value-type="float">
            <text:p>1467.88</text:p>
          </table:table-cell>
          <table:table-cell/>
          <table:table-cell office:value-type="string" calcext:value-type="string">
            <text:p>t_start</text:p>
          </table:table-cell>
          <table:table-cell table:formula="of:=[.T94]" office:value-type="float" office:value="140.12" calcext:value-type="float">
            <text:p>140.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91" calcext:value-type="float">
            <text:p>19.91</text:p>
          </table:table-cell>
          <table:table-cell table:style-name="ce3" office:value-type="float" office:value="1555.34" calcext:value-type="float">
            <text:p>1555.34</text:p>
          </table:table-cell>
          <table:table-cell/>
          <table:table-cell office:value-type="string" calcext:value-type="string">
            <text:p>t_stop</text:p>
          </table:table-cell>
          <table:table-cell table:formula="of:=[.B104]" office:value-type="float" office:value="390.6" calcext:value-type="float">
            <text:p>390.6</text:p>
          </table:table-cell>
          <table:table-cell table:number-columns-repeated="2"/>
          <table:table-cell office:value-type="string" calcext:value-type="string">
            <text:p>ERRORE MASSA</text:p>
          </table:table-cell>
          <table:table-cell table:number-columns-repeated="9"/>
          <table:table-cell office:value-type="float" office:value="20.32" calcext:value-type="float">
            <text:p>20.32</text:p>
          </table:table-cell>
          <table:table-cell table:formula="of:=[.T87]+[.S88]" office:value-type="float" office:value="20.32" calcext:value-type="float">
            <text:p>20.32</text:p>
          </table:table-cell>
          <table:table-cell office:value-type="float" office:value="1467.62" calcext:value-type="float">
            <text:p>1467.62</text:p>
          </table:table-cell>
          <table:table-cell/>
          <table:table-cell office:value-type="string" calcext:value-type="string">
            <text:p>t_stop</text:p>
          </table:table-cell>
          <table:table-cell table:formula="of:=[.T99]" office:value-type="float" office:value="165.28" calcext:value-type="float">
            <text:p>165.28</text:p>
          </table:table-cell>
          <table:table-cell table:number-columns-repeated="2"/>
          <table:table-cell office:value-type="string" calcext:value-type="string">
            <text:p>ERRORE MASSA</text:p>
          </table:table-cell>
          <table:table-cell/>
        </table:table-row>
        <table:table-row table:style-name="ro1">
          <table:table-cell/>
          <table:table-cell table:formula="of:=[.B88]+20.16" office:value-type="float" office:value="40.07" calcext:value-type="float">
            <text:p>40.07</text:p>
          </table:table-cell>
          <table:table-cell table:style-name="ce3" office:value-type="float" office:value="1555.01" calcext:value-type="float">
            <text:p>1555.01</text:p>
          </table:table-cell>
          <table:table-cell/>
          <table:table-cell office:value-type="string" calcext:value-type="string">
            <text:p>dt</text:p>
          </table:table-cell>
          <table:table-cell table:formula="of:=[.F88]-[.F87]" office:value-type="float" office:value="70.05" calcext:value-type="float">
            <text:p>70.05</text:p>
          </table:table-cell>
          <table:table-cell/>
          <table:table-cell office:value-type="string" calcext:value-type="string">
            <text:p>parte I</text:p>
          </table:table-cell>
          <table:table-cell table:number-matrix-columns-spanned="2" table:number-matrix-rows-spanned="2" table:formula="of:=LINEST([.C87:.C101];[.B87:.B101];1;1)" office:value-type="float" office:value="-0.0149177536658614" calcext:value-type="float">
            <text:p>-0.0149177536658614</text:p>
          </table:table-cell>
          <table:table-cell office:value-type="float" office:value="1555.6551299072" calcext:value-type="float">
            <text:p>1555.6551299072</text:p>
          </table:table-cell>
          <table:table-cell table:number-columns-repeated="8"/>
          <table:table-cell office:value-type="float" office:value="20.14" calcext:value-type="float">
            <text:p>20.14</text:p>
          </table:table-cell>
          <table:table-cell table:formula="of:=[.T88]+[.S89]" office:value-type="float" office:value="40.46" calcext:value-type="float">
            <text:p>40.46</text:p>
          </table:table-cell>
          <table:table-cell office:value-type="float" office:value="1467.37" calcext:value-type="float">
            <text:p>1467.37</text:p>
          </table:table-cell>
          <table:table-cell/>
          <table:table-cell office:value-type="string" calcext:value-type="string">
            <text:p>dt</text:p>
          </table:table-cell>
          <table:table-cell table:formula="of:=[.X88]-[.X87]" office:value-type="float" office:value="25.16" calcext:value-type="float">
            <text:p>25.16</text:p>
          </table:table-cell>
          <table:table-cell/>
          <table:table-cell office:value-type="string" calcext:value-type="string">
            <text:p>parte I</text:p>
          </table:table-cell>
          <table:table-cell table:number-matrix-columns-spanned="2" table:number-matrix-rows-spanned="2" table:formula="of:=LINEST([.U87:.U93];[.T87:.T93];1;1)" office:value-type="float" office:value="-0.0130605349539274" calcext:value-type="float">
            <text:p>-0.0130605349539274</text:p>
          </table:table-cell>
          <table:table-cell office:value-type="float" office:value="1467.88530073838" calcext:value-type="float">
            <text:p>1467.88530073838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table:formula="of:=[.B89]+[.A90]" office:value-type="float" office:value="60.23" calcext:value-type="float">
            <text:p>60.23</text:p>
          </table:table-cell>
          <table:table-cell table:style-name="ce3" office:value-type="float" office:value="1554.4" calcext:value-type="float">
            <text:p>1554.40</text:p>
          </table:table-cell>
          <table:table-cell/>
          <table:table-cell office:value-type="string" calcext:value-type="string">
            <text:p>t_medio</text:p>
          </table:table-cell>
          <table:table-cell table:formula="of:=([.F87]+[.F88])/2" office:value-type="float" office:value="355.575" calcext:value-type="float">
            <text:p>355.575</text:p>
          </table:table-cell>
          <table:table-cell table:number-columns-repeated="2"/>
          <table:table-cell office:value-type="float" office:value="0.000435182193664168" calcext:value-type="float">
            <text:p>0.000435182193664168</text:p>
          </table:table-cell>
          <table:table-cell office:value-type="float" office:value="0.0717434748017157" calcext:value-type="float">
            <text:p>0.0717434748017157</text:p>
          </table:table-cell>
          <table:table-cell table:number-columns-repeated="8"/>
          <table:table-cell table:formula="of:=0.35+19.32" office:value-type="float" office:value="19.67" calcext:value-type="float">
            <text:p>19.67</text:p>
          </table:table-cell>
          <table:table-cell table:formula="of:=[.T89]+[.S90]" office:value-type="float" office:value="60.13" calcext:value-type="float">
            <text:p>60.13</text:p>
          </table:table-cell>
          <table:table-cell office:value-type="float" office:value="1467.09" calcext:value-type="float">
            <text:p>1467.09</text:p>
          </table:table-cell>
          <table:table-cell/>
          <table:table-cell office:value-type="string" calcext:value-type="string">
            <text:p>t_medio</text:p>
          </table:table-cell>
          <table:table-cell table:formula="of:=([.X87]+[.X88])/2" office:value-type="float" office:value="152.7" calcext:value-type="float">
            <text:p>152.7</text:p>
          </table:table-cell>
          <table:table-cell table:number-columns-repeated="2"/>
          <table:table-cell office:value-type="float" office:value="0.000200536484869629" calcext:value-type="float">
            <text:p>0.000200536484869629</text:p>
          </table:table-cell>
          <table:table-cell office:value-type="float" office:value="0.0145041550274318" calcext:value-type="float">
            <text:p>0.0145041550274318</text:p>
          </table:table-cell>
        </table:table-row>
        <table:table-row table:style-name="ro1">
          <table:table-cell office:value-type="float" office:value="20.21" calcext:value-type="float">
            <text:p>20.21</text:p>
          </table:table-cell>
          <table:table-cell table:formula="of:=[.B90]+[.A91]" office:value-type="float" office:value="80.44" calcext:value-type="float">
            <text:p>80.44</text:p>
          </table:table-cell>
          <table:table-cell table:style-name="ce3" office:value-type="float" office:value="1554.63" calcext:value-type="float">
            <text:p>1554.63</text:p>
          </table:table-cell>
          <table:table-cell table:number-columns-repeated="4"/>
          <table:table-cell office:value-type="string" calcext:value-type="string">
            <text:p>errmI</text:p>
          </table:table-cell>
          <table:table-cell table:formula="of:=[.F90]*[.I90]+[.J90]" office:value-type="float" office:value="0.226483383313852" calcext:value-type="float">
            <text:p>0.226483383313852</text:p>
          </table:table-cell>
          <table:table-cell table:number-columns-repeated="9"/>
          <table:table-cell office:value-type="float" office:value="20.06" calcext:value-type="float">
            <text:p>20.06</text:p>
          </table:table-cell>
          <table:table-cell table:formula="of:=[.T90]+[.S91]" office:value-type="float" office:value="80.19" calcext:value-type="float">
            <text:p>80.19</text:p>
          </table:table-cell>
          <table:table-cell office:value-type="float" office:value="1466.86" calcext:value-type="float">
            <text:p>1466.86</text:p>
          </table:table-cell>
          <table:table-cell table:number-columns-repeated="4"/>
          <table:table-cell office:value-type="string" calcext:value-type="string">
            <text:p>errmI</text:p>
          </table:table-cell>
          <table:table-cell table:formula="of:=[.X90]*[.AA90]+[.AB90]" office:value-type="float" office:value="0.0451260762670241" calcext:value-type="float">
            <text:p>0.0451260762670241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table:formula="of:=[.B91]+[.A92]" office:value-type="float" office:value="100.14" calcext:value-type="float">
            <text:p>100.14</text:p>
          </table:table-cell>
          <table:table-cell table:style-name="ce3" office:value-type="float" office:value="1554.35" calcext:value-type="float">
            <text:p>1554.35</text:p>
          </table:table-cell>
          <table:table-cell/>
          <table:table-cell office:value-type="string" calcext:value-type="string">
            <text:p>PENDENZA1</text:p>
          </table:table-cell>
          <table:table-cell table:formula="of:=SLOPE([.C87:.C102];[.B87:.B102])" office:value-type="float" office:value="-0.0150871894978227" calcext:value-type="float">
            <text:p>-0.0150871894978227</text:p>
          </table:table-cell>
          <table:table-cell table:number-columns-repeated="12"/>
          <table:table-cell office:value-type="float" office:value="20.12" calcext:value-type="float">
            <text:p>20.12</text:p>
          </table:table-cell>
          <table:table-cell table:formula="of:=[.T91]+[.S92]" office:value-type="float" office:value="100.31" calcext:value-type="float">
            <text:p>100.31</text:p>
          </table:table-cell>
          <table:table-cell office:value-type="float" office:value="1466.54" calcext:value-type="float">
            <text:p>1466.54</text:p>
          </table:table-cell>
          <table:table-cell/>
          <table:table-cell office:value-type="string" calcext:value-type="string">
            <text:p>PENDENZA1</text:p>
          </table:table-cell>
          <table:table-cell table:formula="of:=SLOPE([.U87:.U93];[.T87:.T93])" office:value-type="float" office:value="-0.0130605349539274" calcext:value-type="float">
            <text:p>-0.0130605349539274</text:p>
          </table:table-cell>
          <table:table-cell table:number-columns-repeated="4"/>
        </table:table-row>
        <table:table-row table:style-name="ro1">
          <table:table-cell office:value-type="float" office:value="20.3" calcext:value-type="float">
            <text:p>20.3</text:p>
          </table:table-cell>
          <table:table-cell table:formula="of:=[.B92]+[.A93]" office:value-type="float" office:value="120.44" calcext:value-type="float">
            <text:p>120.44</text:p>
          </table:table-cell>
          <table:table-cell table:style-name="ce3" office:value-type="float" office:value="1554.01" calcext:value-type="float">
            <text:p>1554.01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C87:.C102];[.B87:.B102])" office:value-type="float" office:value="1555.67097474835" calcext:value-type="float">
            <text:p>1555.67097474835</text:p>
          </table:table-cell>
          <table:table-cell/>
          <table:table-cell office:value-type="string" calcext:value-type="string">
            <text:p>parte III</text:p>
          </table:table-cell>
          <table:table-cell table:number-matrix-columns-spanned="2" table:number-matrix-rows-spanned="2" table:formula="of:=LINEST([.C107:.C121];[.B107:.B121];1;1)" office:value-type="float" office:value="-0.0149897231882692" calcext:value-type="float">
            <text:p>-0.0149897231882692</text:p>
          </table:table-cell>
          <table:table-cell office:value-type="float" office:value="1546.3068332149" calcext:value-type="float">
            <text:p>1546.3068332149</text:p>
          </table:table-cell>
          <table:table-cell table:number-columns-repeated="8"/>
          <table:table-cell office:value-type="float" office:value="19.94" calcext:value-type="float">
            <text:p>19.94</text:p>
          </table:table-cell>
          <table:table-cell table:formula="of:=[.T92]+[.S93]" office:value-type="float" office:value="120.25" calcext:value-type="float">
            <text:p>120.25</text:p>
          </table:table-cell>
          <table:table-cell office:value-type="float" office:value="1466.33" calcext:value-type="float">
            <text:p>1466.33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U87:.U93];[.T87:.T93])" office:value-type="float" office:value="1467.88530073838" calcext:value-type="float">
            <text:p>1467.88530073838</text:p>
          </table:table-cell>
          <table:table-cell/>
          <table:table-cell office:value-type="string" calcext:value-type="string">
            <text:p>parte III</text:p>
          </table:table-cell>
          <table:table-cell table:number-matrix-columns-spanned="2" table:number-matrix-rows-spanned="2" table:formula="of:=LINEST([.U100:.U117];[.T100:.T117];1;1)" office:value-type="float" office:value="-0.0106935144115225" calcext:value-type="float">
            <text:p>-0.0106935144115225</text:p>
          </table:table-cell>
          <table:table-cell office:value-type="float" office:value="1458.84189029066" calcext:value-type="float">
            <text:p>1458.841890290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93]+[.A94]" office:value-type="float" office:value="140.44" calcext:value-type="float">
            <text:p>140.44</text:p>
          </table:table-cell>
          <table:table-cell table:style-name="ce3" office:value-type="float" office:value="1553.68" calcext:value-type="float">
            <text:p>1553.68</text:p>
          </table:table-cell>
          <table:table-cell table:number-columns-repeated="5"/>
          <table:table-cell office:value-type="float" office:value="0.000183530607318207" calcext:value-type="float">
            <text:p>0.000183530607318207</text:p>
          </table:table-cell>
          <table:table-cell office:value-type="float" office:value="0.0903584665269323" calcext:value-type="float">
            <text:p>0.0903584665269323</text:p>
          </table:table-cell>
          <table:table-cell table:number-columns-repeated="8"/>
          <table:table-cell table:style-name="ce8" office:value-type="float" office:value="19.87" calcext:value-type="float">
            <text:p>19.87</text:p>
          </table:table-cell>
          <table:table-cell table:style-name="ce8" table:formula="of:=[.T93]+[.S94]" office:value-type="float" office:value="140.12" calcext:value-type="float">
            <text:p>140.12</text:p>
          </table:table-cell>
          <table:table-cell table:style-name="ce8" office:value-type="float" office:value="1460.41" calcext:value-type="float">
            <text:p>1460.41</text:p>
          </table:table-cell>
          <table:table-cell office:value-type="string" calcext:value-type="string">
            <text:p>IMMERSO</text:p>
          </table:table-cell>
          <table:table-cell table:number-columns-repeated="4"/>
          <table:table-cell office:value-type="float" office:value="0.000353490125418713" calcext:value-type="float">
            <text:p>0.000353490125418713</text:p>
          </table:table-cell>
          <table:table-cell office:value-type="float" office:value="0.0952826195777857" calcext:value-type="float">
            <text:p>0.09528261957778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94]+[.A95]" office:value-type="float" office:value="160.44" calcext:value-type="float">
            <text:p>160.44</text:p>
          </table:table-cell>
          <table:table-cell table:style-name="ce3" office:value-type="float" office:value="1553.35" calcext:value-type="float">
            <text:p>1553.35</text:p>
          </table:table-cell>
          <table:table-cell/>
          <table:table-cell office:value-type="string" calcext:value-type="string">
            <text:p>PENDENZA3</text:p>
          </table:table-cell>
          <table:table-cell table:formula="of:=SLOPE([.C105:.C144];[.B105:.B144])" office:value-type="float" office:value="-0.0165799547471474" calcext:value-type="float">
            <text:p>-0.0165799547471474</text:p>
          </table:table-cell>
          <table:table-cell/>
          <table:table-cell office:value-type="string" calcext:value-type="string">
            <text:p>errmIII</text:p>
          </table:table-cell>
          <table:table-cell table:formula="of:=[.F90]*[.I94]+[.J94]" office:value-type="float" office:value="0.155617362224104" calcext:value-type="float">
            <text:p>0.155617362224104</text:p>
          </table:table-cell>
          <table:table-cell table:number-columns-repeated="9"/>
          <table:table-cell office:value-type="float" office:value="5.24" calcext:value-type="float">
            <text:p>5.24</text:p>
          </table:table-cell>
          <table:table-cell table:formula="of:=[.T94]+[.S95]" office:value-type="float" office:value="145.36" calcext:value-type="float">
            <text:p>145.36</text:p>
          </table:table-cell>
          <table:table-cell office:value-type="float" office:value="1458.22" calcext:value-type="float">
            <text:p>1458.22</text:p>
          </table:table-cell>
          <table:table-cell/>
          <table:table-cell office:value-type="string" calcext:value-type="string">
            <text:p>PENDENZA3</text:p>
          </table:table-cell>
          <table:table-cell table:formula="of:=SLOPE([.U100:.U117];[.T100:.T117])" office:value-type="float" office:value="-0.0106935144115225" calcext:value-type="float">
            <text:p>-0.0106935144115225</text:p>
          </table:table-cell>
          <table:table-cell/>
          <table:table-cell office:value-type="string" calcext:value-type="string">
            <text:p>errmIII</text:p>
          </table:table-cell>
          <table:table-cell table:formula="of:=[.X90]*[.AA94]+[.AB94]" office:value-type="float" office:value="0.149260561729223" calcext:value-type="float">
            <text:p>0.149260561729223</text:p>
          </table:table-cell>
          <table:table-cell/>
        </table:table-row>
        <table:table-row table:style-name="ro1">
          <table:table-cell office:value-type="float" office:value="19.99" calcext:value-type="float">
            <text:p>19.99</text:p>
          </table:table-cell>
          <table:table-cell table:formula="of:=[.B95]+[.A96]" office:value-type="float" office:value="180.43" calcext:value-type="float">
            <text:p>180.43</text:p>
          </table:table-cell>
          <table:table-cell table:style-name="ce3" office:value-type="float" office:value="1553.02" calcext:value-type="float">
            <text:p>1553.02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C105:.C144];[.B105:.B144])" office:value-type="float" office:value="1547.08647291981" calcext:value-type="float">
            <text:p>1547.08647291981</text:p>
          </table:table-cell>
          <table:table-cell table:number-columns-repeated="12"/>
          <table:table-cell office:value-type="float" office:value="4.8" calcext:value-type="float">
            <text:p>4.8</text:p>
          </table:table-cell>
          <table:table-cell table:formula="of:=[.T95]+[.S96]" office:value-type="float" office:value="150.16" calcext:value-type="float">
            <text:p>150.16</text:p>
          </table:table-cell>
          <table:table-cell office:value-type="float" office:value="1457.3" calcext:value-type="float">
            <text:p>1457.3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U100:.U117];[.T100:.T117])" office:value-type="float" office:value="1458.84189029066" calcext:value-type="float">
            <text:p>1458.84189029066</text:p>
          </table:table-cell>
          <table:table-cell table:number-columns-repeated="4"/>
        </table:table-row>
        <table:table-row table:style-name="ro1">
          <table:table-cell office:value-type="float" office:value="20.01" calcext:value-type="float">
            <text:p>20.01</text:p>
          </table:table-cell>
          <table:table-cell table:formula="of:=[.B96]+[.A97]" office:value-type="float" office:value="200.44" calcext:value-type="float">
            <text:p>200.44</text:p>
          </table:table-cell>
          <table:table-cell table:style-name="ce3" office:value-type="float" office:value="1552.65" calcext:value-type="float">
            <text:p>1552.65</text:p>
          </table:table-cell>
          <table:table-cell table:number-columns-repeated="15"/>
          <table:table-cell office:value-type="float" office:value="5.19" calcext:value-type="float">
            <text:p>5.19</text:p>
          </table:table-cell>
          <table:table-cell table:formula="of:=[.T96]+[.S97]" office:value-type="float" office:value="155.35" calcext:value-type="float">
            <text:p>155.35</text:p>
          </table:table-cell>
          <table:table-cell office:value-type="float" office:value="1457.03" calcext:value-type="float">
            <text:p>1457.03</text:p>
          </table:table-cell>
          <table:table-cell table:number-columns-repeated="7"/>
        </table:table-row>
        <table:table-row table:style-name="ro1">
          <table:table-cell office:value-type="float" office:value="20.06" calcext:value-type="float">
            <text:p>20.06</text:p>
          </table:table-cell>
          <table:table-cell table:formula="of:=[.B97]+[.A98]" office:value-type="float" office:value="220.5" calcext:value-type="float">
            <text:p>220.5</text:p>
          </table:table-cell>
          <table:table-cell table:style-name="ce3" office:value-type="float" office:value="1552.35" calcext:value-type="float">
            <text:p>1552.35</text:p>
          </table:table-cell>
          <table:table-cell/>
          <table:table-cell office:value-type="string" calcext:value-type="string">
            <text:p>massa_i_extrp</text:p>
          </table:table-cell>
          <table:table-cell table:formula="of:=[.F93]+[.F92]*[.F90]" office:value-type="float" office:value="1550.30634734266" calcext:value-type="float">
            <text:p>1550.30634734266</text:p>
          </table:table-cell>
          <table:table-cell/>
          <table:table-cell office:value-type="string" calcext:value-type="string">
            <text:p>errmtot</text:p>
          </table:table-cell>
          <table:table-cell table:formula="of:=[.I95]+[.I91]" office:value-type="float" office:value="0.382100745537956" calcext:value-type="float">
            <text:p>0.382100745537956</text:p>
          </table:table-cell>
          <table:table-cell table:number-columns-repeated="9"/>
          <table:table-cell office:value-type="float" office:value="6.51" calcext:value-type="float">
            <text:p>6.51</text:p>
          </table:table-cell>
          <table:table-cell table:formula="of:=[.T97]+[.S98]" office:value-type="float" office:value="161.86" calcext:value-type="float">
            <text:p>161.86</text:p>
          </table:table-cell>
          <table:table-cell office:value-type="float" office:value="1456.96" calcext:value-type="float">
            <text:p>1456.96</text:p>
          </table:table-cell>
          <table:table-cell/>
          <table:table-cell office:value-type="string" calcext:value-type="string">
            <text:p>massa_i_extrp</text:p>
          </table:table-cell>
          <table:table-cell table:formula="of:=[.X93]+[.X92]*[.X90]" office:value-type="float" office:value="1465.89095705092" calcext:value-type="float">
            <text:p>1465.89095705092</text:p>
          </table:table-cell>
          <table:table-cell/>
          <table:table-cell office:value-type="string" calcext:value-type="string">
            <text:p>errmtot</text:p>
          </table:table-cell>
          <table:table-cell table:formula="of:=[.AA95]+[.AA91]" office:value-type="float" office:value="0.194386637996247" calcext:value-type="float">
            <text:p>0.194386637996247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table:formula="of:=[.B98]+[.A99]" office:value-type="float" office:value="240.3" calcext:value-type="float">
            <text:p>240.3</text:p>
          </table:table-cell>
          <table:table-cell table:style-name="ce3" office:value-type="float" office:value="1552.05" calcext:value-type="float">
            <text:p>1552.05</text:p>
          </table:table-cell>
          <table:table-cell/>
          <table:table-cell office:value-type="string" calcext:value-type="string">
            <text:p>massa_f_extrp</text:p>
          </table:table-cell>
          <table:table-cell table:formula="of:=[.F96]+[.F95]*[.F90]" office:value-type="float" office:value="1541.19105551059" calcext:value-type="float">
            <text:p>1541.19105551059</text:p>
          </table:table-cell>
          <table:table-cell table:number-columns-repeated="12"/>
          <table:table-cell office:value-type="float" office:value="3.42" calcext:value-type="float">
            <text:p>3.42</text:p>
          </table:table-cell>
          <table:table-cell table:formula="of:=[.T98]+[.S99]" office:value-type="float" office:value="165.28" calcext:value-type="float">
            <text:p>165.28</text:p>
          </table:table-cell>
          <table:table-cell office:value-type="float" office:value="1456.9" calcext:value-type="float">
            <text:p>1456.9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massa_f_extrp</text:p>
          </table:table-cell>
          <table:table-cell table:formula="of:=[.X96]+[.X95]*[.X90]" office:value-type="float" office:value="1457.20899064002" calcext:value-type="float">
            <text:p>1457.20899064002</text:p>
          </table:table-cell>
          <table:table-cell table:number-columns-repeated="4"/>
        </table:table-row>
        <table:table-row table:style-name="ro1">
          <table:table-cell office:value-type="float" office:value="20.15" calcext:value-type="float">
            <text:p>20.15</text:p>
          </table:table-cell>
          <table:table-cell table:formula="of:=[.B99]+[.A100]" office:value-type="float" office:value="260.45" calcext:value-type="float">
            <text:p>260.45</text:p>
          </table:table-cell>
          <table:table-cell table:style-name="ce3" office:value-type="float" office:value="1551.67" calcext:value-type="float">
            <text:p>1551.67</text:p>
          </table:table-cell>
          <table:table-cell table:number-columns-repeated="15"/>
          <table:table-cell office:value-type="float" office:value="5.13" calcext:value-type="float">
            <text:p>5.13</text:p>
          </table:table-cell>
          <table:table-cell table:formula="of:=[.T99]+[.S100]" office:value-type="float" office:value="170.41" calcext:value-type="float">
            <text:p>170.41</text:p>
          </table:table-cell>
          <table:table-cell office:value-type="float" office:value="1456.86" calcext:value-type="float">
            <text:p>1456.86</text:p>
          </table:table-cell>
          <table:table-cell table:number-columns-repeated="7"/>
        </table:table-row>
        <table:table-row table:style-name="ro1">
          <table:table-cell office:value-type="float" office:value="19.99" calcext:value-type="float">
            <text:p>19.99</text:p>
          </table:table-cell>
          <table:table-cell table:formula="of:=[.B100]+[.A101]" office:value-type="float" office:value="280.44" calcext:value-type="float">
            <text:p>280.44</text:p>
          </table:table-cell>
          <table:table-cell table:style-name="ce3" office:value-type="float" office:value="1551.36" calcext:value-type="float">
            <text:p>1551.36</text:p>
          </table:table-cell>
          <table:table-cell/>
          <table:table-cell office:value-type="string" calcext:value-type="string">
            <text:p>massa netta evap</text:p>
          </table:table-cell>
          <table:table-cell table:formula="of:=[.F98]-[.F99]" office:value-type="float" office:value="9.11529183207222" calcext:value-type="float">
            <text:p>9.11529183207222</text:p>
          </table:table-cell>
          <table:table-cell table:number-columns-repeated="12"/>
          <table:table-cell office:value-type="float" office:value="9.65" calcext:value-type="float">
            <text:p>9.65</text:p>
          </table:table-cell>
          <table:table-cell table:formula="of:=[.T100]+[.S101]" office:value-type="float" office:value="180.06" calcext:value-type="float">
            <text:p>180.06</text:p>
          </table:table-cell>
          <table:table-cell office:value-type="float" office:value="1456.77" calcext:value-type="float">
            <text:p>1456.77</text:p>
          </table:table-cell>
          <table:table-cell/>
          <table:table-cell office:value-type="string" calcext:value-type="string">
            <text:p>massa netta evap</text:p>
          </table:table-cell>
          <table:table-cell table:formula="of:=[.X98]-[.X99]" office:value-type="float" office:value="8.68196641089594" calcext:value-type="float">
            <text:p>8.68196641089594</text:p>
          </table:table-cell>
          <table:table-cell/>
          <table:table-cell table:formula="of:=[.X90]-[.X87]" office:value-type="float" office:value="12.58" calcext:value-type="float">
            <text:p>12.58</text:p>
          </table:table-cell>
          <table:table-cell table:number-columns-repeated="2"/>
        </table:table-row>
        <table:table-row table:style-name="ro1">
          <table:table-cell office:value-type="float" office:value="19.95" calcext:value-type="float">
            <text:p>19.95</text:p>
          </table:table-cell>
          <table:table-cell table:formula="of:=[.B101]+[.A102]" office:value-type="float" office:value="300.39" calcext:value-type="float">
            <text:p>300.39</text:p>
          </table:table-cell>
          <table:table-cell table:style-name="ce3" office:value-type="float" office:value="1551.02" calcext:value-type="float">
            <text:p>1551.02</text:p>
          </table:table-cell>
          <table:table-cell table:number-columns-repeated="4"/>
          <table:table-cell table:formula="of:=[.F90]-[.F87]" office:value-type="float" office:value="35.025" calcext:value-type="float">
            <text:p>35.025</text:p>
          </table:table-cell>
          <table:table-cell table:number-columns-repeated="10"/>
          <table:table-cell office:value-type="float" office:value="20.03" calcext:value-type="float">
            <text:p>20.03</text:p>
          </table:table-cell>
          <table:table-cell table:formula="of:=[.T101]+[.S102]" office:value-type="float" office:value="200.09" calcext:value-type="float">
            <text:p>200.09</text:p>
          </table:table-cell>
          <table:table-cell office:value-type="float" office:value="1456.71" calcext:value-type="float">
            <text:p>1456.71</text:p>
          </table:table-cell>
          <table:table-cell table:number-columns-repeated="7"/>
        </table:table-row>
        <table:table-row table:style-name="ro1">
          <table:table-cell table:style-name="ce8" office:value-type="float" office:value="20.16" calcext:value-type="float">
            <text:p>20.16</text:p>
          </table:table-cell>
          <table:table-cell table:style-name="ce8" table:formula="of:=[.B102]+[.A103]" office:value-type="float" office:value="320.55" calcext:value-type="float">
            <text:p>320.55</text:p>
          </table:table-cell>
          <table:table-cell table:style-name="ce15" office:value-type="float" office:value="1550.67" calcext:value-type="float">
            <text:p>1550.67</text:p>
          </table:table-cell>
          <table:table-cell office:value-type="string" calcext:value-type="string">
            <text:p>IMMERSO</text:p>
          </table:table-cell>
          <table:table-cell table:number-columns-repeated="3"/>
          <table:table-cell table:formula="of:=[.F90]" office:value-type="float" office:value="355.575" calcext:value-type="float">
            <text:p>355.575</text:p>
          </table:table-cell>
          <table:table-cell office:value-type="float" office:value="1540" calcext:value-type="float">
            <text:p>1540</text:p>
          </table:table-cell>
          <table:table-cell table:number-columns-repeated="9"/>
          <table:table-cell office:value-type="float" office:value="10.1" calcext:value-type="float">
            <text:p>10.1</text:p>
          </table:table-cell>
          <table:table-cell table:formula="of:=[.T102]+[.S103]" office:value-type="float" office:value="210.19" calcext:value-type="float">
            <text:p>210.19</text:p>
          </table:table-cell>
          <table:table-cell office:value-type="float" office:value="1456.62" calcext:value-type="float">
            <text:p>1456.62</text:p>
          </table:table-cell>
          <table:table-cell table:number-columns-repeated="4"/>
          <table:table-cell office:value-type="float" office:value="152.7" calcext:value-type="float">
            <text:p>152.7</text:p>
          </table:table-cell>
          <table:table-cell office:value-type="float" office:value="1455" calcext:value-type="float">
            <text:p>1455</text:p>
          </table:table-cell>
          <table:table-cell/>
        </table:table-row>
        <table:table-row table:style-name="ro1">
          <table:table-cell table:formula="of:=60.91+0.61+8.53" office:value-type="float" office:value="70.05" calcext:value-type="float">
            <text:p>70.05</text:p>
          </table:table-cell>
          <table:table-cell table:formula="of:=[.B103]+[.A104]" office:value-type="float" office:value="390.6" calcext:value-type="float">
            <text:p>390.6</text:p>
          </table:table-cell>
          <table:table-cell table:style-name="ce3" office:value-type="float" office:value="1540.33" calcext:value-type="float">
            <text:p>1540.33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calore specifico</text:p>
          </table:table-cell>
          <table:table-cell table:formula="of:=([.F101]*[.F85])/([.F84]*([.H84]-[.H85]))*([.H86]/4.184)" office:value-type="float" office:value="1.20398653984652" calcext:value-type="float">
            <text:p>1.20398653984652</text:p>
          </table:table-cell>
          <table:table-cell/>
          <table:table-cell table:formula="of:=[.F90]" office:value-type="float" office:value="355.575" calcext:value-type="float">
            <text:p>355.575</text:p>
          </table:table-cell>
          <table:table-cell office:value-type="float" office:value="1551" calcext:value-type="float">
            <text:p>1551</text:p>
          </table:table-cell>
          <table:table-cell table:number-columns-repeated="9"/>
          <table:table-cell office:value-type="float" office:value="10.06" calcext:value-type="float">
            <text:p>10.06</text:p>
          </table:table-cell>
          <table:table-cell table:formula="of:=[.T103]+[.S104]" office:value-type="float" office:value="220.25" calcext:value-type="float">
            <text:p>220.25</text:p>
          </table:table-cell>
          <table:table-cell office:value-type="float" office:value="1456.55" calcext:value-type="float">
            <text:p>1456.55</text:p>
          </table:table-cell>
          <table:table-cell/>
          <table:table-cell office:value-type="string" calcext:value-type="string">
            <text:p>calore specifico</text:p>
          </table:table-cell>
          <table:table-cell table:formula="of:=([.X101]*[.X85])/([.X84]*([.Z84]-[.Z85]))*([.Z86]/4.184)" office:value-type="float" office:value="1.14675107398531" calcext:value-type="float">
            <text:p>1.14675107398531</text:p>
          </table:table-cell>
          <table:table-cell/>
          <table:table-cell office:value-type="float" office:value="152.7" calcext:value-type="float">
            <text:p>152.7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office:value-type="float" office:value="9.98" calcext:value-type="float">
            <text:p>9.98</text:p>
          </table:table-cell>
          <table:table-cell table:formula="of:=[.B104]+[.A105]" office:value-type="float" office:value="400.58" calcext:value-type="float">
            <text:p>400.58</text:p>
          </table:table-cell>
          <table:table-cell table:style-name="ce3" office:value-type="float" office:value="1540.26" calcext:value-type="float">
            <text:p>1540.26</text:p>
          </table:table-cell>
          <table:table-cell table:number-columns-repeated="15"/>
          <table:table-cell office:value-type="float" office:value="10.05" calcext:value-type="float">
            <text:p>10.05</text:p>
          </table:table-cell>
          <table:table-cell table:formula="of:=[.T104]+[.S105]" office:value-type="float" office:value="230.3" calcext:value-type="float">
            <text:p>230.3</text:p>
          </table:table-cell>
          <table:table-cell office:value-type="float" office:value="1456.46" calcext:value-type="float">
            <text:p>1456.46</text:p>
          </table:table-cell>
          <table:table-cell table:number-columns-repeated="7"/>
        </table:table-row>
        <table:table-row table:style-name="ro1">
          <table:table-cell office:value-type="float" office:value="9.86" calcext:value-type="float">
            <text:p>9.86</text:p>
          </table:table-cell>
          <table:table-cell table:formula="of:=[.B105]+[.A106]" office:value-type="float" office:value="410.44" calcext:value-type="float">
            <text:p>410.44</text:p>
          </table:table-cell>
          <table:table-cell table:style-name="ce3" office:value-type="float" office:value="1540.14" calcext:value-type="float">
            <text:p>1540.14</text:p>
          </table:table-cell>
          <table:table-cell table:number-columns-repeated="15"/>
          <table:table-cell office:value-type="float" office:value="9.98" calcext:value-type="float">
            <text:p>9.98</text:p>
          </table:table-cell>
          <table:table-cell table:formula="of:=[.T105]+[.S106]" office:value-type="float" office:value="240.28" calcext:value-type="float">
            <text:p>240.28</text:p>
          </table:table-cell>
          <table:table-cell office:value-type="float" office:value="1456.35" calcext:value-type="float">
            <text:p>1456.35</text:p>
          </table:table-cell>
          <table:table-cell table:number-columns-repeated="7"/>
        </table:table-row>
        <table:table-row table:style-name="ro1">
          <table:table-cell office:value-type="float" office:value="9.93" calcext:value-type="float">
            <text:p>9.93</text:p>
          </table:table-cell>
          <table:table-cell table:formula="of:=[.B106]+[.A107]" office:value-type="float" office:value="420.37" calcext:value-type="float">
            <text:p>420.37</text:p>
          </table:table-cell>
          <table:table-cell table:style-name="ce3" office:value-type="float" office:value="1540.01" calcext:value-type="float">
            <text:p>1540.01</text:p>
          </table:table-cell>
          <table:table-cell table:number-columns-repeated="15"/>
          <table:table-cell office:value-type="float" office:value="9.92" calcext:value-type="float">
            <text:p>9.92</text:p>
          </table:table-cell>
          <table:table-cell table:formula="of:=[.T106]+[.S107]" office:value-type="float" office:value="250.2" calcext:value-type="float">
            <text:p>250.2</text:p>
          </table:table-cell>
          <table:table-cell office:value-type="float" office:value="1456.24" calcext:value-type="float">
            <text:p>1456.24</text:p>
          </table:table-cell>
          <table:table-cell table:number-columns-repeated="7"/>
        </table:table-row>
        <table:table-row table:style-name="ro1">
          <table:table-cell office:value-type="float" office:value="10.1" calcext:value-type="float">
            <text:p>10.1</text:p>
          </table:table-cell>
          <table:table-cell table:formula="of:=[.B107]+[.A108]" office:value-type="float" office:value="430.47" calcext:value-type="float">
            <text:p>430.47</text:p>
          </table:table-cell>
          <table:table-cell table:style-name="ce3" office:value-type="float" office:value="1539.85" calcext:value-type="float">
            <text:p>1539.85</text:p>
          </table:table-cell>
          <table:table-cell table:number-columns-repeated="15"/>
          <table:table-cell office:value-type="float" office:value="10.12" calcext:value-type="float">
            <text:p>10.12</text:p>
          </table:table-cell>
          <table:table-cell table:formula="of:=[.T107]+[.S108]" office:value-type="float" office:value="260.32" calcext:value-type="float">
            <text:p>260.32</text:p>
          </table:table-cell>
          <table:table-cell office:value-type="float" office:value="1456.13" calcext:value-type="float">
            <text:p>1456.13</text:p>
          </table:table-cell>
          <table:table-cell table:number-columns-repeated="7"/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[.B108]+[.A109]" office:value-type="float" office:value="440.37" calcext:value-type="float">
            <text:p>440.37</text:p>
          </table:table-cell>
          <table:table-cell table:style-name="ce3" office:value-type="float" office:value="1539.7" calcext:value-type="float">
            <text:p>1539.70</text:p>
          </table:table-cell>
          <table:table-cell table:number-columns-repeated="15"/>
          <table:table-cell office:value-type="float" office:value="9.94" calcext:value-type="float">
            <text:p>9.94</text:p>
          </table:table-cell>
          <table:table-cell table:formula="of:=[.T108]+[.S109]" office:value-type="float" office:value="270.26" calcext:value-type="float">
            <text:p>270.26</text:p>
          </table:table-cell>
          <table:table-cell office:value-type="float" office:value="1456.04" calcext:value-type="float">
            <text:p>1456.04</text:p>
          </table:table-cell>
          <table:table-cell table:number-columns-repeated="7"/>
        </table:table-row>
        <table:table-row table:style-name="ro1">
          <table:table-cell office:value-type="float" office:value="10.13" calcext:value-type="float">
            <text:p>10.13</text:p>
          </table:table-cell>
          <table:table-cell table:formula="of:=[.B109]+[.A110]" office:value-type="float" office:value="450.5" calcext:value-type="float">
            <text:p>450.5</text:p>
          </table:table-cell>
          <table:table-cell table:style-name="ce3" office:value-type="float" office:value="1539.56" calcext:value-type="float">
            <text:p>1539.56</text:p>
          </table:table-cell>
          <table:table-cell table:number-columns-repeated="15"/>
          <table:table-cell office:value-type="float" office:value="10.07" calcext:value-type="float">
            <text:p>10.07</text:p>
          </table:table-cell>
          <table:table-cell table:formula="of:=[.T109]+[.S110]" office:value-type="float" office:value="280.33" calcext:value-type="float">
            <text:p>280.33</text:p>
          </table:table-cell>
          <table:table-cell office:value-type="float" office:value="1455.87" calcext:value-type="float">
            <text:p>1455.87</text:p>
          </table:table-cell>
          <table:table-cell table:number-columns-repeated="7"/>
        </table:table-row>
        <table:table-row table:style-name="ro1">
          <table:table-cell office:value-type="float" office:value="9.81" calcext:value-type="float">
            <text:p>9.81</text:p>
          </table:table-cell>
          <table:table-cell table:formula="of:=[.B110]+[.A111]" office:value-type="float" office:value="460.31" calcext:value-type="float">
            <text:p>460.31</text:p>
          </table:table-cell>
          <table:table-cell table:style-name="ce3" office:value-type="float" office:value="1539.43" calcext:value-type="float">
            <text:p>1539.43</text:p>
          </table:table-cell>
          <table:table-cell table:number-columns-repeated="15"/>
          <table:table-cell office:value-type="float" office:value="9.87" calcext:value-type="float">
            <text:p>9.87</text:p>
          </table:table-cell>
          <table:table-cell table:formula="of:=[.T110]+[.S111]" office:value-type="float" office:value="290.2" calcext:value-type="float">
            <text:p>290.2</text:p>
          </table:table-cell>
          <table:table-cell office:value-type="float" office:value="1455.77" calcext:value-type="float">
            <text:p>1455.77</text:p>
          </table:table-cell>
          <table:table-cell table:number-columns-repeated="7"/>
        </table:table-row>
        <table:table-row table:style-name="ro1">
          <table:table-cell office:value-type="float" office:value="10.05" calcext:value-type="float">
            <text:p>10.05</text:p>
          </table:table-cell>
          <table:table-cell table:formula="of:=[.B111]+[.A112]" office:value-type="float" office:value="470.36" calcext:value-type="float">
            <text:p>470.36</text:p>
          </table:table-cell>
          <table:table-cell table:style-name="ce3" office:value-type="float" office:value="1539.27" calcext:value-type="float">
            <text:p>1539.27</text:p>
          </table:table-cell>
          <table:table-cell table:number-columns-repeated="15"/>
          <table:table-cell office:value-type="float" office:value="10.14" calcext:value-type="float">
            <text:p>10.14</text:p>
          </table:table-cell>
          <table:table-cell table:formula="of:=[.T111]+[.S112]" office:value-type="float" office:value="300.34" calcext:value-type="float">
            <text:p>300.34</text:p>
          </table:table-cell>
          <table:table-cell office:value-type="float" office:value="1455.66" calcext:value-type="float">
            <text:p>1455.66</text:p>
          </table:table-cell>
          <table:table-cell table:number-columns-repeated="7"/>
        </table:table-row>
        <table:table-row table:style-name="ro1">
          <table:table-cell office:value-type="float" office:value="10.08" calcext:value-type="float">
            <text:p>10.08</text:p>
          </table:table-cell>
          <table:table-cell table:formula="of:=[.B112]+[.A113]" office:value-type="float" office:value="480.44" calcext:value-type="float">
            <text:p>480.44</text:p>
          </table:table-cell>
          <table:table-cell table:style-name="ce3" office:value-type="float" office:value="1539.14" calcext:value-type="float">
            <text:p>1539.14</text:p>
          </table:table-cell>
          <table:table-cell table:number-columns-repeated="15"/>
          <table:table-cell office:value-type="float" office:value="9.99" calcext:value-type="float">
            <text:p>9.99</text:p>
          </table:table-cell>
          <table:table-cell table:formula="of:=[.T112]+[.S113]" office:value-type="float" office:value="310.33" calcext:value-type="float">
            <text:p>310.33</text:p>
          </table:table-cell>
          <table:table-cell office:value-type="float" office:value="1455.5" calcext:value-type="float">
            <text:p>1455.5</text:p>
          </table:table-cell>
          <table:table-cell table:number-columns-repeated="7"/>
        </table:table-row>
        <table:table-row table:style-name="ro1">
          <table:table-cell office:value-type="float" office:value="10.05" calcext:value-type="float">
            <text:p>10.05</text:p>
          </table:table-cell>
          <table:table-cell table:formula="of:=[.B113]+[.A114]" office:value-type="float" office:value="490.49" calcext:value-type="float">
            <text:p>490.49</text:p>
          </table:table-cell>
          <table:table-cell table:style-name="ce3" office:value-type="float" office:value="1538.86" calcext:value-type="float">
            <text:p>1538.86</text:p>
          </table:table-cell>
          <table:table-cell table:number-columns-repeated="15"/>
          <table:table-cell office:value-type="float" office:value="9.91" calcext:value-type="float">
            <text:p>9.91</text:p>
          </table:table-cell>
          <table:table-cell table:formula="of:=[.T113]+[.S114]" office:value-type="float" office:value="320.24" calcext:value-type="float">
            <text:p>320.24</text:p>
          </table:table-cell>
          <table:table-cell office:value-type="float" office:value="1455.37" calcext:value-type="float">
            <text:p>1455.37</text:p>
          </table:table-cell>
          <table:table-cell table:number-columns-repeated="7"/>
        </table:table-row>
        <table:table-row table:style-name="ro1">
          <table:table-cell office:value-type="float" office:value="10.51" calcext:value-type="float">
            <text:p>10.51</text:p>
          </table:table-cell>
          <table:table-cell table:formula="of:=[.B114]+[.A115]" office:value-type="float" office:value="501" calcext:value-type="float">
            <text:p>501</text:p>
          </table:table-cell>
          <table:table-cell table:style-name="ce3" office:value-type="float" office:value="1538.78" calcext:value-type="float">
            <text:p>1538.78</text:p>
          </table:table-cell>
          <table:table-cell table:number-columns-repeated="15"/>
          <table:table-cell office:value-type="float" office:value="10.06" calcext:value-type="float">
            <text:p>10.06</text:p>
          </table:table-cell>
          <table:table-cell table:formula="of:=[.T114]+[.S115]" office:value-type="float" office:value="330.3" calcext:value-type="float">
            <text:p>330.3</text:p>
          </table:table-cell>
          <table:table-cell office:value-type="float" office:value="1455.27" calcext:value-type="float">
            <text:p>1455.27</text:p>
          </table:table-cell>
          <table:table-cell table:number-columns-repeated="7"/>
        </table:table-row>
        <table:table-row table:style-name="ro1">
          <table:table-cell office:value-type="float" office:value="9.43" calcext:value-type="float">
            <text:p>9.43</text:p>
          </table:table-cell>
          <table:table-cell table:formula="of:=[.B115]+[.A116]" office:value-type="float" office:value="510.43" calcext:value-type="float">
            <text:p>510.43</text:p>
          </table:table-cell>
          <table:table-cell table:style-name="ce3" office:value-type="float" office:value="1538.66" calcext:value-type="float">
            <text:p>1538.66</text:p>
          </table:table-cell>
          <table:table-cell table:number-columns-repeated="15"/>
          <table:table-cell office:value-type="float" office:value="10.12" calcext:value-type="float">
            <text:p>10.12</text:p>
          </table:table-cell>
          <table:table-cell table:formula="of:=[.T115]+[.S116]" office:value-type="float" office:value="340.42" calcext:value-type="float">
            <text:p>340.42</text:p>
          </table:table-cell>
          <table:table-cell office:value-type="float" office:value="1455.15" calcext:value-type="float">
            <text:p>1455.15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6]+[.A117]" office:value-type="float" office:value="520.43" calcext:value-type="float">
            <text:p>520.43</text:p>
          </table:table-cell>
          <table:table-cell table:style-name="ce3" office:value-type="float" office:value="1538.52" calcext:value-type="float">
            <text:p>1538.52</text:p>
          </table:table-cell>
          <table:table-cell table:number-columns-repeated="15"/>
          <table:table-cell office:value-type="float" office:value="9.72" calcext:value-type="float">
            <text:p>9.72</text:p>
          </table:table-cell>
          <table:table-cell table:formula="of:=[.T116]+[.S117]" office:value-type="float" office:value="350.14" calcext:value-type="float">
            <text:p>350.14</text:p>
          </table:table-cell>
          <table:table-cell office:value-type="float" office:value="1454.99" calcext:value-type="float">
            <text:p>1454.99</text:p>
          </table:table-cell>
          <table:table-cell table:number-columns-repeated="7"/>
        </table:table-row>
        <table:table-row table:style-name="ro1">
          <table:table-cell office:value-type="float" office:value="9.88" calcext:value-type="float">
            <text:p>9.88</text:p>
          </table:table-cell>
          <table:table-cell table:formula="of:=[.B117]+[.A118]" office:value-type="float" office:value="530.31" calcext:value-type="float">
            <text:p>530.31</text:p>
          </table:table-cell>
          <table:table-cell table:style-name="ce3" office:value-type="float" office:value="1538.38" calcext:value-type="float">
            <text:p>1538.38</text:p>
          </table:table-cell>
          <table:table-cell table:number-columns-repeated="25"/>
        </table:table-row>
        <table:table-row table:style-name="ro1">
          <table:table-cell office:value-type="float" office:value="10.06" calcext:value-type="float">
            <text:p>10.06</text:p>
          </table:table-cell>
          <table:table-cell table:formula="of:=[.B118]+[.A119]" office:value-type="float" office:value="540.37" calcext:value-type="float">
            <text:p>540.37</text:p>
          </table:table-cell>
          <table:table-cell table:style-name="ce3" office:value-type="float" office:value="1538.2" calcext:value-type="float">
            <text:p>1538.20</text:p>
          </table:table-cell>
          <table:table-cell table:number-columns-repeated="25"/>
        </table:table-row>
        <table:table-row table:style-name="ro1">
          <table:table-cell office:value-type="float" office:value="9.96" calcext:value-type="float">
            <text:p>9.96</text:p>
          </table:table-cell>
          <table:table-cell table:formula="of:=[.B119]+[.A120]" office:value-type="float" office:value="550.33" calcext:value-type="float">
            <text:p>550.33</text:p>
          </table:table-cell>
          <table:table-cell table:style-name="ce3" office:value-type="float" office:value="1538.05" calcext:value-type="float">
            <text:p>1538.05</text:p>
          </table:table-cell>
          <table:table-cell table:number-columns-repeated="25"/>
        </table:table-row>
        <table:table-row table:style-name="ro1">
          <table:table-cell office:value-type="float" office:value="10.03" calcext:value-type="float">
            <text:p>10.03</text:p>
          </table:table-cell>
          <table:table-cell table:formula="of:=[.B120]+[.A121]" office:value-type="float" office:value="560.36" calcext:value-type="float">
            <text:p>560.36</text:p>
          </table:table-cell>
          <table:table-cell table:style-name="ce3" office:value-type="float" office:value="1537.92" calcext:value-type="float">
            <text:p>1537.92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1]+[.A122]" office:value-type="float" office:value="570.36" calcext:value-type="float">
            <text:p>570.36</text:p>
          </table:table-cell>
          <table:table-cell table:style-name="ce3" office:value-type="float" office:value="1537.76" calcext:value-type="float">
            <text:p>1537.76</text:p>
          </table:table-cell>
          <table:table-cell table:number-columns-repeated="25"/>
        </table:table-row>
        <table:table-row table:style-name="ro1">
          <table:table-cell office:value-type="float" office:value="9.95" calcext:value-type="float">
            <text:p>9.95</text:p>
          </table:table-cell>
          <table:table-cell table:formula="of:=[.B122]+[.A123]" office:value-type="float" office:value="580.31" calcext:value-type="float">
            <text:p>580.31</text:p>
          </table:table-cell>
          <table:table-cell table:style-name="ce3" office:value-type="float" office:value="1537.61" calcext:value-type="float">
            <text:p>1537.61</text:p>
          </table:table-cell>
          <table:table-cell table:number-columns-repeated="25"/>
        </table:table-row>
        <table:table-row table:style-name="ro1">
          <table:table-cell office:value-type="float" office:value="10.03" calcext:value-type="float">
            <text:p>10.03</text:p>
          </table:table-cell>
          <table:table-cell table:formula="of:=[.B123]+[.A124]" office:value-type="float" office:value="590.34" calcext:value-type="float">
            <text:p>590.34</text:p>
          </table:table-cell>
          <table:table-cell table:style-name="ce3" office:value-type="float" office:value="1537.42" calcext:value-type="float">
            <text:p>1537.42</text:p>
          </table:table-cell>
          <table:table-cell table:number-columns-repeated="25"/>
        </table:table-row>
        <table:table-row table:style-name="ro1">
          <table:table-cell office:value-type="float" office:value="10.23" calcext:value-type="float">
            <text:p>10.23</text:p>
          </table:table-cell>
          <table:table-cell table:formula="of:=[.B124]+[.A125]" office:value-type="float" office:value="600.57" calcext:value-type="float">
            <text:p>600.57</text:p>
          </table:table-cell>
          <table:table-cell table:style-name="ce3" office:value-type="float" office:value="1537.28" calcext:value-type="float">
            <text:p>1537.28</text:p>
          </table:table-cell>
          <table:table-cell table:number-columns-repeated="25"/>
        </table:table-row>
        <table:table-row table:style-name="ro1">
          <table:table-cell office:value-type="float" office:value="9.78" calcext:value-type="float">
            <text:p>9.78</text:p>
          </table:table-cell>
          <table:table-cell table:formula="of:=[.B125]+[.A126]" office:value-type="float" office:value="610.35" calcext:value-type="float">
            <text:p>610.35</text:p>
          </table:table-cell>
          <table:table-cell table:style-name="ce3" office:value-type="float" office:value="1537.15" calcext:value-type="float">
            <text:p>1537.15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6]+[.A127]" office:value-type="float" office:value="620.35" calcext:value-type="float">
            <text:p>620.35</text:p>
          </table:table-cell>
          <table:table-cell table:style-name="ce3" office:value-type="float" office:value="1536.97" calcext:value-type="float">
            <text:p>1536.97</text:p>
          </table:table-cell>
          <table:table-cell table:number-columns-repeated="25"/>
        </table:table-row>
        <table:table-row table:style-name="ro1">
          <table:table-cell office:value-type="float" office:value="9.93" calcext:value-type="float">
            <text:p>9.93</text:p>
          </table:table-cell>
          <table:table-cell table:formula="of:=[.B127]+[.A128]" office:value-type="float" office:value="630.28" calcext:value-type="float">
            <text:p>630.28</text:p>
          </table:table-cell>
          <table:table-cell table:style-name="ce3" office:value-type="float" office:value="1536.83" calcext:value-type="float">
            <text:p>1536.83</text:p>
          </table:table-cell>
          <table:table-cell table:number-columns-repeated="25"/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[.B128]+[.A129]" office:value-type="float" office:value="640.48" calcext:value-type="float">
            <text:p>640.48</text:p>
          </table:table-cell>
          <table:table-cell table:style-name="ce3" office:value-type="float" office:value="1536.4" calcext:value-type="float">
            <text:p>1536.40</text:p>
          </table:table-cell>
          <table:table-cell table:number-columns-repeated="25"/>
        </table:table-row>
        <table:table-row table:style-name="ro1">
          <table:table-cell office:value-type="float" office:value="9.83" calcext:value-type="float">
            <text:p>9.83</text:p>
          </table:table-cell>
          <table:table-cell table:formula="of:=[.B129]+[.A130]" office:value-type="float" office:value="650.31" calcext:value-type="float">
            <text:p>650.31</text:p>
          </table:table-cell>
          <table:table-cell table:style-name="ce3" office:value-type="float" office:value="1536.19" calcext:value-type="float">
            <text:p>1536.19</text:p>
          </table:table-cell>
          <table:table-cell table:number-columns-repeated="25"/>
        </table:table-row>
        <table:table-row table:style-name="ro1">
          <table:table-cell office:value-type="float" office:value="19.96" calcext:value-type="float">
            <text:p>19.96</text:p>
          </table:table-cell>
          <table:table-cell table:formula="of:=[.B130]+[.A131]" office:value-type="float" office:value="670.27" calcext:value-type="float">
            <text:p>670.27</text:p>
          </table:table-cell>
          <table:table-cell table:style-name="ce3" office:value-type="float" office:value="1535.87" calcext:value-type="float">
            <text:p>1535.87</text:p>
          </table:table-cell>
          <table:table-cell table:number-columns-repeated="25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B131]+[.A132]" office:value-type="float" office:value="690.47" calcext:value-type="float">
            <text:p>690.47</text:p>
          </table:table-cell>
          <table:table-cell table:style-name="ce3" office:value-type="float" office:value="1535.57" calcext:value-type="float">
            <text:p>1535.57</text:p>
          </table:table-cell>
          <table:table-cell table:number-columns-repeated="25"/>
        </table:table-row>
        <table:table-row table:style-name="ro1">
          <table:table-cell office:value-type="float" office:value="19.75" calcext:value-type="float">
            <text:p>19.75</text:p>
          </table:table-cell>
          <table:table-cell table:formula="of:=[.B132]+[.A133]" office:value-type="float" office:value="710.22" calcext:value-type="float">
            <text:p>710.22</text:p>
          </table:table-cell>
          <table:table-cell table:style-name="ce3" office:value-type="float" office:value="1535.24" calcext:value-type="float">
            <text:p>1535.24</text:p>
          </table:table-cell>
          <table:table-cell table:number-columns-repeated="25"/>
        </table:table-row>
        <table:table-row table:style-name="ro1">
          <table:table-cell office:value-type="float" office:value="20.15" calcext:value-type="float">
            <text:p>20.15</text:p>
          </table:table-cell>
          <table:table-cell table:formula="of:=[.B133]+[.A134]" office:value-type="float" office:value="730.37" calcext:value-type="float">
            <text:p>730.37</text:p>
          </table:table-cell>
          <table:table-cell table:style-name="ce3" office:value-type="float" office:value="1534.92" calcext:value-type="float">
            <text:p>1534.92</text:p>
          </table:table-cell>
          <table:table-cell table:number-columns-repeated="25"/>
        </table:table-row>
        <table:table-row table:style-name="ro1">
          <table:table-cell office:value-type="float" office:value="19.93" calcext:value-type="float">
            <text:p>19.93</text:p>
          </table:table-cell>
          <table:table-cell table:formula="of:=[.B134]+[.A135]" office:value-type="float" office:value="750.3" calcext:value-type="float">
            <text:p>750.3</text:p>
          </table:table-cell>
          <table:table-cell table:style-name="ce3" office:value-type="float" office:value="1534.61" calcext:value-type="float">
            <text:p>1534.61</text:p>
          </table:table-cell>
          <table:table-cell table:number-columns-repeated="25"/>
        </table:table-row>
        <table:table-row table:style-name="ro1">
          <table:table-cell office:value-type="float" office:value="20.03" calcext:value-type="float">
            <text:p>20.03</text:p>
          </table:table-cell>
          <table:table-cell table:formula="of:=[.B135]+[.A136]" office:value-type="float" office:value="770.33" calcext:value-type="float">
            <text:p>770.33</text:p>
          </table:table-cell>
          <table:table-cell table:style-name="ce3" office:value-type="float" office:value="1534.31" calcext:value-type="float">
            <text:p>1534.31</text:p>
          </table:table-cell>
          <table:table-cell table:number-columns-repeated="25"/>
        </table:table-row>
        <table:table-row table:style-name="ro1">
          <table:table-cell office:value-type="float" office:value="20.06" calcext:value-type="float">
            <text:p>20.06</text:p>
          </table:table-cell>
          <table:table-cell table:formula="of:=[.B136]+[.A137]" office:value-type="float" office:value="790.39" calcext:value-type="float">
            <text:p>790.39</text:p>
          </table:table-cell>
          <table:table-cell table:style-name="ce3" office:value-type="float" office:value="1533.98" calcext:value-type="float">
            <text:p>1533.98</text:p>
          </table:table-cell>
          <table:table-cell table:number-columns-repeated="25"/>
        </table:table-row>
        <table:table-row table:style-name="ro1">
          <table:table-cell office:value-type="float" office:value="19.93" calcext:value-type="float">
            <text:p>19.93</text:p>
          </table:table-cell>
          <table:table-cell table:formula="of:=[.B137]+[.A138]" office:value-type="float" office:value="810.32" calcext:value-type="float">
            <text:p>810.32</text:p>
          </table:table-cell>
          <table:table-cell table:style-name="ce3" office:value-type="float" office:value="1533.64" calcext:value-type="float">
            <text:p>1533.64</text:p>
          </table:table-cell>
          <table:table-cell table:number-columns-repeated="25"/>
        </table:table-row>
        <table:table-row table:style-name="ro1">
          <table:table-cell office:value-type="float" office:value="19.98" calcext:value-type="float">
            <text:p>19.98</text:p>
          </table:table-cell>
          <table:table-cell table:formula="of:=[.B138]+[.A139]" office:value-type="float" office:value="830.3" calcext:value-type="float">
            <text:p>830.3</text:p>
          </table:table-cell>
          <table:table-cell table:style-name="ce3" office:value-type="float" office:value="1533.3" calcext:value-type="float">
            <text:p>1533.30</text:p>
          </table:table-cell>
          <table:table-cell table:number-columns-repeated="25"/>
        </table:table-row>
        <table:table-row table:style-name="ro1">
          <table:table-cell office:value-type="float" office:value="19.88" calcext:value-type="float">
            <text:p>19.88</text:p>
          </table:table-cell>
          <table:table-cell table:formula="of:=[.B139]+[.A140]" office:value-type="float" office:value="850.18" calcext:value-type="float">
            <text:p>850.18</text:p>
          </table:table-cell>
          <table:table-cell table:style-name="ce3" office:value-type="float" office:value="1532.93" calcext:value-type="float">
            <text:p>1532.93</text:p>
          </table:table-cell>
          <table:table-cell table:number-columns-repeated="25"/>
        </table:table-row>
        <table:table-row table:style-name="ro1">
          <table:table-cell office:value-type="float" office:value="19.86" calcext:value-type="float">
            <text:p>19.86</text:p>
          </table:table-cell>
          <table:table-cell table:formula="of:=[.B140]+[.A141]" office:value-type="float" office:value="870.04" calcext:value-type="float">
            <text:p>870.04</text:p>
          </table:table-cell>
          <table:table-cell table:style-name="ce3" office:value-type="float" office:value="1532.65" calcext:value-type="float">
            <text:p>1532.65</text:p>
          </table:table-cell>
          <table:table-cell table:number-columns-repeated="25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B141]+[.A142]" office:value-type="float" office:value="890.24" calcext:value-type="float">
            <text:p>890.24</text:p>
          </table:table-cell>
          <table:table-cell table:style-name="ce3" office:value-type="float" office:value="1532.2" calcext:value-type="float">
            <text:p>1532.20</text:p>
          </table:table-cell>
          <table:table-cell table:number-columns-repeated="25"/>
        </table:table-row>
        <table:table-row table:style-name="ro1">
          <table:table-cell office:value-type="float" office:value="20.25" calcext:value-type="float">
            <text:p>20.25</text:p>
          </table:table-cell>
          <table:table-cell table:formula="of:=[.B142]+[.A143]" office:value-type="float" office:value="910.49" calcext:value-type="float">
            <text:p>910.49</text:p>
          </table:table-cell>
          <table:table-cell table:style-name="ce3" office:value-type="float" office:value="1531.99" calcext:value-type="float">
            <text:p>1531.99</text:p>
          </table:table-cell>
          <table:table-cell table:number-columns-repeated="25"/>
        </table:table-row>
        <table:table-row table:style-name="ro1">
          <table:table-cell office:value-type="float" office:value="19.58" calcext:value-type="float">
            <text:p>19.58</text:p>
          </table:table-cell>
          <table:table-cell table:formula="of:=[.B143]+[.A144]" office:value-type="float" office:value="930.07" calcext:value-type="float">
            <text:p>930.07</text:p>
          </table:table-cell>
          <table:table-cell office:value-type="float" office:value="1531.65" calcext:value-type="float">
            <text:p>1531.65</text:p>
          </table:table-cell>
          <table:table-cell table:number-columns-repeated="25"/>
        </table:table-row>
        <table:table-row table:style-name="ro1" table:number-rows-repeated="26">
          <table:table-cell table:number-columns-repeated="28"/>
        </table:table-row>
        <table:table-row table:style-name="ro1">
          <table:table-cell/>
          <table:table-cell office:value-type="string" calcext:value-type="string">
            <text:p>TABELLA PIOMBO PRIMA VOLTA</text:p>
          </table:table-cell>
          <table:table-cell table:number-columns-repeated="2"/>
          <table:table-cell office:value-type="string" calcext:value-type="string">
            <text:p>massa_piombo</text:p>
          </table:table-cell>
          <table:table-cell office:value-type="float" office:value="38.48" calcext:value-type="float">
            <text:p>38.48</text:p>
          </table:table-cell>
          <table:table-cell office:value-type="string" calcext:value-type="string">
            <text:p>T_amb</text:p>
          </table:table-cell>
          <table:table-cell office:value-type="float" office:value="295" calcext:value-type="float">
            <text:p>295</text:p>
          </table:table-cell>
          <table:table-cell table:number-columns-repeated="10"/>
          <table:table-cell office:value-type="string" calcext:value-type="string">
            <text:p>TABELLA PIOMBO SECONDA VOLTA</text:p>
          </table:table-cell>
          <table:table-cell table:number-columns-repeated="2"/>
          <table:table-cell office:value-type="string" calcext:value-type="string">
            <text:p>massa_piombo</text:p>
          </table:table-cell>
          <table:table-cell office:value-type="float" office:value="38.48" calcext:value-type="float">
            <text:p>38.48</text:p>
          </table:table-cell>
          <table:table-cell office:value-type="string" calcext:value-type="string">
            <text:p>T_amb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PIOMBO</text:p>
          </table:table-cell>
          <table:covered-table-cell/>
          <table:table-cell/>
          <table:table-cell office:value-type="string" calcext:value-type="string">
            <text:p>calore_latente_azoto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10"/>
          <table:table-cell office:value-type="string" calcext:value-type="string" table:number-columns-spanned="2" table:number-rows-spanned="1">
            <text:p>PIOMBO</text:p>
          </table:table-cell>
          <table:covered-table-cell/>
          <table:table-cell/>
          <table:table-cell office:value-type="string" calcext:value-type="string">
            <text:p>calore_latente_azoto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207.2" calcext:value-type="float">
            <text:p>207.2</text:p>
          </table:table-cell>
          <table:table-cell table:number-columns-repeated="10"/>
          <table:table-cell office:value-type="string" calcext:value-type="string">
            <text:p>T</text:p>
          </table:table-cell>
          <table:table-cell office:value-type="string" calcext:value-type="string">
            <text:p>MASSE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207.2" calcext:value-type="float">
            <text:p>207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1538.2" calcext:value-type="float">
            <text:p>1538.20</text:p>
          </table:table-cell>
          <table:table-cell/>
          <table:table-cell office:value-type="string" calcext:value-type="string">
            <text:p>t_start</text:p>
          </table:table-cell>
          <table:table-cell table:formula="of:=[.B189]" office:value-type="float" office:value="301.8" calcext:value-type="float">
            <text:p>301.8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471.91" calcext:value-type="float">
            <text:p>1471.91</text:p>
          </table:table-cell>
          <table:table-cell/>
          <table:table-cell office:value-type="string" calcext:value-type="string">
            <text:p>t_start</text:p>
          </table:table-cell>
          <table:table-cell table:formula="of:=[.S184]" office:value-type="float" office:value="190.03" calcext:value-type="float">
            <text:p>190.03</text:p>
          </table:table-cell>
          <table:table-cell table:number-columns-repeated="5"/>
        </table:table-row>
        <table:table-row table:style-name="ro1">
          <table:table-cell office:value-type="float" office:value="21.64" calcext:value-type="float">
            <text:p>21.64</text:p>
          </table:table-cell>
          <table:table-cell table:formula="of:=[.B174]+[.A175]" office:value-type="float" office:value="21.64" calcext:value-type="float">
            <text:p>21.64</text:p>
          </table:table-cell>
          <table:table-cell office:value-type="float" office:value="1537.59" calcext:value-type="float">
            <text:p>1537.59</text:p>
          </table:table-cell>
          <table:table-cell/>
          <table:table-cell office:value-type="string" calcext:value-type="string">
            <text:p>t_stop</text:p>
          </table:table-cell>
          <table:table-cell table:formula="of:=[.B193]" office:value-type="float" office:value="341.87" calcext:value-type="float">
            <text:p>341.87</text:p>
          </table:table-cell>
          <table:table-cell table:number-columns-repeated="2"/>
          <table:table-cell office:value-type="string" calcext:value-type="string">
            <text:p>ERRORE MASSA</text:p>
          </table:table-cell>
          <table:table-cell table:number-columns-repeated="8"/>
          <table:table-cell office:value-type="float" office:value="20.22" calcext:value-type="float">
            <text:p>20.22</text:p>
          </table:table-cell>
          <table:table-cell table:formula="of:=[.S174]+[.R175]" office:value-type="float" office:value="20.22" calcext:value-type="float">
            <text:p>20.22</text:p>
          </table:table-cell>
          <table:table-cell office:value-type="float" office:value="1471.71" calcext:value-type="float">
            <text:p>1471.71</text:p>
          </table:table-cell>
          <table:table-cell/>
          <table:table-cell office:value-type="string" calcext:value-type="string">
            <text:p>t_stop</text:p>
          </table:table-cell>
          <table:table-cell table:formula="of:=[.S187]" office:value-type="float" office:value="205.4" calcext:value-type="float">
            <text:p>205.4</text:p>
          </table:table-cell>
          <table:table-cell table:number-columns-repeated="2"/>
          <table:table-cell office:value-type="string" calcext:value-type="string">
            <text:p>ERRORE MASSA</text:p>
          </table:table-cell>
          <table:table-cell table:number-columns-repeated="2"/>
        </table:table-row>
        <table:table-row table:style-name="ro1">
          <table:table-cell office:value-type="float" office:value="20.39" calcext:value-type="float">
            <text:p>20.39</text:p>
          </table:table-cell>
          <table:table-cell table:formula="of:=[.B175]+[.A176]" office:value-type="float" office:value="42.03" calcext:value-type="float">
            <text:p>42.03</text:p>
          </table:table-cell>
          <table:table-cell office:value-type="float" office:value="1537.31" calcext:value-type="float">
            <text:p>1537.31</text:p>
          </table:table-cell>
          <table:table-cell/>
          <table:table-cell office:value-type="string" calcext:value-type="string">
            <text:p>dt</text:p>
          </table:table-cell>
          <table:table-cell table:formula="of:=[.F175]-[.F174]" office:value-type="float" office:value="40.07" calcext:value-type="float">
            <text:p>40.07</text:p>
          </table:table-cell>
          <table:table-cell/>
          <table:table-cell office:value-type="string" calcext:value-type="string">
            <text:p>parte I</text:p>
          </table:table-cell>
          <table:table-cell table:number-matrix-columns-spanned="2" table:number-matrix-rows-spanned="2" table:formula="of:=LINEST([.C174:.C188];[.B174:.B188];1;1)" office:value-type="float" office:value="-0.0156402388367962" calcext:value-type="float">
            <text:p>-0.0156402388367962</text:p>
          </table:table-cell>
          <table:table-cell office:value-type="float" office:value="1537.99791881503" calcext:value-type="float">
            <text:p>1537.99791881503</text:p>
          </table:table-cell>
          <table:table-cell table:number-columns-repeated="7"/>
          <table:table-cell office:value-type="float" office:value="20.09" calcext:value-type="float">
            <text:p>20.09</text:p>
          </table:table-cell>
          <table:table-cell table:formula="of:=[.S175]+[.R176]" office:value-type="float" office:value="40.31" calcext:value-type="float">
            <text:p>40.31</text:p>
          </table:table-cell>
          <table:table-cell office:value-type="float" office:value="1471.47" calcext:value-type="float">
            <text:p>1471.47</text:p>
          </table:table-cell>
          <table:table-cell/>
          <table:table-cell office:value-type="string" calcext:value-type="string">
            <text:p>dt</text:p>
          </table:table-cell>
          <table:table-cell table:formula="of:=[.W175]-[.W174]" office:value-type="float" office:value="15.37" calcext:value-type="float">
            <text:p>15.37</text:p>
          </table:table-cell>
          <table:table-cell/>
          <table:table-cell office:value-type="string" calcext:value-type="string">
            <text:p>parte I</text:p>
          </table:table-cell>
          <table:table-cell table:number-matrix-columns-spanned="2" table:number-matrix-rows-spanned="2" table:formula="of:=LINEST([.T174:.T183];[.S174:.S183];1;1)" office:value-type="float" office:value="-0.0128146991732574" calcext:value-type="float">
            <text:p>-0.0128146991732574</text:p>
          </table:table-cell>
          <table:table-cell office:value-type="float" office:value="1471.97698838302" calcext:value-type="float">
            <text:p>1471.97698838302</text:p>
          </table:table-cell>
          <table:table-cell/>
        </table:table-row>
        <table:table-row table:style-name="ro1">
          <table:table-cell office:value-type="float" office:value="19.66" calcext:value-type="float">
            <text:p>19.66</text:p>
          </table:table-cell>
          <table:table-cell table:formula="of:=[.B176]+[.A177]" office:value-type="float" office:value="61.69" calcext:value-type="float">
            <text:p>61.69</text:p>
          </table:table-cell>
          <table:table-cell office:value-type="float" office:value="1536.98" calcext:value-type="float">
            <text:p>1536.98</text:p>
          </table:table-cell>
          <table:table-cell/>
          <table:table-cell office:value-type="string" calcext:value-type="string">
            <text:p>t_medio</text:p>
          </table:table-cell>
          <table:table-cell table:formula="of:=([.F174]+[.F175])/2" office:value-type="float" office:value="321.835" calcext:value-type="float">
            <text:p>321.835</text:p>
          </table:table-cell>
          <table:table-cell table:number-columns-repeated="2"/>
          <table:table-cell office:value-type="float" office:value="0.000214685050299103" calcext:value-type="float">
            <text:p>0.000214685050299103</text:p>
          </table:table-cell>
          <table:table-cell office:value-type="float" office:value="0.0356431055931303" calcext:value-type="float">
            <text:p>0.0356431055931303</text:p>
          </table:table-cell>
          <table:table-cell table:number-columns-repeated="7"/>
          <table:table-cell office:value-type="float" office:value="19.84" calcext:value-type="float">
            <text:p>19.84</text:p>
          </table:table-cell>
          <table:table-cell table:formula="of:=[.S176]+[.R177]" office:value-type="float" office:value="60.15" calcext:value-type="float">
            <text:p>60.15</text:p>
          </table:table-cell>
          <table:table-cell office:value-type="float" office:value="1471.21" calcext:value-type="float">
            <text:p>1471.21</text:p>
          </table:table-cell>
          <table:table-cell/>
          <table:table-cell office:value-type="string" calcext:value-type="string">
            <text:p>t_medio</text:p>
          </table:table-cell>
          <table:table-cell table:formula="of:=([.W174]+[.W175])/2" office:value-type="float" office:value="197.715" calcext:value-type="float">
            <text:p>197.715</text:p>
          </table:table-cell>
          <table:table-cell table:number-columns-repeated="2"/>
          <table:table-cell office:value-type="float" office:value="0.000343193089421816" calcext:value-type="float">
            <text:p>0.000343193089421816</text:p>
          </table:table-cell>
          <table:table-cell office:value-type="float" office:value="0.0367137263697277" calcext:value-type="float">
            <text:p>0.0367137263697277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B177]+[.A178]" office:value-type="float" office:value="81.89" calcext:value-type="float">
            <text:p>81.89</text:p>
          </table:table-cell>
          <table:table-cell office:value-type="float" office:value="1536.66" calcext:value-type="float">
            <text:p>1536.66</text:p>
          </table:table-cell>
          <table:table-cell table:number-columns-repeated="4"/>
          <table:table-cell office:value-type="string" calcext:value-type="string">
            <text:p>errmI</text:p>
          </table:table-cell>
          <table:table-cell table:formula="of:=[.F177]*[.I177]+[.J177]" office:value-type="float" office:value="0.104736268756142" calcext:value-type="float">
            <text:p>0.104736268756142</text:p>
          </table:table-cell>
          <table:table-cell table:number-columns-repeated="8"/>
          <table:table-cell office:value-type="float" office:value="20.03" calcext:value-type="float">
            <text:p>20.03</text:p>
          </table:table-cell>
          <table:table-cell table:formula="of:=[.S177]+[.R178]" office:value-type="float" office:value="80.18" calcext:value-type="float">
            <text:p>80.18</text:p>
          </table:table-cell>
          <table:table-cell office:value-type="float" office:value="1470.98" calcext:value-type="float">
            <text:p>1470.98</text:p>
          </table:table-cell>
          <table:table-cell table:number-columns-repeated="4"/>
          <table:table-cell office:value-type="string" calcext:value-type="string">
            <text:p>errmI</text:p>
          </table:table-cell>
          <table:table-cell table:formula="of:=[.W177]*[.Z177]+[.AA177]" office:value-type="float" office:value="0.104568148044762" calcext:value-type="float">
            <text:p>0.104568148044762</text:p>
          </table:table-cell>
          <table:table-cell table:number-columns-repeated="2"/>
        </table:table-row>
        <table:table-row table:style-name="ro1">
          <table:table-cell office:value-type="float" office:value="19.72" calcext:value-type="float">
            <text:p>19.72</text:p>
          </table:table-cell>
          <table:table-cell table:formula="of:=[.B178]+[.A179]" office:value-type="float" office:value="101.61" calcext:value-type="float">
            <text:p>101.61</text:p>
          </table:table-cell>
          <table:table-cell office:value-type="float" office:value="1536.36" calcext:value-type="float">
            <text:p>1536.36</text:p>
          </table:table-cell>
          <table:table-cell/>
          <table:table-cell office:value-type="string" calcext:value-type="string">
            <text:p>PENDENZA1</text:p>
          </table:table-cell>
          <table:table-cell table:formula="of:=SLOPE([.C174:.C188];[.B174:.B188])" office:value-type="float" office:value="-0.0156402388367962" calcext:value-type="float">
            <text:p>-0.0156402388367962</text:p>
          </table:table-cell>
          <table:table-cell table:number-columns-repeated="11"/>
          <table:table-cell office:value-type="float" office:value="19.94" calcext:value-type="float">
            <text:p>19.94</text:p>
          </table:table-cell>
          <table:table-cell table:formula="of:=[.S178]+[.R179]" office:value-type="float" office:value="100.12" calcext:value-type="float">
            <text:p>100.12</text:p>
          </table:table-cell>
          <table:table-cell office:value-type="float" office:value="1470.74" calcext:value-type="float">
            <text:p>1470.74</text:p>
          </table:table-cell>
          <table:table-cell/>
          <table:table-cell office:value-type="string" calcext:value-type="string">
            <text:p>PENDENZA1</text:p>
          </table:table-cell>
          <table:table-cell table:formula="of:=SLOPE([.T174:.T183];[.S174:.S183])" office:value-type="float" office:value="-0.0128146991732574" calcext:value-type="float">
            <text:p>-0.0128146991732574</text:p>
          </table:table-cell>
          <table:table-cell table:number-columns-repeated="5"/>
        </table:table-row>
        <table:table-row table:style-name="ro1">
          <table:table-cell office:value-type="float" office:value="19.93" calcext:value-type="float">
            <text:p>19.93</text:p>
          </table:table-cell>
          <table:table-cell table:formula="of:=[.B179]+[.A180]" office:value-type="float" office:value="121.54" calcext:value-type="float">
            <text:p>121.54</text:p>
          </table:table-cell>
          <table:table-cell office:value-type="float" office:value="1536.06" calcext:value-type="float">
            <text:p>1536.06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C174:.C188];[.B174:.B188])" office:value-type="float" office:value="1537.99791881503" calcext:value-type="float">
            <text:p>1537.99791881503</text:p>
          </table:table-cell>
          <table:table-cell/>
          <table:table-cell office:value-type="string" calcext:value-type="string">
            <text:p>parte III</text:p>
          </table:table-cell>
          <table:table-cell table:number-matrix-columns-spanned="2" table:number-matrix-rows-spanned="2" table:formula="of:=LINEST([.C194:.C208];[.B194:.B208];1;1)" office:value-type="float" office:value="-0.0108346332780463" calcext:value-type="float">
            <text:p>-0.0108346332780463</text:p>
          </table:table-cell>
          <table:table-cell office:value-type="float" office:value="1529.49406690474" calcext:value-type="float">
            <text:p>1529.49406690474</text:p>
          </table:table-cell>
          <table:table-cell table:number-columns-repeated="7"/>
          <table:table-cell office:value-type="float" office:value="20.17" calcext:value-type="float">
            <text:p>20.17</text:p>
          </table:table-cell>
          <table:table-cell table:formula="of:=[.S179]+[.R180]" office:value-type="float" office:value="120.29" calcext:value-type="float">
            <text:p>120.29</text:p>
          </table:table-cell>
          <table:table-cell office:value-type="float" office:value="1470.48" calcext:value-type="float">
            <text:p>1470.48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T174:.T183];[.S174:.S183])" office:value-type="float" office:value="1471.97698838302" calcext:value-type="float">
            <text:p>1471.97698838302</text:p>
          </table:table-cell>
          <table:table-cell/>
          <table:table-cell office:value-type="string" calcext:value-type="string">
            <text:p>parte III</text:p>
          </table:table-cell>
          <table:table-cell table:number-matrix-columns-spanned="2" table:number-matrix-rows-spanned="2" table:formula="of:=LINEST([.T188:.T204];[.S188:.S204];1;1)" office:value-type="float" office:value="-0.00669089944053993" calcext:value-type="float">
            <text:p>-0.00669089944053993</text:p>
          </table:table-cell>
          <table:table-cell office:value-type="float" office:value="1463.70713884415" calcext:value-type="float">
            <text:p>1463.70713884415</text:p>
          </table:table-cell>
          <table:table-cell/>
        </table:table-row>
        <table:table-row table:style-name="ro1">
          <table:table-cell office:value-type="float" office:value="20.05" calcext:value-type="float">
            <text:p>20.05</text:p>
          </table:table-cell>
          <table:table-cell table:formula="of:=[.B180]+[.A181]" office:value-type="float" office:value="141.59" calcext:value-type="float">
            <text:p>141.59</text:p>
          </table:table-cell>
          <table:table-cell office:value-type="float" office:value="1535.76" calcext:value-type="float">
            <text:p>1535.76</text:p>
          </table:table-cell>
          <table:table-cell table:number-columns-repeated="5"/>
          <table:table-cell office:value-type="float" office:value="0.000351137921226481" calcext:value-type="float">
            <text:p>0.000351137921226481</text:p>
          </table:table-cell>
          <table:table-cell office:value-type="float" office:value="0.15886034873065" calcext:value-type="float">
            <text:p>0.15886034873065</text:p>
          </table:table-cell>
          <table:table-cell table:number-columns-repeated="7"/>
          <table:table-cell office:value-type="float" office:value="19.9" calcext:value-type="float">
            <text:p>19.9</text:p>
          </table:table-cell>
          <table:table-cell table:formula="of:=[.S180]+[.R181]" office:value-type="float" office:value="140.19" calcext:value-type="float">
            <text:p>140.19</text:p>
          </table:table-cell>
          <table:table-cell office:value-type="float" office:value="1470.21" calcext:value-type="float">
            <text:p>1470.21</text:p>
          </table:table-cell>
          <table:table-cell table:number-columns-repeated="5"/>
          <table:table-cell office:value-type="float" office:value="0.000223834527079763" calcext:value-type="float">
            <text:p>0.000223834527079763</text:p>
          </table:table-cell>
          <table:table-cell office:value-type="float" office:value="0.0597754407024508" calcext:value-type="float">
            <text:p>0.0597754407024508</text:p>
          </table:table-cell>
          <table:table-cell/>
        </table:table-row>
        <table:table-row table:style-name="ro1">
          <table:table-cell office:value-type="float" office:value="20.26" calcext:value-type="float">
            <text:p>20.26</text:p>
          </table:table-cell>
          <table:table-cell table:formula="of:=[.B181]+[.A182]" office:value-type="float" office:value="161.85" calcext:value-type="float">
            <text:p>161.85</text:p>
          </table:table-cell>
          <table:table-cell table:style-name="ce3" office:value-type="float" office:value="1535.5" calcext:value-type="float">
            <text:p>1535.50</text:p>
          </table:table-cell>
          <table:table-cell/>
          <table:table-cell office:value-type="string" calcext:value-type="string">
            <text:p>PENDENZA3</text:p>
          </table:table-cell>
          <table:table-cell table:formula="of:=SLOPE([.C194:.C208];[.B194:.B208])" office:value-type="float" office:value="-0.0108346332780463" calcext:value-type="float">
            <text:p>-0.0108346332780463</text:p>
          </table:table-cell>
          <table:table-cell/>
          <table:table-cell office:value-type="string" calcext:value-type="string">
            <text:p>errmIII</text:p>
          </table:table-cell>
          <table:table-cell table:formula="of:=[.F177]*[.I181]+[.J181]" office:value-type="float" office:value="0.271868821608574" calcext:value-type="float">
            <text:p>0.271868821608574</text:p>
          </table:table-cell>
          <table:table-cell table:number-columns-repeated="8"/>
          <table:table-cell office:value-type="float" office:value="20.07" calcext:value-type="float">
            <text:p>20.07</text:p>
          </table:table-cell>
          <table:table-cell table:formula="of:=[.S181]+[.R182]" office:value-type="float" office:value="160.26" calcext:value-type="float">
            <text:p>160.26</text:p>
          </table:table-cell>
          <table:table-cell office:value-type="float" office:value="1469.97" calcext:value-type="float">
            <text:p>1469.97</text:p>
          </table:table-cell>
          <table:table-cell/>
          <table:table-cell office:value-type="string" calcext:value-type="string">
            <text:p>PENDENZA3</text:p>
          </table:table-cell>
          <table:table-cell table:formula="of:=SLOPE([.T188:.T204];[.S188:.S204])" office:value-type="float" office:value="-0.00669089944053993" calcext:value-type="float">
            <text:p>-0.00669089944053993</text:p>
          </table:table-cell>
          <table:table-cell/>
          <table:table-cell office:value-type="string" calcext:value-type="string">
            <text:p>errmIII</text:p>
          </table:table-cell>
          <table:table-cell table:formula="of:=[.W177]*[.Z181]+[.AA181]" office:value-type="float" office:value="0.104030884224026" calcext:value-type="float">
            <text:p>0.104030884224026</text:p>
          </table:table-cell>
          <table:table-cell table:number-columns-repeated="2"/>
        </table:table-row>
        <table:table-row table:style-name="ro1">
          <table:table-cell office:value-type="float" office:value="19.85" calcext:value-type="float">
            <text:p>19.85</text:p>
          </table:table-cell>
          <table:table-cell table:formula="of:=[.B182]+[.A183]" office:value-type="float" office:value="181.7" calcext:value-type="float">
            <text:p>181.7</text:p>
          </table:table-cell>
          <table:table-cell office:value-type="float" office:value="1535.18" calcext:value-type="float">
            <text:p>1535.18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C194:.C208];[.B194:.B208])" office:value-type="float" office:value="1529.49406690474" calcext:value-type="float">
            <text:p>1529.49406690474</text:p>
          </table:table-cell>
          <table:table-cell table:number-columns-repeated="11"/>
          <table:table-cell office:value-type="float" office:value="20.1" calcext:value-type="float">
            <text:p>20.1</text:p>
          </table:table-cell>
          <table:table-cell table:formula="of:=[.S182]+[.R183]" office:value-type="float" office:value="180.36" calcext:value-type="float">
            <text:p>180.36</text:p>
          </table:table-cell>
          <table:table-cell office:value-type="float" office:value="1469.53" calcext:value-type="float">
            <text:p>1469.53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T188:.T204];[.S188:.S204])" office:value-type="float" office:value="1463.70713884415" calcext:value-type="float">
            <text:p>1463.70713884415</text:p>
          </table:table-cell>
          <table:table-cell table:number-columns-repeated="5"/>
        </table:table-row>
        <table:table-row table:style-name="ro1">
          <table:table-cell office:value-type="float" office:value="19.98" calcext:value-type="float">
            <text:p>19.98</text:p>
          </table:table-cell>
          <table:table-cell table:formula="of:=[.B183]+[.A184]" office:value-type="float" office:value="201.68" calcext:value-type="float">
            <text:p>201.68</text:p>
          </table:table-cell>
          <table:table-cell office:value-type="float" office:value="1534.88" calcext:value-type="float">
            <text:p>1534.88</text:p>
          </table:table-cell>
          <table:table-cell table:number-columns-repeated="14"/>
          <table:table-cell table:style-name="ce10" office:value-type="float" office:value="9.67" calcext:value-type="float">
            <text:p>9.67</text:p>
          </table:table-cell>
          <table:table-cell table:style-name="ce10" table:formula="of:=[.S183]+[.R184]" office:value-type="float" office:value="190.03" calcext:value-type="float">
            <text:p>190.03</text:p>
          </table:table-cell>
          <table:table-cell table:style-name="ce10" office:value-type="float" office:value="1466.46" calcext:value-type="float">
            <text:p>1466.46</text:p>
          </table:table-cell>
          <table:table-cell office:value-type="string" calcext:value-type="string">
            <text:p>IMMERSO</text:p>
          </table:table-cell>
          <table:table-cell table:number-columns-repeated="7"/>
        </table:table-row>
        <table:table-row table:style-name="ro1">
          <table:table-cell office:value-type="float" office:value="20.13" calcext:value-type="float">
            <text:p>20.13</text:p>
          </table:table-cell>
          <table:table-cell table:formula="of:=[.B184]+[.A185]" office:value-type="float" office:value="221.81" calcext:value-type="float">
            <text:p>221.81</text:p>
          </table:table-cell>
          <table:table-cell office:value-type="float" office:value="1534.56" calcext:value-type="float">
            <text:p>1534.56</text:p>
          </table:table-cell>
          <table:table-cell/>
          <table:table-cell office:value-type="string" calcext:value-type="string">
            <text:p>massa_i_extrp</text:p>
          </table:table-cell>
          <table:table-cell table:formula="of:=[.F180]+[.F179]*[.F177]" office:value-type="float" office:value="1532.96434254899" calcext:value-type="float">
            <text:p>1532.96434254899</text:p>
          </table:table-cell>
          <table:table-cell/>
          <table:table-cell office:value-type="string" calcext:value-type="string">
            <text:p>errmtot</text:p>
          </table:table-cell>
          <table:table-cell table:formula="of:=[.I182]+[.I178]" office:value-type="float" office:value="0.376605090364716" calcext:value-type="float">
            <text:p>0.376605090364716</text:p>
          </table:table-cell>
          <table:table-cell table:number-columns-repeated="8"/>
          <table:table-cell office:value-type="float" office:value="5.14" calcext:value-type="float">
            <text:p>5.14</text:p>
          </table:table-cell>
          <table:table-cell table:formula="of:=[.S184]+[.R185]" office:value-type="float" office:value="195.17" calcext:value-type="float">
            <text:p>195.17</text:p>
          </table:table-cell>
          <table:table-cell office:value-type="float" office:value="1465.09" calcext:value-type="float">
            <text:p>1465.09</text:p>
          </table:table-cell>
          <table:table-cell/>
          <table:table-cell office:value-type="string" calcext:value-type="string">
            <text:p>massa_i_extrp</text:p>
          </table:table-cell>
          <table:table-cell table:formula="of:=[.W180]+[.W179]*[.W177]" office:value-type="float" office:value="1469.44333013598" calcext:value-type="float">
            <text:p>1469.44333013598</text:p>
          </table:table-cell>
          <table:table-cell/>
          <table:table-cell office:value-type="string" calcext:value-type="string">
            <text:p>errmtot</text:p>
          </table:table-cell>
          <table:table-cell table:formula="of:=[.Z182]+[.Z178]" office:value-type="float" office:value="0.208599032268788" calcext:value-type="float">
            <text:p>0.208599032268788</text:p>
          </table:table-cell>
          <table:table-cell table:number-columns-repeated="2"/>
        </table:table-row>
        <table:table-row table:style-name="ro1">
          <table:table-cell office:value-type="float" office:value="20.08" calcext:value-type="float">
            <text:p>20.08</text:p>
          </table:table-cell>
          <table:table-cell table:formula="of:=[.B185]+[.A186]" office:value-type="float" office:value="241.89" calcext:value-type="float">
            <text:p>241.89</text:p>
          </table:table-cell>
          <table:table-cell office:value-type="float" office:value="1534.15" calcext:value-type="float">
            <text:p>1534.15</text:p>
          </table:table-cell>
          <table:table-cell/>
          <table:table-cell office:value-type="string" calcext:value-type="string">
            <text:p>massa_f_extrp</text:p>
          </table:table-cell>
          <table:table-cell table:formula="of:=[.F183]+[.F182]*[.F177]" office:value-type="float" office:value="1526.0071027037" calcext:value-type="float">
            <text:p>1526.0071027037</text:p>
          </table:table-cell>
          <table:table-cell table:number-columns-repeated="11"/>
          <table:table-cell office:value-type="float" office:value="4.89" calcext:value-type="float">
            <text:p>4.89</text:p>
          </table:table-cell>
          <table:table-cell table:formula="of:=[.S185]+[.R186]" office:value-type="float" office:value="200.06" calcext:value-type="float">
            <text:p>200.06</text:p>
          </table:table-cell>
          <table:table-cell office:value-type="float" office:value="1463.77" calcext:value-type="float">
            <text:p>1463.77</text:p>
          </table:table-cell>
          <table:table-cell/>
          <table:table-cell office:value-type="string" calcext:value-type="string">
            <text:p>massa_f_extrp</text:p>
          </table:table-cell>
          <table:table-cell table:formula="of:=[.W183]+[.W182]*[.W177]" office:value-type="float" office:value="1462.38424766127" calcext:value-type="float">
            <text:p>1462.38424766127</text:p>
          </table:table-cell>
          <table:table-cell table:number-columns-repeated="5"/>
        </table:table-row>
        <table:table-row table:style-name="ro1">
          <table:table-cell office:value-type="float" office:value="19.91" calcext:value-type="float">
            <text:p>19.91</text:p>
          </table:table-cell>
          <table:table-cell table:formula="of:=[.B186]+[.A187]" office:value-type="float" office:value="261.8" calcext:value-type="float">
            <text:p>261.8</text:p>
          </table:table-cell>
          <table:table-cell office:value-type="float" office:value="1533.95" calcext:value-type="float">
            <text:p>1533.95</text:p>
          </table:table-cell>
          <table:table-cell table:number-columns-repeated="14"/>
          <table:table-cell office:value-type="float" office:value="5.34" calcext:value-type="float">
            <text:p>5.34</text:p>
          </table:table-cell>
          <table:table-cell table:formula="of:=[.S186]+[.R187]" office:value-type="float" office:value="205.4" calcext:value-type="float">
            <text:p>205.4</text:p>
          </table:table-cell>
          <table:table-cell office:value-type="float" office:value="1462.67" calcext:value-type="float">
            <text:p>1462.67</text:p>
          </table:table-cell>
          <table:table-cell office:value-type="string" calcext:value-type="string">
            <text:p>EQ</text:p>
          </table:table-cell>
          <table:table-cell table:number-columns-repeated="7"/>
        </table:table-row>
        <table:table-row table:style-name="ro1">
          <table:table-cell office:value-type="float" office:value="20.05" calcext:value-type="float">
            <text:p>20.05</text:p>
          </table:table-cell>
          <table:table-cell table:formula="of:=[.B187]+[.A188]" office:value-type="float" office:value="281.85" calcext:value-type="float">
            <text:p>281.85</text:p>
          </table:table-cell>
          <table:table-cell office:value-type="float" office:value="1533.6" calcext:value-type="float">
            <text:p>1533.6</text:p>
          </table:table-cell>
          <table:table-cell/>
          <table:table-cell office:value-type="string" calcext:value-type="string">
            <text:p>massa netta evap</text:p>
          </table:table-cell>
          <table:table-cell table:formula="of:=[.F185]-[.F186]" office:value-type="float" office:value="6.95723984528945" calcext:value-type="float">
            <text:p>6.95723984528945</text:p>
          </table:table-cell>
          <table:table-cell table:number-columns-repeated="11"/>
          <table:table-cell office:value-type="float" office:value="5.12" calcext:value-type="float">
            <text:p>5.12</text:p>
          </table:table-cell>
          <table:table-cell table:formula="of:=[.S187]+[.R188]" office:value-type="float" office:value="210.52" calcext:value-type="float">
            <text:p>210.52</text:p>
          </table:table-cell>
          <table:table-cell office:value-type="float" office:value="1462.4" calcext:value-type="float">
            <text:p>1462.4</text:p>
          </table:table-cell>
          <table:table-cell/>
          <table:table-cell office:value-type="string" calcext:value-type="string">
            <text:p>massa netta evap</text:p>
          </table:table-cell>
          <table:table-cell table:formula="of:=[.W185]-[.W186]" office:value-type="float" office:value="7.05908247471416" calcext:value-type="float">
            <text:p>7.05908247471416</text:p>
          </table:table-cell>
          <table:table-cell table:number-columns-repeated="5"/>
        </table:table-row>
        <table:table-row table:style-name="ro1">
          <table:table-cell table:style-name="ce10" office:value-type="float" office:value="19.95" calcext:value-type="float">
            <text:p>19.95</text:p>
          </table:table-cell>
          <table:table-cell table:style-name="ce10" table:formula="of:=[.B188]+[.A189]" office:value-type="float" office:value="301.8" calcext:value-type="float">
            <text:p>301.8</text:p>
          </table:table-cell>
          <table:table-cell table:style-name="ce10" office:value-type="float" office:value="1533.24" calcext:value-type="float">
            <text:p>1533.24</text:p>
          </table:table-cell>
          <table:table-cell office:value-type="string" calcext:value-type="string">
            <text:p>IMMERSO</text:p>
          </table:table-cell>
          <table:table-cell table:number-columns-repeated="13"/>
          <table:table-cell office:value-type="float" office:value="4.79" calcext:value-type="float">
            <text:p>4.79</text:p>
          </table:table-cell>
          <table:table-cell table:formula="of:=[.S188]+[.R189]" office:value-type="float" office:value="215.31" calcext:value-type="float">
            <text:p>215.31</text:p>
          </table:table-cell>
          <table:table-cell office:value-type="float" office:value="1462.28" calcext:value-type="float">
            <text:p>1462.2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89]+[.A190]" office:value-type="float" office:value="311.8" calcext:value-type="float">
            <text:p>311.8</text:p>
          </table:table-cell>
          <table:table-cell office:value-type="float" office:value="1531" calcext:value-type="float">
            <text:p>1531</text:p>
          </table:table-cell>
          <table:table-cell table:number-columns-repeated="14"/>
          <table:table-cell office:value-type="float" office:value="4.8" calcext:value-type="float">
            <text:p>4.8</text:p>
          </table:table-cell>
          <table:table-cell table:formula="of:=[.S189]+[.R190]" office:value-type="float" office:value="220.11" calcext:value-type="float">
            <text:p>220.11</text:p>
          </table:table-cell>
          <table:table-cell office:value-type="float" office:value="1462.2" calcext:value-type="float">
            <text:p>1462.2</text:p>
          </table:table-cell>
          <table:table-cell table:number-columns-repeated="8"/>
        </table:table-row>
        <table:table-row table:style-name="ro1">
          <table:table-cell office:value-type="float" office:value="9.83" calcext:value-type="float">
            <text:p>9.83</text:p>
          </table:table-cell>
          <table:table-cell table:formula="of:=[.B190]+[.A191]" office:value-type="float" office:value="321.63" calcext:value-type="float">
            <text:p>321.63</text:p>
          </table:table-cell>
          <table:table-cell office:value-type="float" office:value="1529" calcext:value-type="float">
            <text:p>1529</text:p>
          </table:table-cell>
          <table:table-cell/>
          <table:table-cell office:value-type="string" calcext:value-type="string">
            <text:p>calore specifico</text:p>
          </table:table-cell>
          <table:table-cell table:formula="of:=([.F188]*[.F172])/([.F171]*([.H171]-[.H172]))*([.H173]/4.184)" office:value-type="float" office:value="7.07408062532949" calcext:value-type="float">
            <text:p>7.07408062532949</text:p>
          </table:table-cell>
          <table:table-cell office:value-type="string" calcext:value-type="string">
            <text:p>+-0.858</text:p>
          </table:table-cell>
          <table:table-cell table:number-columns-repeated="10"/>
          <table:table-cell office:value-type="float" office:value="5.13" calcext:value-type="float">
            <text:p>5.13</text:p>
          </table:table-cell>
          <table:table-cell table:formula="of:=[.S190]+[.R191]" office:value-type="float" office:value="225.24" calcext:value-type="float">
            <text:p>225.24</text:p>
          </table:table-cell>
          <table:table-cell office:value-type="float" office:value="1462.17" calcext:value-type="float">
            <text:p>1462.17</text:p>
          </table:table-cell>
          <table:table-cell/>
          <table:table-cell office:value-type="string" calcext:value-type="string">
            <text:p>calore specifico</text:p>
          </table:table-cell>
          <table:table-cell table:formula="of:=([.W188]*[.W172])/([.W171]*([.Y171]-[.Y172]))*([.Y173]/4.184)" office:value-type="float" office:value="7.1776336129606" calcext:value-type="float">
            <text:p>7.1776336129606</text:p>
          </table:table-cell>
          <table:table-cell office:value-type="string" calcext:value-type="string">
            <text:p>+-0.694</text:p>
          </table:table-cell>
          <table:table-cell table:number-columns-repeated="4"/>
        </table:table-row>
        <table:table-row table:style-name="ro1">
          <table:table-cell office:value-type="float" office:value="9.93" calcext:value-type="float">
            <text:p>9.93</text:p>
          </table:table-cell>
          <table:table-cell table:formula="of:=[.B191]+[.A192]" office:value-type="float" office:value="331.56" calcext:value-type="float">
            <text:p>331.56</text:p>
          </table:table-cell>
          <table:table-cell office:value-type="float" office:value="1526.04" calcext:value-type="float">
            <text:p>1526.04</text:p>
          </table:table-cell>
          <table:table-cell table:number-columns-repeated="14"/>
          <table:table-cell office:value-type="float" office:value="4.86" calcext:value-type="float">
            <text:p>4.86</text:p>
          </table:table-cell>
          <table:table-cell table:formula="of:=[.S191]+[.R192]" office:value-type="float" office:value="230.1" calcext:value-type="float">
            <text:p>230.1</text:p>
          </table:table-cell>
          <table:table-cell office:value-type="float" office:value="1462.14" calcext:value-type="float">
            <text:p>1462.14</text:p>
          </table:table-cell>
          <table:table-cell table:number-columns-repeated="8"/>
        </table:table-row>
        <table:table-row table:style-name="ro1">
          <table:table-cell office:value-type="float" office:value="10.31" calcext:value-type="float">
            <text:p>10.31</text:p>
          </table:table-cell>
          <table:table-cell table:formula="of:=[.B192]+[.A193]" office:value-type="float" office:value="341.87" calcext:value-type="float">
            <text:p>341.87</text:p>
          </table:table-cell>
          <table:table-cell office:value-type="float" office:value="1525.6" calcext:value-type="float">
            <text:p>1525.6</text:p>
          </table:table-cell>
          <table:table-cell office:value-type="string" calcext:value-type="string">
            <text:p>EQ</text:p>
          </table:table-cell>
          <table:table-cell table:number-columns-repeated="13"/>
          <table:table-cell office:value-type="float" office:value="5.17" calcext:value-type="float">
            <text:p>5.17</text:p>
          </table:table-cell>
          <table:table-cell table:formula="of:=[.S192]+[.R193]" office:value-type="float" office:value="235.27" calcext:value-type="float">
            <text:p>235.27</text:p>
          </table:table-cell>
          <table:table-cell office:value-type="float" office:value="1462.09" calcext:value-type="float">
            <text:p>1462.09</text:p>
          </table:table-cell>
          <table:table-cell table:number-columns-repeated="8"/>
        </table:table-row>
        <table:table-row table:style-name="ro1">
          <table:table-cell office:value-type="float" office:value="9.61" calcext:value-type="float">
            <text:p>9.61</text:p>
          </table:table-cell>
          <table:table-cell table:formula="of:=[.B193]+[.A194]" office:value-type="float" office:value="351.48" calcext:value-type="float">
            <text:p>351.48</text:p>
          </table:table-cell>
          <table:table-cell office:value-type="float" office:value="1525.52" calcext:value-type="float">
            <text:p>1525.52</text:p>
          </table:table-cell>
          <table:table-cell table:number-columns-repeated="14"/>
          <table:table-cell office:value-type="float" office:value="4.93" calcext:value-type="float">
            <text:p>4.93</text:p>
          </table:table-cell>
          <table:table-cell table:formula="of:=[.S193]+[.R194]" office:value-type="float" office:value="240.2" calcext:value-type="float">
            <text:p>240.2</text:p>
          </table:table-cell>
          <table:table-cell office:value-type="float" office:value="1462.09" calcext:value-type="float">
            <text:p>1462.09</text:p>
          </table:table-cell>
          <table:table-cell table:number-columns-repeated="8"/>
        </table:table-row>
        <table:table-row table:style-name="ro1">
          <table:table-cell office:value-type="float" office:value="10.06" calcext:value-type="float">
            <text:p>10.06</text:p>
          </table:table-cell>
          <table:table-cell table:formula="of:=[.B194]+[.A195]" office:value-type="float" office:value="361.54" calcext:value-type="float">
            <text:p>361.54</text:p>
          </table:table-cell>
          <table:table-cell office:value-type="float" office:value="1525.46" calcext:value-type="float">
            <text:p>1525.46</text:p>
          </table:table-cell>
          <table:table-cell table:number-columns-repeated="14"/>
          <table:table-cell office:value-type="float" office:value="5.14" calcext:value-type="float">
            <text:p>5.14</text:p>
          </table:table-cell>
          <table:table-cell table:formula="of:=[.S194]+[.R195]" office:value-type="float" office:value="245.34" calcext:value-type="float">
            <text:p>245.34</text:p>
          </table:table-cell>
          <table:table-cell office:value-type="float" office:value="1462.07" calcext:value-type="float">
            <text:p>1462.07</text:p>
          </table:table-cell>
          <table:table-cell table:number-columns-repeated="8"/>
        </table:table-row>
        <table:table-row table:style-name="ro1">
          <table:table-cell office:value-type="float" office:value="10.38" calcext:value-type="float">
            <text:p>10.38</text:p>
          </table:table-cell>
          <table:table-cell table:formula="of:=[.B195]+[.A196]" office:value-type="float" office:value="371.92" calcext:value-type="float">
            <text:p>371.92</text:p>
          </table:table-cell>
          <table:table-cell office:value-type="float" office:value="1525.41" calcext:value-type="float">
            <text:p>1525.41</text:p>
          </table:table-cell>
          <table:table-cell table:number-columns-repeated="14"/>
          <table:table-cell office:value-type="float" office:value="4.99" calcext:value-type="float">
            <text:p>4.99</text:p>
          </table:table-cell>
          <table:table-cell table:formula="of:=[.S195]+[.R196]" office:value-type="float" office:value="250.33" calcext:value-type="float">
            <text:p>250.33</text:p>
          </table:table-cell>
          <table:table-cell office:value-type="float" office:value="1462.01" calcext:value-type="float">
            <text:p>1462.01</text:p>
          </table:table-cell>
          <table:table-cell table:number-columns-repeated="8"/>
        </table:table-row>
        <table:table-row table:style-name="ro1">
          <table:table-cell office:value-type="float" office:value="9.58" calcext:value-type="float">
            <text:p>9.58</text:p>
          </table:table-cell>
          <table:table-cell table:formula="of:=[.B196]+[.A197]" office:value-type="float" office:value="381.5" calcext:value-type="float">
            <text:p>381.5</text:p>
          </table:table-cell>
          <table:table-cell office:value-type="float" office:value="1525.35" calcext:value-type="float">
            <text:p>1525.35</text:p>
          </table:table-cell>
          <table:table-cell table:number-columns-repeated="14"/>
          <table:table-cell office:value-type="float" office:value="9.93" calcext:value-type="float">
            <text:p>9.93</text:p>
          </table:table-cell>
          <table:table-cell table:formula="of:=[.S196]+[.R197]" office:value-type="float" office:value="260.26" calcext:value-type="float">
            <text:p>260.26</text:p>
          </table:table-cell>
          <table:table-cell office:value-type="float" office:value="1461.96" calcext:value-type="float">
            <text:p>1461.96</text:p>
          </table:table-cell>
          <table:table-cell table:number-columns-repeated="8"/>
        </table:table-row>
        <table:table-row table:style-name="ro1">
          <table:table-cell office:value-type="float" office:value="10.01" calcext:value-type="float">
            <text:p>10.01</text:p>
          </table:table-cell>
          <table:table-cell table:formula="of:=[.B197]+[.A198]" office:value-type="float" office:value="391.51" calcext:value-type="float">
            <text:p>391.51</text:p>
          </table:table-cell>
          <table:table-cell office:value-type="float" office:value="1525.29" calcext:value-type="float">
            <text:p>1525.29</text:p>
          </table:table-cell>
          <table:table-cell table:number-columns-repeated="14"/>
          <table:table-cell office:value-type="float" office:value="10.07" calcext:value-type="float">
            <text:p>10.07</text:p>
          </table:table-cell>
          <table:table-cell table:formula="of:=[.S197]+[.R198]" office:value-type="float" office:value="270.33" calcext:value-type="float">
            <text:p>270.33</text:p>
          </table:table-cell>
          <table:table-cell office:value-type="float" office:value="1461.9" calcext:value-type="float">
            <text:p>1461.9</text:p>
          </table:table-cell>
          <table:table-cell table:number-columns-repeated="8"/>
        </table:table-row>
        <table:table-row table:style-name="ro1">
          <table:table-cell office:value-type="float" office:value="10.03" calcext:value-type="float">
            <text:p>10.03</text:p>
          </table:table-cell>
          <table:table-cell table:formula="of:=[.B198]+[.A199]" office:value-type="float" office:value="401.54" calcext:value-type="float">
            <text:p>401.54</text:p>
          </table:table-cell>
          <table:table-cell office:value-type="float" office:value="1525.22" calcext:value-type="float">
            <text:p>1525.22</text:p>
          </table:table-cell>
          <table:table-cell table:number-columns-repeated="14"/>
          <table:table-cell office:value-type="float" office:value="10.51" calcext:value-type="float">
            <text:p>10.51</text:p>
          </table:table-cell>
          <table:table-cell table:formula="of:=[.S198]+[.R199]" office:value-type="float" office:value="280.84" calcext:value-type="float">
            <text:p>280.84</text:p>
          </table:table-cell>
          <table:table-cell office:value-type="float" office:value="1461.83" calcext:value-type="float">
            <text:p>1461.83</text:p>
          </table:table-cell>
          <table:table-cell table:number-columns-repeated="8"/>
        </table:table-row>
        <table:table-row table:style-name="ro1">
          <table:table-cell office:value-type="float" office:value="10.16" calcext:value-type="float">
            <text:p>10.16</text:p>
          </table:table-cell>
          <table:table-cell table:formula="of:=[.B199]+[.A200]" office:value-type="float" office:value="411.7" calcext:value-type="float">
            <text:p>411.7</text:p>
          </table:table-cell>
          <table:table-cell office:value-type="float" office:value="1525.12" calcext:value-type="float">
            <text:p>1525.12</text:p>
          </table:table-cell>
          <table:table-cell table:number-columns-repeated="14"/>
          <table:table-cell office:value-type="float" office:value="19.36" calcext:value-type="float">
            <text:p>19.36</text:p>
          </table:table-cell>
          <table:table-cell table:formula="of:=[.S199]+[.R200]" office:value-type="float" office:value="300.2" calcext:value-type="float">
            <text:p>300.2</text:p>
          </table:table-cell>
          <table:table-cell office:value-type="float" office:value="1461.74" calcext:value-type="float">
            <text:p>1461.74</text:p>
          </table:table-cell>
          <table:table-cell table:number-columns-repeated="8"/>
        </table:table-row>
        <table:table-row table:style-name="ro1">
          <table:table-cell office:value-type="float" office:value="20.4" calcext:value-type="float">
            <text:p>20.4</text:p>
          </table:table-cell>
          <table:table-cell table:formula="of:=[.B200]+[.A201]" office:value-type="float" office:value="432.1" calcext:value-type="float">
            <text:p>432.1</text:p>
          </table:table-cell>
          <table:table-cell office:value-type="float" office:value="1524.91" calcext:value-type="float">
            <text:p>1524.91</text:p>
          </table:table-cell>
          <table:table-cell table:number-columns-repeated="14"/>
          <table:table-cell office:value-type="float" office:value="10.22" calcext:value-type="float">
            <text:p>10.22</text:p>
          </table:table-cell>
          <table:table-cell table:formula="of:=[.S200]+[.R201]" office:value-type="float" office:value="310.42" calcext:value-type="float">
            <text:p>310.42</text:p>
          </table:table-cell>
          <table:table-cell office:value-type="float" office:value="1461.66" calcext:value-type="float">
            <text:p>1461.66</text:p>
          </table:table-cell>
          <table:table-cell table:number-columns-repeated="8"/>
        </table:table-row>
        <table:table-row table:style-name="ro1">
          <table:table-cell office:value-type="float" office:value="20.98" calcext:value-type="float">
            <text:p>20.98</text:p>
          </table:table-cell>
          <table:table-cell table:formula="of:=[.B201]+[.A202]" office:value-type="float" office:value="453.08" calcext:value-type="float">
            <text:p>453.08</text:p>
          </table:table-cell>
          <table:table-cell office:value-type="float" office:value="1524.68" calcext:value-type="float">
            <text:p>1524.68</text:p>
          </table:table-cell>
          <table:table-cell table:number-columns-repeated="14"/>
          <table:table-cell office:value-type="float" office:value="9.99" calcext:value-type="float">
            <text:p>9.99</text:p>
          </table:table-cell>
          <table:table-cell table:formula="of:=[.S201]+[.R202]" office:value-type="float" office:value="320.41" calcext:value-type="float">
            <text:p>320.41</text:p>
          </table:table-cell>
          <table:table-cell office:value-type="float" office:value="1461.6" calcext:value-type="float">
            <text:p>1461.6</text:p>
          </table:table-cell>
          <table:table-cell table:number-columns-repeated="8"/>
        </table:table-row>
        <table:table-row table:style-name="ro1">
          <table:table-cell office:value-type="float" office:value="20.48" calcext:value-type="float">
            <text:p>20.48</text:p>
          </table:table-cell>
          <table:table-cell table:formula="of:=[.B202]+[.A203]" office:value-type="float" office:value="473.56" calcext:value-type="float">
            <text:p>473.56</text:p>
          </table:table-cell>
          <table:table-cell office:value-type="float" office:value="1524.47" calcext:value-type="float">
            <text:p>1524.47</text:p>
          </table:table-cell>
          <table:table-cell table:number-columns-repeated="14"/>
          <table:table-cell office:value-type="float" office:value="9.92" calcext:value-type="float">
            <text:p>9.92</text:p>
          </table:table-cell>
          <table:table-cell table:formula="of:=[.S202]+[.R203]" office:value-type="float" office:value="330.33" calcext:value-type="float">
            <text:p>330.33</text:p>
          </table:table-cell>
          <table:table-cell office:value-type="float" office:value="1461.48" calcext:value-type="float">
            <text:p>1461.48</text:p>
          </table:table-cell>
          <table:table-cell table:number-columns-repeated="8"/>
        </table:table-row>
        <table:table-row table:style-name="ro1">
          <table:table-cell office:value-type="float" office:value="20.33" calcext:value-type="float">
            <text:p>20.33</text:p>
          </table:table-cell>
          <table:table-cell table:formula="of:=[.B203]+[.A204]" office:value-type="float" office:value="493.89" calcext:value-type="float">
            <text:p>493.89</text:p>
          </table:table-cell>
          <table:table-cell office:value-type="float" office:value="1524.21" calcext:value-type="float">
            <text:p>1524.21</text:p>
          </table:table-cell>
          <table:table-cell table:number-columns-repeated="14"/>
          <table:table-cell office:value-type="float" office:value="9.86" calcext:value-type="float">
            <text:p>9.86</text:p>
          </table:table-cell>
          <table:table-cell table:formula="of:=[.S203]+[.R204]" office:value-type="float" office:value="340.19" calcext:value-type="float">
            <text:p>340.19</text:p>
          </table:table-cell>
          <table:table-cell office:value-type="float" office:value="1461.39" calcext:value-type="float">
            <text:p>1461.39</text:p>
          </table:table-cell>
          <table:table-cell table:number-columns-repeated="8"/>
        </table:table-row>
        <table:table-row table:style-name="ro1">
          <table:table-cell office:value-type="float" office:value="20.27" calcext:value-type="float">
            <text:p>20.27</text:p>
          </table:table-cell>
          <table:table-cell table:formula="of:=[.B204]+[.A205]" office:value-type="float" office:value="514.16" calcext:value-type="float">
            <text:p>514.16</text:p>
          </table:table-cell>
          <table:table-cell office:value-type="float" office:value="1523.95" calcext:value-type="float">
            <text:p>1523.95</text:p>
          </table:table-cell>
          <table:table-cell table:number-columns-repeated="25"/>
        </table:table-row>
        <table:table-row table:style-name="ro1">
          <table:table-cell office:value-type="float" office:value="20.1" calcext:value-type="float">
            <text:p>20.1</text:p>
          </table:table-cell>
          <table:table-cell table:formula="of:=[.B205]+[.A206]" office:value-type="float" office:value="534.26" calcext:value-type="float">
            <text:p>534.26</text:p>
          </table:table-cell>
          <table:table-cell office:value-type="float" office:value="1523.69" calcext:value-type="float">
            <text:p>1523.69</text:p>
          </table:table-cell>
          <table:table-cell table:number-columns-repeated="25"/>
        </table:table-row>
        <table:table-row table:style-name="ro1">
          <table:table-cell office:value-type="float" office:value="20.38" calcext:value-type="float">
            <text:p>20.38</text:p>
          </table:table-cell>
          <table:table-cell table:formula="of:=[.B206]+[.A207]" office:value-type="float" office:value="554.64" calcext:value-type="float">
            <text:p>554.64</text:p>
          </table:table-cell>
          <table:table-cell office:value-type="float" office:value="1523.39" calcext:value-type="float">
            <text:p>1523.39</text:p>
          </table:table-cell>
          <table:table-cell table:number-columns-repeated="25"/>
        </table:table-row>
        <table:table-row table:style-name="ro1">
          <table:table-cell office:value-type="float" office:value="20.23" calcext:value-type="float">
            <text:p>20.23</text:p>
          </table:table-cell>
          <table:table-cell table:formula="of:=[.B207]+[.A208]" office:value-type="float" office:value="574.87" calcext:value-type="float">
            <text:p>574.87</text:p>
          </table:table-cell>
          <table:table-cell office:value-type="float" office:value="1523.13" calcext:value-type="float">
            <text:p>1523.13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3">00/00/0000</text:date>, <text:time style:data-style-name="N2" text:time-value="15:01:53.6504763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6T15:03:09.498647801</meta:creation-date>
    <dc:date>2026-07-13T17:08:10.426044595</dc:date>
    <meta:editing-duration>PT3H12M42S</meta:editing-duration>
    <meta:editing-cycles>17</meta:editing-cycles>
    <meta:generator>LibreOffice/24.2.7.2$Linux_X86_64 LibreOffice_project/420$Build-2</meta:generator>
    <meta:document-statistic meta:table-count="1" meta:cell-count="998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170" loext:regression-extrapolate-backward="0" chart:regression-type="linear"/>
      <style:graphic-properties svg:stroke-color="#004586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" svg:stroke-width="0.05cm" svg:stroke-color="#666666" draw:fill-color="#66666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70" chart:regression-type="linear"/>
      <style:graphic-properties svg:stroke-color="#ff420e"/>
    </style:style>
    <style:style style:name="ch11" style:family="chart">
      <style:chart-properties chart:solid-type="cuboid" chart:symbol-type="named-symbol" chart:symbol-name="diamond" chart:symbol-width="0.1cm" chart:symbol-height="0.1cm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scatter" chart:style-name="ch1">
        <chart:plot-area chart:style-name="ch2" table:cell-range-address="Sheet1.A6:Sheet1.B19 Sheet1.J63:Sheet1.J64 Sheet1.B20:Sheet1.B57" svg:x="0.32cm" svg:y="0.18cm" svg:width="15.369cm" svg:height="8.645cm">
          <chart:coordinate-region svg:x="1.788cm" svg:y="0.379cm" svg:width="13.529cm" svg:height="7.799cm"/>
          <chart:axis chart:dimension="x" chart:name="primary-x" chart:style-name="ch3"/>
          <chart:axis chart:dimension="y" chart:name="primary-y" chart:style-name="ch4"/>
          <chart:series chart:style-name="ch5" chart:values-cell-range-address="Sheet1.B6:Sheet1.B19" chart:class="chart:scatter">
            <chart:domain table:cell-range-address="Sheet1.A6:Sheet1.A19"/>
            <chart:regression-curve chart:style-name="ch6"/>
            <chart:data-point chart:repeated="14"/>
          </chart:series>
          <chart:series chart:style-name="ch7" chart:values-cell-range-address="Sheet1.J63:Sheet1.J64" chart:class="chart:scatter">
            <chart:domain table:cell-range-address="Sheet1.I63:Sheet1.I64"/>
            <chart:data-point chart:style-name="ch8" chart:repeated="2"/>
          </chart:series>
          <chart:series chart:style-name="ch9" chart:values-cell-range-address="Sheet1.B44:Sheet1.B57" chart:class="chart:scatter">
            <chart:domain table:cell-range-address="Sheet1.A44:Sheet1.A57"/>
            <chart:regression-curve chart:style-name="ch10"/>
            <chart:data-point/>
            <chart:data-point chart:style-name="ch11"/>
            <chart:data-point chart:repeated="12"/>
          </chart:series>
          <chart:series chart:style-name="ch12" chart:values-cell-range-address="Sheet1.B20:Sheet1.B43" chart:class="chart:scatter">
            <chart:domain table:cell-range-address="Sheet1.A20:Sheet1.A43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35">
                <text:p>20.35</text:p>
                <draw:g>
                  <svg:desc>Sheet1.A6:Sheet1.A19</svg:desc>
                </draw:g>
              </table:table-cell>
              <table:table-cell office:value-type="float" office:value="1606.2">
                <text:p>1606.2</text:p>
                <draw:g>
                  <svg:desc>Sheet1.B6:Sheet1.B19</svg:desc>
                </draw:g>
              </table:table-cell>
              <table:table-cell office:value-type="float" office:value="454.87">
                <text:p>454.87</text:p>
                <draw:g>
                  <svg:desc>Sheet1.I63:Sheet1.I64</svg:desc>
                </draw:g>
              </table:table-cell>
              <table:table-cell office:value-type="float" office:value="1585">
                <text:p>1585</text:p>
                <draw:g>
                  <svg:desc>Sheet1.J63:Sheet1.J64</svg:desc>
                </draw:g>
              </table:table-cell>
              <table:table-cell office:value-type="float" office:value="623.4">
                <text:p>623.4</text:p>
                <draw:g>
                  <svg:desc>Sheet1.A44:Sheet1.A57</svg:desc>
                </draw:g>
              </table:table-cell>
              <table:table-cell office:value-type="float" office:value="1585.16">
                <text:p>1585.16</text:p>
                <draw:g>
                  <svg:desc>Sheet1.B44:Sheet1.B57</svg:desc>
                </draw:g>
              </table:table-cell>
              <table:table-cell office:value-type="float" office:value="306.7">
                <text:p>306.7</text:p>
                <draw:g>
                  <svg:desc>Sheet1.A20:Sheet1.A43</svg:desc>
                </draw:g>
              </table:table-cell>
              <table:table-cell office:value-type="float" office:value="1599.7">
                <text:p>1599.7</text:p>
                <draw:g>
                  <svg:desc>Sheet1.B20:Sheet1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41">
                <text:p>40.41</text:p>
              </table:table-cell>
              <table:table-cell office:value-type="float" office:value="1605.65">
                <text:p>1605.65</text:p>
              </table:table-cell>
              <table:table-cell office:value-type="float" office:value="454.87">
                <text:p>454.87</text:p>
              </table:table-cell>
              <table:table-cell office:value-type="float" office:value="1600">
                <text:p>1600</text:p>
              </table:table-cell>
              <table:table-cell office:value-type="float" office:value="643.85">
                <text:p>643.85</text:p>
              </table:table-cell>
              <table:table-cell office:value-type="float" office:value="1584.9">
                <text:p>1584.9</text:p>
              </table:table-cell>
              <table:table-cell office:value-type="float" office:value="365.48">
                <text:p>365.48</text:p>
              </table:table-cell>
              <table:table-cell office:value-type="float" office:value="1598.7">
                <text:p>159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11">
                <text:p>60.11</text:p>
              </table:table-cell>
              <table:table-cell office:value-type="float" office:value="1605.25">
                <text:p>160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.21">
                <text:p>664.21</text:p>
              </table:table-cell>
              <table:table-cell office:value-type="float" office:value="1584.7">
                <text:p>1584.7</text:p>
              </table:table-cell>
              <table:table-cell office:value-type="float" office:value="375.86">
                <text:p>375.86</text:p>
              </table:table-cell>
              <table:table-cell office:value-type="float" office:value="1598.3">
                <text:p>159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62">
                <text:p>80.62</text:p>
              </table:table-cell>
              <table:table-cell office:value-type="float" office:value="1604.75">
                <text:p>160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.7">
                <text:p>684.7</text:p>
              </table:table-cell>
              <table:table-cell office:value-type="float" office:value="1584.4">
                <text:p>1584.4</text:p>
              </table:table-cell>
              <table:table-cell office:value-type="float" office:value="386.2">
                <text:p>386.2</text:p>
              </table:table-cell>
              <table:table-cell office:value-type="float" office:value="1597.5">
                <text:p>159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93">
                <text:p>100.93</text:p>
              </table:table-cell>
              <table:table-cell office:value-type="float" office:value="1604.3">
                <text:p>160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.06">
                <text:p>705.06</text:p>
              </table:table-cell>
              <table:table-cell office:value-type="float" office:value="1584.94">
                <text:p>1584.94</text:p>
              </table:table-cell>
              <table:table-cell office:value-type="float" office:value="396.84">
                <text:p>396.84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.01">
                <text:p>122.01</text:p>
              </table:table-cell>
              <table:table-cell office:value-type="float" office:value="1603.87">
                <text:p>160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.79">
                <text:p>725.79</text:p>
              </table:table-cell>
              <table:table-cell office:value-type="float" office:value="1584.45">
                <text:p>1584.45</text:p>
              </table:table-cell>
              <table:table-cell office:value-type="float" office:value="406.82">
                <text:p>406.82</text:p>
              </table:table-cell>
              <table:table-cell office:value-type="float" office:value="1596.5">
                <text:p>159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.22">
                <text:p>142.22</text:p>
              </table:table-cell>
              <table:table-cell office:value-type="float" office:value="1603.38">
                <text:p>160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.03">
                <text:p>746.03</text:p>
              </table:table-cell>
              <table:table-cell office:value-type="float" office:value="1584.02">
                <text:p>1584.02</text:p>
              </table:table-cell>
              <table:table-cell office:value-type="float" office:value="417.29">
                <text:p>417.29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.67">
                <text:p>162.67</text:p>
              </table:table-cell>
              <table:table-cell office:value-type="float" office:value="1602.96">
                <text:p>160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48">
                <text:p>766.48</text:p>
              </table:table-cell>
              <table:table-cell office:value-type="float" office:value="1583.63">
                <text:p>1583.63</text:p>
              </table:table-cell>
              <table:table-cell office:value-type="float" office:value="427.53">
                <text:p>427.53</text:p>
              </table:table-cell>
              <table:table-cell office:value-type="float" office:value="1595.4">
                <text:p>159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.6">
                <text:p>184.6</text:p>
              </table:table-cell>
              <table:table-cell office:value-type="float" office:value="1602.41">
                <text:p>1602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24">
                <text:p>787.24</text:p>
              </table:table-cell>
              <table:table-cell office:value-type="float" office:value="1583.25">
                <text:p>1583.25</text:p>
              </table:table-cell>
              <table:table-cell office:value-type="float" office:value="437.65">
                <text:p>437.65</text:p>
              </table:table-cell>
              <table:table-cell office:value-type="float" office:value="1594.25">
                <text:p>1594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.96">
                <text:p>204.96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.74">
                <text:p>807.74</text:p>
              </table:table-cell>
              <table:table-cell office:value-type="float" office:value="1582.8">
                <text:p>1582.8</text:p>
              </table:table-cell>
              <table:table-cell office:value-type="float" office:value="456.31">
                <text:p>456.31</text:p>
              </table:table-cell>
              <table:table-cell office:value-type="float" office:value="1593.77">
                <text:p>1593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.69">
                <text:p>225.69</text:p>
              </table:table-cell>
              <table:table-cell office:value-type="float" office:value="1601.55">
                <text:p>1601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.15">
                <text:p>828.15</text:p>
              </table:table-cell>
              <table:table-cell office:value-type="float" office:value="1582.4">
                <text:p>1582.4</text:p>
              </table:table-cell>
              <table:table-cell office:value-type="float" office:value="466.67">
                <text:p>466.67</text:p>
              </table:table-cell>
              <table:table-cell office:value-type="float" office:value="1593.12">
                <text:p>1593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.66">
                <text:p>245.66</text:p>
              </table:table-cell>
              <table:table-cell office:value-type="float" office:value="1601.06">
                <text:p>160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8.36">
                <text:p>848.36</text:p>
              </table:table-cell>
              <table:table-cell office:value-type="float" office:value="1582.96">
                <text:p>1582.96</text:p>
              </table:table-cell>
              <table:table-cell office:value-type="float" office:value="477.13">
                <text:p>477.13</text:p>
              </table:table-cell>
              <table:table-cell office:value-type="float" office:value="1592.7">
                <text:p>15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.77">
                <text:p>265.77</text:p>
              </table:table-cell>
              <table:table-cell office:value-type="float" office:value="1600.65">
                <text:p>160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8.78">
                <text:p>868.78</text:p>
              </table:table-cell>
              <table:table-cell office:value-type="float" office:value="1581.55">
                <text:p>1581.55</text:p>
              </table:table-cell>
              <table:table-cell office:value-type="float" office:value="487.43">
                <text:p>487.43</text:p>
              </table:table-cell>
              <table:table-cell office:value-type="float" office:value="1592.09">
                <text:p>1592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6.19">
                <text:p>286.19</text:p>
              </table:table-cell>
              <table:table-cell office:value-type="float" office:value="1600.16">
                <text:p>160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.21">
                <text:p>889.21</text:p>
              </table:table-cell>
              <table:table-cell office:value-type="float" office:value="1581.13">
                <text:p>1581.13</text:p>
              </table:table-cell>
              <table:table-cell office:value-type="float" office:value="497.75">
                <text:p>497.75</text:p>
              </table:table-cell>
              <table:table-cell office:value-type="float" office:value="1591.5">
                <text:p>159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99">
                <text:p>507.99</text:p>
              </table:table-cell>
              <table:table-cell office:value-type="float" office:value="1590.99">
                <text:p>1590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.56">
                <text:p>518.56</text:p>
              </table:table-cell>
              <table:table-cell office:value-type="float" office:value="1590.4">
                <text:p>159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.98">
                <text:p>528.98</text:p>
              </table:table-cell>
              <table:table-cell office:value-type="float" office:value="1589.78">
                <text:p>1589.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.9">
                <text:p>539.9</text:p>
              </table:table-cell>
              <table:table-cell office:value-type="float" office:value="1589.3">
                <text:p>1589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28">
                <text:p>550.28</text:p>
              </table:table-cell>
              <table:table-cell office:value-type="float" office:value="1588.8">
                <text:p>1588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.86">
                <text:p>560.86</text:p>
              </table:table-cell>
              <table:table-cell office:value-type="float" office:value="1588.27">
                <text:p>1588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.96">
                <text:p>571.96</text:p>
              </table:table-cell>
              <table:table-cell office:value-type="float" office:value="1587.62">
                <text:p>1587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.27">
                <text:p>582.27</text:p>
              </table:table-cell>
              <table:table-cell office:value-type="float" office:value="1587.08">
                <text:p>1587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.65">
                <text:p>592.65</text:p>
              </table:table-cell>
              <table:table-cell office:value-type="float" office:value="1586.59">
                <text:p>1586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.03">
                <text:p>603.03</text:p>
              </table:table-cell>
              <table:table-cell office:value-type="float" office:value="1585.98">
                <text:p>1585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61.13" loext:regression-extrapolate-backward="0" chart:regression-type="linear"/>
      <style:graphic-properties svg:stroke-color="#004586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" svg:stroke-width="0.05cm" svg:stroke-color="#808080" draw:fill-color="#808080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67.13" chart:regression-type="linear"/>
      <style:graphic-properties svg:stroke-color="#ff420e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O6:Sheet1.P12 Sheet1.AA22:Sheet1.AA23 Sheet1.P13:Sheet1.P30" svg:x="0.345cm" svg:y="0.178cm" svg:width="15.323cm" svg:height="8.639cm">
          <chart:coordinate-region svg:x="1.813cm" svg:y="0.377cm" svg:width="13.337cm" svg:height="7.793cm"/>
          <chart:axis chart:dimension="x" chart:name="primary-x" chart:style-name="ch3"/>
          <chart:axis chart:dimension="y" chart:name="primary-y" chart:style-name="ch4"/>
          <chart:series chart:style-name="ch5" chart:values-cell-range-address="Sheet1.P6:Sheet1.P12" chart:class="chart:scatter">
            <chart:domain table:cell-range-address="Sheet1.O6:Sheet1.O12"/>
            <chart:regression-curve chart:style-name="ch6"/>
            <chart:data-point chart:repeated="3"/>
            <chart:data-point chart:style-name="ch7"/>
            <chart:data-point chart:repeated="3"/>
          </chart:series>
          <chart:series chart:style-name="ch8" chart:values-cell-range-address="Sheet1.AA22:Sheet1.AA23" chart:class="chart:scatter">
            <chart:domain table:cell-range-address="Sheet1.Z22:Sheet1.Z23"/>
            <chart:data-point chart:repeated="2"/>
          </chart:series>
          <chart:series chart:style-name="ch9" chart:values-cell-range-address="Sheet1.P24:Sheet1.P30" chart:class="chart:scatter">
            <chart:domain table:cell-range-address="Sheet1.O24:Sheet1.O30"/>
            <chart:regression-curve chart:style-name="ch10"/>
            <chart:data-point/>
            <chart:data-point chart:style-name="ch11" chart:repeated="2"/>
            <chart:data-point chart:repeated="4"/>
          </chart:series>
          <chart:series chart:style-name="ch12" chart:values-cell-range-address="Sheet1.P13:Sheet1.P23" chart:class="chart:scatter">
            <chart:domain table:cell-range-address="Sheet1.O13:Sheet1.O23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O6:Sheet1.O12</svg:desc>
                </draw:g>
              </table:table-cell>
              <table:table-cell office:value-type="float" office:value="1479.17">
                <text:p>1479.17</text:p>
                <draw:g>
                  <svg:desc>Sheet1.P6:Sheet1.P12</svg:desc>
                </draw:g>
              </table:table-cell>
              <table:table-cell office:value-type="float" office:value="172.82">
                <text:p>172.82</text:p>
                <draw:g>
                  <svg:desc>Sheet1.Z22:Sheet1.Z23</svg:desc>
                </draw:g>
              </table:table-cell>
              <table:table-cell office:value-type="float" office:value="1470">
                <text:p>1470</text:p>
                <draw:g>
                  <svg:desc>Sheet1.AA22:Sheet1.AA23</svg:desc>
                </draw:g>
              </table:table-cell>
              <table:table-cell office:value-type="float" office:value="238.57">
                <text:p>238.57</text:p>
                <draw:g>
                  <svg:desc>Sheet1.O24:Sheet1.O30</svg:desc>
                </draw:g>
              </table:table-cell>
              <table:table-cell office:value-type="float" office:value="1470.8">
                <text:p>1470.8</text:p>
                <draw:g>
                  <svg:desc>Sheet1.P24:Sheet1.P30</svg:desc>
                </draw:g>
              </table:table-cell>
              <table:table-cell office:value-type="float" office:value="123.39">
                <text:p>123.39</text:p>
                <draw:g>
                  <svg:desc>Sheet1.O13:Sheet1.O23</svg:desc>
                </draw:g>
              </table:table-cell>
              <table:table-cell office:value-type="float" office:value="1476.7">
                <text:p>1476.7</text:p>
                <draw:g>
                  <svg:desc>Sheet1.P13:Sheet1.P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7">
                <text:p>20.7</text:p>
              </table:table-cell>
              <table:table-cell office:value-type="float" office:value="1478.77">
                <text:p>1478.77</text:p>
              </table:table-cell>
              <table:table-cell office:value-type="float" office:value="172.82">
                <text:p>172.82</text:p>
              </table:table-cell>
              <table:table-cell office:value-type="float" office:value="1480">
                <text:p>1480</text:p>
              </table:table-cell>
              <table:table-cell office:value-type="float" office:value="259">
                <text:p>259</text:p>
              </table:table-cell>
              <table:table-cell office:value-type="float" office:value="1470.11">
                <text:p>1470.11</text:p>
              </table:table-cell>
              <table:table-cell office:value-type="float" office:value="133.78">
                <text:p>133.78</text:p>
              </table:table-cell>
              <table:table-cell office:value-type="float" office:value="1476.12">
                <text:p>1476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28">
                <text:p>41.28</text:p>
              </table:table-cell>
              <table:table-cell office:value-type="float" office:value="1478.42">
                <text:p>1478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.37">
                <text:p>279.37</text:p>
              </table:table-cell>
              <table:table-cell office:value-type="float" office:value="1469.93">
                <text:p>1469.93</text:p>
              </table:table-cell>
              <table:table-cell office:value-type="float" office:value="144.29">
                <text:p>144.29</text:p>
              </table:table-cell>
              <table:table-cell office:value-type="float" office:value="1475.55">
                <text:p>1475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.85">
                <text:p>61.85</text:p>
              </table:table-cell>
              <table:table-cell office:value-type="float" office:value="1478.1">
                <text:p>147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01">
                <text:p>300.01</text:p>
              </table:table-cell>
              <table:table-cell office:value-type="float" office:value="1469.66">
                <text:p>1469.66</text:p>
              </table:table-cell>
              <table:table-cell office:value-type="float" office:value="154.7">
                <text:p>154.7</text:p>
              </table:table-cell>
              <table:table-cell office:value-type="float" office:value="1474.93">
                <text:p>1474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11">
                <text:p>82.11</text:p>
              </table:table-cell>
              <table:table-cell office:value-type="float" office:value="1477.76">
                <text:p>1477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24">
                <text:p>320.24</text:p>
              </table:table-cell>
              <table:table-cell office:value-type="float" office:value="1469.4">
                <text:p>1469.4</text:p>
              </table:table-cell>
              <table:table-cell office:value-type="float" office:value="165">
                <text:p>165</text:p>
              </table:table-cell>
              <table:table-cell office:value-type="float" office:value="1474.44">
                <text:p>1474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76">
                <text:p>102.76</text:p>
              </table:table-cell>
              <table:table-cell office:value-type="float" office:value="1477.39">
                <text:p>1477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.67">
                <text:p>340.67</text:p>
              </table:table-cell>
              <table:table-cell office:value-type="float" office:value="1469.11">
                <text:p>1469.11</text:p>
              </table:table-cell>
              <table:table-cell office:value-type="float" office:value="175.51">
                <text:p>175.51</text:p>
              </table:table-cell>
              <table:table-cell office:value-type="float" office:value="1473.9">
                <text:p>1473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.07">
                <text:p>113.07</text:p>
              </table:table-cell>
              <table:table-cell office:value-type="float" office:value="1477.15">
                <text:p>1477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.04">
                <text:p>361.04</text:p>
              </table:table-cell>
              <table:table-cell office:value-type="float" office:value="1468.81">
                <text:p>1468.81</text:p>
              </table:table-cell>
              <table:table-cell office:value-type="float" office:value="185.93">
                <text:p>185.93</text:p>
              </table:table-cell>
              <table:table-cell office:value-type="float" office:value="1473.33">
                <text:p>1473.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38">
                <text:p>196.38</text:p>
              </table:table-cell>
              <table:table-cell office:value-type="float" office:value="1472.83">
                <text:p>1472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82">
                <text:p>206.82</text:p>
              </table:table-cell>
              <table:table-cell office:value-type="float" office:value="1472.38">
                <text:p>1472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.98">
                <text:p>216.98</text:p>
              </table:table-cell>
              <table:table-cell office:value-type="float" office:value="1471.91">
                <text:p>1471.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57">
                <text:p>227.57</text:p>
              </table:table-cell>
              <table:table-cell office:value-type="float" office:value="1471.33">
                <text:p>1471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minimum="15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35.025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1cm" chart:symbol-height="0.1cm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5cm" svg:stroke-color="#808080" draw:fill-color="#808080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35.025" chart:regression-type="linear"/>
      <style:graphic-properties svg:stroke-color="#ff420e"/>
    </style:style>
    <style:style style:name="ch13" style:family="chart">
      <style:chart-properties chart:solid-type="cuboid" chart:symbol-type="named-symbol" chart:symbol-name="diamond" chart:symbol-width="0.1cm" chart:symbol-height="0.1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87:Sheet1.C103 Sheet1.I103:Sheet1.I104 Sheet1.C104:Sheet1.C144" svg:x="0.32cm" svg:y="0.18cm" svg:width="15.36cm" svg:height="8.64cm">
          <chart:coordinate-region svg:x="1.788cm" svg:y="0.379cm" svg:width="13.52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87:Sheet1.C103" chart:class="chart:scatter">
            <chart:domain table:cell-range-address="Sheet1.B87:Sheet1.B103"/>
            <chart:regression-curve chart:style-name="ch7"/>
            <chart:data-point chart:repeated="14"/>
            <chart:data-point chart:style-name="ch8"/>
            <chart:data-point chart:repeated="2"/>
          </chart:series>
          <chart:series chart:style-name="ch9" chart:values-cell-range-address="Sheet1.I103:Sheet1.I104" chart:class="chart:scatter">
            <chart:domain table:cell-range-address="Sheet1.H103:Sheet1.H104"/>
            <chart:data-point chart:style-name="ch10" chart:repeated="2"/>
          </chart:series>
          <chart:series chart:style-name="ch11" chart:values-cell-range-address="Sheet1.C104:Sheet1.C144" chart:class="chart:scatter">
            <chart:domain table:cell-range-address="Sheet1.B104:Sheet1.B144"/>
            <chart:regression-curve chart:style-name="ch12"/>
            <chart:data-point chart:repeated="6"/>
            <chart:data-point chart:style-name="ch13"/>
            <chart:data-point chart:repeated="3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87:Sheet1.B103</svg:desc>
                </draw:g>
              </table:table-cell>
              <table:table-cell office:value-type="float" office:value="1555.56">
                <text:p>1555.56</text:p>
                <draw:g>
                  <svg:desc>Sheet1.C87:Sheet1.C103</svg:desc>
                </draw:g>
              </table:table-cell>
              <table:table-cell office:value-type="float" office:value="355.575">
                <text:p>355.575</text:p>
                <draw:g>
                  <svg:desc>Sheet1.H103:Sheet1.H104</svg:desc>
                </draw:g>
              </table:table-cell>
              <table:table-cell office:value-type="float" office:value="1540">
                <text:p>1540</text:p>
                <draw:g>
                  <svg:desc>Sheet1.I103:Sheet1.I104</svg:desc>
                </draw:g>
              </table:table-cell>
              <table:table-cell office:value-type="float" office:value="390.6">
                <text:p>390.6</text:p>
                <draw:g>
                  <svg:desc>Sheet1.B104:Sheet1.B144</svg:desc>
                </draw:g>
              </table:table-cell>
              <table:table-cell office:value-type="float" office:value="1540.33">
                <text:p>1540.33</text:p>
                <draw:g>
                  <svg:desc>Sheet1.C104:Sheet1.C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91">
                <text:p>19.91</text:p>
              </table:table-cell>
              <table:table-cell office:value-type="float" office:value="1555.34">
                <text:p>1555.34</text:p>
              </table:table-cell>
              <table:table-cell office:value-type="float" office:value="355.575">
                <text:p>355.575</text:p>
              </table:table-cell>
              <table:table-cell office:value-type="float" office:value="1551">
                <text:p>1551</text:p>
              </table:table-cell>
              <table:table-cell office:value-type="float" office:value="400.58">
                <text:p>400.58</text:p>
              </table:table-cell>
              <table:table-cell office:value-type="float" office:value="1540.26">
                <text:p>154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07">
                <text:p>40.07</text:p>
              </table:table-cell>
              <table:table-cell office:value-type="float" office:value="1555.01">
                <text:p>1555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.44">
                <text:p>410.44</text:p>
              </table:table-cell>
              <table:table-cell office:value-type="float" office:value="1540.14">
                <text:p>1540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23">
                <text:p>60.23</text:p>
              </table:table-cell>
              <table:table-cell office:value-type="float" office:value="1554.4">
                <text:p>155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.37">
                <text:p>420.37</text:p>
              </table:table-cell>
              <table:table-cell office:value-type="float" office:value="1540.01">
                <text:p>154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.44">
                <text:p>80.44</text:p>
              </table:table-cell>
              <table:table-cell office:value-type="float" office:value="1554.63">
                <text:p>1554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.47">
                <text:p>430.47</text:p>
              </table:table-cell>
              <table:table-cell office:value-type="float" office:value="1539.85">
                <text:p>1539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14">
                <text:p>100.14</text:p>
              </table:table-cell>
              <table:table-cell office:value-type="float" office:value="1554.35">
                <text:p>1554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.37">
                <text:p>440.37</text:p>
              </table:table-cell>
              <table:table-cell office:value-type="float" office:value="1539.7">
                <text:p>153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.44">
                <text:p>120.44</text:p>
              </table:table-cell>
              <table:table-cell office:value-type="float" office:value="1554.01">
                <text:p>155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.5">
                <text:p>450.5</text:p>
              </table:table-cell>
              <table:table-cell office:value-type="float" office:value="1539.56">
                <text:p>1539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.44">
                <text:p>140.44</text:p>
              </table:table-cell>
              <table:table-cell office:value-type="float" office:value="1553.68">
                <text:p>155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.31">
                <text:p>460.31</text:p>
              </table:table-cell>
              <table:table-cell office:value-type="float" office:value="1539.43">
                <text:p>1539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.44">
                <text:p>160.44</text:p>
              </table:table-cell>
              <table:table-cell office:value-type="float" office:value="1553.35">
                <text:p>155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.36">
                <text:p>470.36</text:p>
              </table:table-cell>
              <table:table-cell office:value-type="float" office:value="1539.27">
                <text:p>1539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.43">
                <text:p>180.43</text:p>
              </table:table-cell>
              <table:table-cell office:value-type="float" office:value="1553.02">
                <text:p>155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.44">
                <text:p>480.44</text:p>
              </table:table-cell>
              <table:table-cell office:value-type="float" office:value="1539.14">
                <text:p>1539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.44">
                <text:p>200.44</text:p>
              </table:table-cell>
              <table:table-cell office:value-type="float" office:value="1552.65">
                <text:p>1552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.49">
                <text:p>490.49</text:p>
              </table:table-cell>
              <table:table-cell office:value-type="float" office:value="1538.86">
                <text:p>1538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.5">
                <text:p>220.5</text:p>
              </table:table-cell>
              <table:table-cell office:value-type="float" office:value="1552.35">
                <text:p>1552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1538.78">
                <text:p>1538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.3">
                <text:p>240.3</text:p>
              </table:table-cell>
              <table:table-cell office:value-type="float" office:value="1552.05">
                <text:p>1552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.43">
                <text:p>510.43</text:p>
              </table:table-cell>
              <table:table-cell office:value-type="float" office:value="1538.66">
                <text:p>1538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.45">
                <text:p>260.45</text:p>
              </table:table-cell>
              <table:table-cell office:value-type="float" office:value="1551.67">
                <text:p>1551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43">
                <text:p>520.43</text:p>
              </table:table-cell>
              <table:table-cell office:value-type="float" office:value="1538.52">
                <text:p>1538.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.44">
                <text:p>280.44</text:p>
              </table:table-cell>
              <table:table-cell office:value-type="float" office:value="1551.36">
                <text:p>1551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.31">
                <text:p>530.31</text:p>
              </table:table-cell>
              <table:table-cell office:value-type="float" office:value="1538.38">
                <text:p>1538.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.39">
                <text:p>300.39</text:p>
              </table:table-cell>
              <table:table-cell office:value-type="float" office:value="1551.02">
                <text:p>155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.37">
                <text:p>540.37</text:p>
              </table:table-cell>
              <table:table-cell office:value-type="float" office:value="1538.2">
                <text:p>1538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.55">
                <text:p>320.55</text:p>
              </table:table-cell>
              <table:table-cell office:value-type="float" office:value="1550.67">
                <text:p>155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33">
                <text:p>550.33</text:p>
              </table:table-cell>
              <table:table-cell office:value-type="float" office:value="1538.05">
                <text:p>1538.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.36">
                <text:p>560.36</text:p>
              </table:table-cell>
              <table:table-cell office:value-type="float" office:value="1537.92">
                <text:p>1537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.36">
                <text:p>570.36</text:p>
              </table:table-cell>
              <table:table-cell office:value-type="float" office:value="1537.76">
                <text:p>1537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.31">
                <text:p>580.31</text:p>
              </table:table-cell>
              <table:table-cell office:value-type="float" office:value="1537.61">
                <text:p>1537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.34">
                <text:p>590.34</text:p>
              </table:table-cell>
              <table:table-cell office:value-type="float" office:value="1537.42">
                <text:p>1537.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.57">
                <text:p>600.57</text:p>
              </table:table-cell>
              <table:table-cell office:value-type="float" office:value="1537.28">
                <text:p>1537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.35">
                <text:p>610.35</text:p>
              </table:table-cell>
              <table:table-cell office:value-type="float" office:value="1537.15">
                <text:p>1537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.35">
                <text:p>620.35</text:p>
              </table:table-cell>
              <table:table-cell office:value-type="float" office:value="1536.97">
                <text:p>1536.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.28">
                <text:p>630.28</text:p>
              </table:table-cell>
              <table:table-cell office:value-type="float" office:value="1536.83">
                <text:p>1536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.48">
                <text:p>640.48</text:p>
              </table:table-cell>
              <table:table-cell office:value-type="float" office:value="1536.4">
                <text:p>1536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.31">
                <text:p>650.31</text:p>
              </table:table-cell>
              <table:table-cell office:value-type="float" office:value="1536.19">
                <text:p>1536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.27">
                <text:p>670.27</text:p>
              </table:table-cell>
              <table:table-cell office:value-type="float" office:value="1535.87">
                <text:p>1535.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.47">
                <text:p>690.47</text:p>
              </table:table-cell>
              <table:table-cell office:value-type="float" office:value="1535.57">
                <text:p>1535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.22">
                <text:p>710.22</text:p>
              </table:table-cell>
              <table:table-cell office:value-type="float" office:value="1535.24">
                <text:p>1535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.37">
                <text:p>730.37</text:p>
              </table:table-cell>
              <table:table-cell office:value-type="float" office:value="1534.92">
                <text:p>1534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.3">
                <text:p>750.3</text:p>
              </table:table-cell>
              <table:table-cell office:value-type="float" office:value="1534.61">
                <text:p>1534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.33">
                <text:p>770.33</text:p>
              </table:table-cell>
              <table:table-cell office:value-type="float" office:value="1534.31">
                <text:p>1534.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0.39">
                <text:p>790.39</text:p>
              </table:table-cell>
              <table:table-cell office:value-type="float" office:value="1533.98">
                <text:p>1533.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.32">
                <text:p>810.32</text:p>
              </table:table-cell>
              <table:table-cell office:value-type="float" office:value="1533.64">
                <text:p>1533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.3">
                <text:p>830.3</text:p>
              </table:table-cell>
              <table:table-cell office:value-type="float" office:value="1533.3">
                <text:p>1533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18">
                <text:p>850.18</text:p>
              </table:table-cell>
              <table:table-cell office:value-type="float" office:value="1532.93">
                <text:p>1532.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.04">
                <text:p>870.04</text:p>
              </table:table-cell>
              <table:table-cell office:value-type="float" office:value="1532.65">
                <text:p>1532.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.24">
                <text:p>890.24</text:p>
              </table:table-cell>
              <table:table-cell office:value-type="float" office:value="1532.2">
                <text:p>1532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.49">
                <text:p>910.49</text:p>
              </table:table-cell>
              <table:table-cell office:value-type="float" office:value="1531.99">
                <text:p>1531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.07">
                <text:p>930.07</text:p>
              </table:table-cell>
              <table:table-cell office:value-type="float" office:value="1531.65">
                <text:p>1531.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7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450" chart:origin="0" chart:interval-major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31.58" loext:regression-extrapolate-backward="0" chart:regression-type="linear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" svg:stroke-width="0.06cm" svg:stroke-color="#666666" draw:fill-color="#666666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ff00" draw:fill-color="#ffff0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1cm" chart:symbol-height="0.1cm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7.58" chart:regression-type="linear"/>
      <style:graphic-properties svg:stroke-color="#ff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Sheet1.AD107:Sheet1.AD107 Sheet1.T87:Sheet1.U93 Sheet1.AA103:Sheet1.AA104 Sheet1.U94:Sheet1.U117" chart:data-source-has-labels="column" svg:x="1.355cm" svg:y="0.18cm" svg:width="14.036cm" svg:height="7.658cm">
          <chart:coordinate-region svg:x="2.347cm" svg:y="0.379cm" svg:width="13.044cm" svg:height="6.812cm"/>
          <chart:axis chart:dimension="x" chart:name="primary-x" chart:style-name="ch3" chartooo:axis-type="auto">
            <chart:categories table:cell-range-address="Sheet1.AD107:Sheet1.AD10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U87:Sheet1.U93" chart:class="chart:scatter">
            <chart:domain table:cell-range-address="Sheet1.T87:Sheet1.T93"/>
            <chart:regression-curve chart:style-name="ch7"/>
            <chart:data-point chart:repeated="7"/>
          </chart:series>
          <chart:series chart:style-name="ch8" chart:values-cell-range-address="Sheet1.AA103:Sheet1.AA104" chart:class="chart:scatter">
            <chart:domain table:cell-range-address="Sheet1.Z103:Sheet1.Z104"/>
            <chart:data-point chart:style-name="ch9" chart:repeated="2"/>
          </chart:series>
          <chart:series chart:style-name="ch10" chart:values-cell-range-address="Sheet1.U94:Sheet1.U99" chart:class="chart:scatter">
            <chart:domain table:cell-range-address="Sheet1.T94:Sheet1.T99"/>
            <chart:data-point chart:repeated="4"/>
            <chart:data-point chart:style-name="ch11"/>
            <chart:data-point/>
          </chart:series>
          <chart:series chart:style-name="ch12" chart:values-cell-range-address="Sheet1.U100:Sheet1.U117" chart:class="chart:scatter">
            <chart:domain table:cell-range-address="Sheet1.T100:Sheet1.T117"/>
            <chart:regression-curve chart:style-name="ch13"/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D107:Sheet1.AD107</svg:desc>
                </draw:g>
              </table:table-cell>
              <table:table-cell office:value-type="float" office:value="0">
                <text:p>0</text:p>
                <draw:g>
                  <svg:desc>Sheet1.T87:Sheet1.T93</svg:desc>
                </draw:g>
              </table:table-cell>
              <table:table-cell office:value-type="float" office:value="1467.88">
                <text:p>1467.88</text:p>
                <draw:g>
                  <svg:desc>Sheet1.U87:Sheet1.U93</svg:desc>
                </draw:g>
              </table:table-cell>
              <table:table-cell office:value-type="float" office:value="152.7">
                <text:p>152.7</text:p>
                <draw:g>
                  <svg:desc>Sheet1.Z103:Sheet1.Z104</svg:desc>
                </draw:g>
              </table:table-cell>
              <table:table-cell office:value-type="float" office:value="1455">
                <text:p>1455</text:p>
                <draw:g>
                  <svg:desc>Sheet1.AA103:Sheet1.AA104</svg:desc>
                </draw:g>
              </table:table-cell>
              <table:table-cell office:value-type="float" office:value="140.12">
                <text:p>140.12</text:p>
                <draw:g>
                  <svg:desc>Sheet1.T94:Sheet1.T99</svg:desc>
                </draw:g>
              </table:table-cell>
              <table:table-cell office:value-type="float" office:value="1460.41">
                <text:p>1460.41</text:p>
                <draw:g>
                  <svg:desc>Sheet1.U94:Sheet1.U99</svg:desc>
                </draw:g>
              </table:table-cell>
              <table:table-cell office:value-type="float" office:value="170.41">
                <text:p>170.41</text:p>
                <draw:g>
                  <svg:desc>Sheet1.T100:Sheet1.T117</svg:desc>
                </draw:g>
              </table:table-cell>
              <table:table-cell office:value-type="float" office:value="1456.86">
                <text:p>1456.86</text:p>
                <draw:g>
                  <svg:desc>Sheet1.U100:Sheet1.U117</svg:desc>
                </draw:g>
              </table:table-cell>
            </table:table-row>
            <table:table-row>
              <table:table-cell office:value-type="string"/>
              <table:table-cell office:value-type="float" office:value="20.32">
                <text:p>20.32</text:p>
              </table:table-cell>
              <table:table-cell office:value-type="float" office:value="1467.62">
                <text:p>1467.62</text:p>
              </table:table-cell>
              <table:table-cell office:value-type="float" office:value="152.7">
                <text:p>152.7</text:p>
              </table:table-cell>
              <table:table-cell office:value-type="float" office:value="1468">
                <text:p>1468</text:p>
              </table:table-cell>
              <table:table-cell office:value-type="float" office:value="145.36">
                <text:p>145.36</text:p>
              </table:table-cell>
              <table:table-cell office:value-type="float" office:value="1458.22">
                <text:p>1458.22</text:p>
              </table:table-cell>
              <table:table-cell office:value-type="float" office:value="180.06">
                <text:p>180.06</text:p>
              </table:table-cell>
              <table:table-cell office:value-type="float" office:value="1456.77">
                <text:p>1456.77</text:p>
              </table:table-cell>
            </table:table-row>
            <table:table-row>
              <table:table-cell office:value-type="string"/>
              <table:table-cell office:value-type="float" office:value="40.46">
                <text:p>40.46</text:p>
              </table:table-cell>
              <table:table-cell office:value-type="float" office:value="1467.37">
                <text:p>1467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16">
                <text:p>150.16</text:p>
              </table:table-cell>
              <table:table-cell office:value-type="float" office:value="1457.3">
                <text:p>1457.3</text:p>
              </table:table-cell>
              <table:table-cell office:value-type="float" office:value="200.09">
                <text:p>200.09</text:p>
              </table:table-cell>
              <table:table-cell office:value-type="float" office:value="1456.71">
                <text:p>1456.71</text:p>
              </table:table-cell>
            </table:table-row>
            <table:table-row>
              <table:table-cell office:value-type="string"/>
              <table:table-cell office:value-type="float" office:value="60.13">
                <text:p>60.13</text:p>
              </table:table-cell>
              <table:table-cell office:value-type="float" office:value="1467.09">
                <text:p>1467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.35">
                <text:p>155.35</text:p>
              </table:table-cell>
              <table:table-cell office:value-type="float" office:value="1457.03">
                <text:p>1457.03</text:p>
              </table:table-cell>
              <table:table-cell office:value-type="float" office:value="210.19">
                <text:p>210.19</text:p>
              </table:table-cell>
              <table:table-cell office:value-type="float" office:value="1456.62">
                <text:p>1456.62</text:p>
              </table:table-cell>
            </table:table-row>
            <table:table-row>
              <table:table-cell office:value-type="string"/>
              <table:table-cell office:value-type="float" office:value="80.19">
                <text:p>80.19</text:p>
              </table:table-cell>
              <table:table-cell office:value-type="float" office:value="1466.86">
                <text:p>1466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.86">
                <text:p>161.86</text:p>
              </table:table-cell>
              <table:table-cell office:value-type="float" office:value="1456.96">
                <text:p>1456.96</text:p>
              </table:table-cell>
              <table:table-cell office:value-type="float" office:value="220.25">
                <text:p>220.25</text:p>
              </table:table-cell>
              <table:table-cell office:value-type="float" office:value="1456.55">
                <text:p>1456.55</text:p>
              </table:table-cell>
            </table:table-row>
            <table:table-row>
              <table:table-cell office:value-type="string"/>
              <table:table-cell office:value-type="float" office:value="100.31">
                <text:p>100.31</text:p>
              </table:table-cell>
              <table:table-cell office:value-type="float" office:value="1466.54">
                <text:p>146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.28">
                <text:p>165.28</text:p>
              </table:table-cell>
              <table:table-cell office:value-type="float" office:value="1456.9">
                <text:p>1456.9</text:p>
              </table:table-cell>
              <table:table-cell office:value-type="float" office:value="230.3">
                <text:p>230.3</text:p>
              </table:table-cell>
              <table:table-cell office:value-type="float" office:value="1456.46">
                <text:p>1456.46</text:p>
              </table:table-cell>
            </table:table-row>
            <table:table-row>
              <table:table-cell office:value-type="string"/>
              <table:table-cell office:value-type="float" office:value="120.25">
                <text:p>120.25</text:p>
              </table:table-cell>
              <table:table-cell office:value-type="float" office:value="1466.33">
                <text:p>1466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.28">
                <text:p>240.28</text:p>
              </table:table-cell>
              <table:table-cell office:value-type="float" office:value="1456.35">
                <text:p>1456.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.2">
                <text:p>250.2</text:p>
              </table:table-cell>
              <table:table-cell office:value-type="float" office:value="1456.24">
                <text:p>1456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.32">
                <text:p>260.32</text:p>
              </table:table-cell>
              <table:table-cell office:value-type="float" office:value="1456.13">
                <text:p>1456.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26">
                <text:p>270.26</text:p>
              </table:table-cell>
              <table:table-cell office:value-type="float" office:value="1456.04">
                <text:p>1456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33">
                <text:p>280.33</text:p>
              </table:table-cell>
              <table:table-cell office:value-type="float" office:value="1455.87">
                <text:p>1455.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.2">
                <text:p>290.2</text:p>
              </table:table-cell>
              <table:table-cell office:value-type="float" office:value="1455.77">
                <text:p>1455.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34">
                <text:p>300.34</text:p>
              </table:table-cell>
              <table:table-cell office:value-type="float" office:value="1455.66">
                <text:p>1455.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.33">
                <text:p>310.33</text:p>
              </table:table-cell>
              <table:table-cell office:value-type="float" office:value="1455.5">
                <text:p>1455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24">
                <text:p>320.24</text:p>
              </table:table-cell>
              <table:table-cell office:value-type="float" office:value="1455.37">
                <text:p>1455.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3">
                <text:p>330.3</text:p>
              </table:table-cell>
              <table:table-cell office:value-type="float" office:value="1455.27">
                <text:p>1455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.42">
                <text:p>340.42</text:p>
              </table:table-cell>
              <table:table-cell office:value-type="float" office:value="1455.15">
                <text:p>1455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.14">
                <text:p>350.14</text:p>
              </table:table-cell>
              <table:table-cell office:value-type="float" office:value="1454.99">
                <text:p>1454.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