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4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5983b0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6.008cm" svg:height="9.004cm" svg:x="0.567cm" svg:y="26.782cm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18.535cm" svg:y1="28.639cm" svg:x2="18.507cm" svg:y2="32.197cm" svg:d="M18535 28639l-28 3558" svg:viewBox="0 0 29 3559">
            <text:p/>
          </draw:connector>
          <draw:frame draw:z-index="2" draw:style-name="gr1" draw:text-style-name="P1" svg:width="15.999cm" svg:height="8.999cm" svg:x="39.021cm" svg:y="10.733cm">
            <draw:object draw:notify-on-update-of-ranges="Sheet1.O6:Sheet1.O12 Sheet1.P6:Sheet1.P12 Sheet1.Z22:Sheet1.Z23 Sheet1.AA22:Sheet1.AA23 Sheet1.O24:Sheet1.O30 Sheet1.P24:Sheet1.P30 Sheet1.O13:Sheet1.O23 Sheet1.P13:Sheet1.P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9.731cm" svg:y="49.096cm">
            <draw:object draw:notify-on-update-of-ranges="Sheet1.B87:Sheet1.B103 Sheet1.C87:Sheet1.C103 Sheet1.H103:Sheet1.H104 Sheet1.I103:Sheet1.I104 Sheet1.B104:Sheet1.B144 Sheet1.C104:Sheet1.C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50.177cm" svg:y="47.688cm">
            <draw:object draw:notify-on-update-of-ranges="Sheet1.AD107:Sheet1.AD107 Sheet1.T87:Sheet1.T93 Sheet1.U87:Sheet1.U93 Sheet1.Z103:Sheet1.Z104 Sheet1.AA103:Sheet1.AA104 Sheet1.T94:Sheet1.T99 Sheet1.U94:Sheet1.U99 Sheet1.T100:Sheet1.T117 Sheet1.U100:Sheet1.U1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7.445cm" svg:height="9.821cm" svg:x="13.397cm" svg:y="85.841cm">
            <draw:object draw:notify-on-update-of-ranges="Sheet1.B174:Sheet1.B189 Sheet1.C174:Sheet1.C189 Sheet1.K187:Sheet1.K188 Sheet1.L187:Sheet1.L188 Sheet1.B190:Sheet1.B192 Sheet1.C190:Sheet1.C192 Sheet1.B193:Sheet1.B208 Sheet1.C193:Sheet1.C2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5.999cm" svg:height="8.999cm" svg:x="56.446cm" svg:y="84.641cm">
            <draw:object draw:notify-on-update-of-ranges="Sheet1.S174:Sheet1.S183 Sheet1.T174:Sheet1.T183 Sheet1.AC184:Sheet1.AC185 Sheet1.AD184:Sheet1.AD185 Sheet1.S187:Sheet1.S204 Sheet1.T187:Sheet1.T204 Sheet1.S184:Sheet1.S186 Sheet1.T184:Sheet1.T1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9"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number-columns-repeated="2"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 table:number-columns-repeated="3"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8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style-name="ce3"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11"/>
        </table:table-row>
        <table:table-row table:style-name="ro1">
          <table:table-cell office:value-type="float" office:value="40.41" calcext:value-type="float">
            <text:p>40.41</text:p>
          </table:table-cell>
          <table:table-cell table:style-name="ce3"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table:style-name="ce3"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11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table:style-name="ce3"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table:style-name="ce3"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8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table:style-name="ce3"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table:style-name="ce3"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11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table:style-name="ce3"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table:style-name="ce3"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11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table:style-name="ce3"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table:style-name="ce3" office:value-type="float" office:value="1477.39" calcext:value-type="float">
            <text:p>1477.39</text:p>
          </table:table-cell>
          <table:table-cell table:number-columns-repeated="14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table:style-name="ce3"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11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table:style-name="ce3"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table:style-name="ce3"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11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table:style-name="ce3"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table:style-name="ce3" office:value-type="float" office:value="1476.12" calcext:value-type="float">
            <text:p>1476.12</text:p>
          </table:table-cell>
          <table:table-cell table:number-columns-repeated="14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table:style-name="ce3"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table:style-name="ce3"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9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table:style-name="ce3"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table:style-name="ce3"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7" calcext:value-type="float">
            <text:p>0.0601327687304527</text:p>
          </table:table-cell>
          <table:table-cell table:number-columns-repeated="8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table:style-name="ce3"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table:style-name="ce3"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8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table:style-name="ce3"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table:style-name="ce3"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8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table:style-name="ce3"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table:style-name="ce3" office:value-type="float" office:value="1473.33" calcext:value-type="float">
            <text:p>1473.33</text:p>
          </table:table-cell>
          <table:table-cell table:number-columns-repeated="14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table:style-name="ce3" office:value-type="float" office:value="1472.83" calcext:value-type="float">
            <text:p>1472.83</text:p>
          </table:table-cell>
          <table:table-cell table:number-columns-repeated="14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table:style-name="ce3"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table:style-name="ce3" office:value-type="float" office:value="1472.38" calcext:value-type="float">
            <text:p>1472.38</text:p>
          </table:table-cell>
          <table:table-cell table:number-columns-repeated="14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table:style-name="ce3"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table:style-name="ce3"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table:style-name="ce3"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table:style-name="ce3"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table:style-name="ce3"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3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table:style-name="ce3"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table:style-name="ce3" office:value-type="float" office:value="1470.11" calcext:value-type="float">
            <text:p>1470.11</text:p>
          </table:table-cell>
          <table:table-cell table:number-columns-repeated="14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table:style-name="ce3"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table:style-name="ce3" office:value-type="float" office:value="1469.93" calcext:value-type="float">
            <text:p>1469.93</text:p>
          </table:table-cell>
          <table:table-cell table:number-columns-repeated="14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table:style-name="ce3"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table:style-name="ce3" office:value-type="float" office:value="1469.66" calcext:value-type="float">
            <text:p>1469.66</text:p>
          </table:table-cell>
          <table:table-cell table:number-columns-repeated="14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table:style-name="ce3"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table:style-name="ce3" office:value-type="float" office:value="1469.4" calcext:value-type="float">
            <text:p>1469.40</text:p>
          </table:table-cell>
          <table:table-cell table:number-columns-repeated="14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table:style-name="ce3"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table:style-name="ce3" office:value-type="float" office:value="1469.11" calcext:value-type="float">
            <text:p>1469.11</text:p>
          </table:table-cell>
          <table:table-cell table:number-columns-repeated="14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table:style-name="ce3"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table:style-name="ce3" office:value-type="float" office:value="1468.81" calcext:value-type="float">
            <text:p>1468.81</text:p>
          </table:table-cell>
          <table:table-cell table:number-columns-repeated="14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table:style-name="ce3" office:value-type="float" office:value="1592.7" calcext:value-type="float">
            <text:p>1592.70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table:style-name="ce3" office:value-type="float" office:value="1592.09" calcext:value-type="float">
            <text:p>1592.09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table:style-name="ce3" office:value-type="float" office:value="1591.5" calcext:value-type="float">
            <text:p>1591.50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table:style-name="ce3" office:value-type="float" office:value="1590.99" calcext:value-type="float">
            <text:p>1590.99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table:style-name="ce3" office:value-type="float" office:value="1590.4" calcext:value-type="float">
            <text:p>1590.40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table:style-name="ce3" office:value-type="float" office:value="1589.78" calcext:value-type="float">
            <text:p>1589.78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table:style-name="ce3" office:value-type="float" office:value="1589.3" calcext:value-type="float">
            <text:p>1589.30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table:style-name="ce3" office:value-type="float" office:value="1588.8" calcext:value-type="float">
            <text:p>1588.80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table:style-name="ce3" office:value-type="float" office:value="1588.27" calcext:value-type="float">
            <text:p>1588.27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table:style-name="ce3" office:value-type="float" office:value="1587.62" calcext:value-type="float">
            <text:p>1587.62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table:style-name="ce3" office:value-type="float" office:value="1587.08" calcext:value-type="float">
            <text:p>1587.08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table:style-name="ce3" office:value-type="float" office:value="1586.59" calcext:value-type="float">
            <text:p>1586.59</text:p>
          </table:table-cell>
          <table:table-cell table:number-columns-repeated="13"/>
          <table:table-cell table:style-name="ce3"/>
          <table:table-cell table:number-columns-repeated="14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table:style-name="ce3"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table:style-name="ce3"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table:style-name="ce3"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table:style-name="ce3"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table:style-name="ce3"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table:style-name="ce3"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table:style-name="ce3"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table:style-name="ce3"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table:style-name="ce3"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table:style-name="ce3"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table:style-name="ce3"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table:style-name="ce3"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table:style-name="ce3"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0"/>
          <table:table-cell table:style-name="ce3"/>
          <table:table-cell table:number-columns-repeated="14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20"/>
        </table:table-row>
        <table:table-row table:style-name="ro1" table:number-rows-repeated="19">
          <table:table-cell table:number-columns-repeated="30"/>
        </table:table-row>
        <table:table-row table:style-name="ro1">
          <table:table-cell/>
          <table:table-cell office:value-type="string" calcext:value-type="string">
            <text:p>TABELLA GRAFITE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10"/>
          <table:table-cell office:value-type="string" calcext:value-type="string">
            <text:p>TABELLA GRAFITE SECONDA VOLTA</text:p>
          </table:table-cell>
          <table:table-cell table:number-columns-repeated="3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1"/>
          <table:table-cell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55.56" calcext:value-type="float">
            <text:p>1555.56</text:p>
          </table:table-cell>
          <table:table-cell/>
          <table:table-cell office:value-type="string" calcext:value-type="string">
            <text:p>t_start</text:p>
          </table:table-cell>
          <table:table-cell table:formula="of:=[.B103]" office:value-type="float" office:value="320.55" calcext:value-type="float">
            <text:p>320.5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/>
          <table:table-cell office:value-type="string" calcext:value-type="string">
            <text:p>t_start</text:p>
          </table:table-cell>
          <table:table-cell table:formula="of:=[.T94]" office:value-type="float" office:value="140.12" calcext:value-type="float">
            <text:p>140.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table:style-name="ce3" office:value-type="float" office:value="1555.34" calcext:value-type="float">
            <text:p>1555.34</text:p>
          </table:table-cell>
          <table:table-cell/>
          <table:table-cell office:value-type="string" calcext:value-type="string">
            <text:p>t_stop</text:p>
          </table:table-cell>
          <table:table-cell table:formula="of:=[.B104]" office:value-type="float" office:value="390.6" calcext:value-type="float">
            <text:p>390.6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9"/>
          <table:table-cell office:value-type="float" office:value="20.32" calcext:value-type="float">
            <text:p>20.32</text:p>
          </table:table-cell>
          <table:table-cell table:formula="of:=[.T87]+[.S88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/>
          <table:table-cell office:value-type="string" calcext:value-type="string">
            <text:p>t_stop</text:p>
          </table:table-cell>
          <table:table-cell table:formula="of:=[.T99]" office:value-type="float" office:value="165.28" calcext:value-type="float">
            <text:p>165.28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3"/>
        </table:table-row>
        <table:table-row table:style-name="ro1">
          <table:table-cell/>
          <table:table-cell table:formula="of:=[.B88]+20.16" office:value-type="float" office:value="40.07" calcext:value-type="float">
            <text:p>40.07</text:p>
          </table:table-cell>
          <table:table-cell table:style-name="ce3" office:value-type="float" office:value="1555.01" calcext:value-type="float">
            <text:p>1555.01</text:p>
          </table:table-cell>
          <table:table-cell/>
          <table:table-cell office:value-type="string" calcext:value-type="string">
            <text:p>dt</text:p>
          </table:table-cell>
          <table:table-cell table:formula="of:=[.F88]-[.F87]" office:value-type="float" office:value="70.05" calcext:value-type="float">
            <text:p>70.05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87:.C101];[.B87:.B101];1;1)" office:value-type="float" office:value="-0.0149177536658614" calcext:value-type="float">
            <text:p>-0.0149177536658614</text:p>
          </table:table-cell>
          <table:table-cell office:value-type="float" office:value="1555.6551299072" calcext:value-type="float">
            <text:p>1555.6551299072</text:p>
          </table:table-cell>
          <table:table-cell table:number-columns-repeated="8"/>
          <table:table-cell office:value-type="float" office:value="20.14" calcext:value-type="float">
            <text:p>20.14</text:p>
          </table:table-cell>
          <table:table-cell table:formula="of:=[.T88]+[.S89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/>
          <table:table-cell office:value-type="string" calcext:value-type="string">
            <text:p>dt</text:p>
          </table:table-cell>
          <table:table-cell table:formula="of:=[.X88]-[.X87]" office:value-type="float" office:value="25.16" calcext:value-type="float">
            <text:p>25.16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U87:.U93];[.T87:.T93];1;1)" office:value-type="float" office:value="-0.0130605349539274" calcext:value-type="float">
            <text:p>-0.0130605349539274</text:p>
          </table:table-cell>
          <table:table-cell office:value-type="float" office:value="1467.88530073838" calcext:value-type="float">
            <text:p>1467.88530073838</text:p>
          </table:table-cell>
          <table:table-cell table:number-columns-repeated="2"/>
        </table:table-row>
        <table:table-row table:style-name="ro1">
          <table:table-cell office:value-type="float" office:value="20.16" calcext:value-type="float">
            <text:p>20.16</text:p>
          </table:table-cell>
          <table:table-cell table:formula="of:=[.B89]+[.A90]" office:value-type="float" office:value="60.23" calcext:value-type="float">
            <text:p>60.23</text:p>
          </table:table-cell>
          <table:table-cell table:style-name="ce3" office:value-type="float" office:value="1554.4" calcext:value-type="float">
            <text:p>1554.40</text:p>
          </table:table-cell>
          <table:table-cell/>
          <table:table-cell office:value-type="string" calcext:value-type="string">
            <text:p>t_medio</text:p>
          </table:table-cell>
          <table:table-cell table:formula="of:=([.F87]+[.F88])/2" office:value-type="float" office:value="355.575" calcext:value-type="float">
            <text:p>355.575</text:p>
          </table:table-cell>
          <table:table-cell table:number-columns-repeated="2"/>
          <table:table-cell office:value-type="float" office:value="0.000435182193664168" calcext:value-type="float">
            <text:p>0.000435182193664168</text:p>
          </table:table-cell>
          <table:table-cell office:value-type="float" office:value="0.0717434748017157" calcext:value-type="float">
            <text:p>0.0717434748017157</text:p>
          </table:table-cell>
          <table:table-cell table:number-columns-repeated="8"/>
          <table:table-cell table:formula="of:=0.35+19.32" office:value-type="float" office:value="19.67" calcext:value-type="float">
            <text:p>19.67</text:p>
          </table:table-cell>
          <table:table-cell table:formula="of:=[.T89]+[.S90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/>
          <table:table-cell office:value-type="string" calcext:value-type="string">
            <text:p>t_medio</text:p>
          </table:table-cell>
          <table:table-cell table:formula="of:=([.X87]+[.X88])/2" office:value-type="float" office:value="152.7" calcext:value-type="float">
            <text:p>152.7</text:p>
          </table:table-cell>
          <table:table-cell table:number-columns-repeated="2"/>
          <table:table-cell office:value-type="float" office:value="0.000200536484869629" calcext:value-type="float">
            <text:p>0.000200536484869629</text:p>
          </table:table-cell>
          <table:table-cell office:value-type="float" office:value="0.0145041550274318" calcext:value-type="float">
            <text:p>0.0145041550274318</text:p>
          </table:table-cell>
          <table:table-cell table:number-columns-repeated="2"/>
        </table:table-row>
        <table:table-row table:style-name="ro1">
          <table:table-cell office:value-type="float" office:value="20.21" calcext:value-type="float">
            <text:p>20.21</text:p>
          </table:table-cell>
          <table:table-cell table:formula="of:=[.B90]+[.A91]" office:value-type="float" office:value="80.44" calcext:value-type="float">
            <text:p>80.44</text:p>
          </table:table-cell>
          <table:table-cell table:style-name="ce3" office:value-type="float" office:value="1554.63" calcext:value-type="float">
            <text:p>1554.63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90]*[.I90]+[.J90]" office:value-type="float" office:value="0.226483383313852" calcext:value-type="float">
            <text:p>0.226483383313852</text:p>
          </table:table-cell>
          <table:table-cell table:number-columns-repeated="9"/>
          <table:table-cell office:value-type="float" office:value="20.06" calcext:value-type="float">
            <text:p>20.06</text:p>
          </table:table-cell>
          <table:table-cell table:formula="of:=[.T90]+[.S91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X90]*[.AA90]+[.AB90]" office:value-type="float" office:value="0.0451260762670242" calcext:value-type="float">
            <text:p>0.0451260762670242</text:p>
          </table:table-cell>
          <table:table-cell table:number-columns-repeated="3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B91]+[.A92]" office:value-type="float" office:value="100.14" calcext:value-type="float">
            <text:p>100.14</text:p>
          </table:table-cell>
          <table:table-cell table:style-name="ce3" office:value-type="float" office:value="1554.35" calcext:value-type="float">
            <text:p>1554.35</text:p>
          </table:table-cell>
          <table:table-cell/>
          <table:table-cell office:value-type="string" calcext:value-type="string">
            <text:p>PENDENZA1</text:p>
          </table:table-cell>
          <table:table-cell table:formula="of:=SLOPE([.C87:.C102];[.B87:.B102])" office:value-type="float" office:value="-0.0150871894978227" calcext:value-type="float">
            <text:p>-0.0150871894978227</text:p>
          </table:table-cell>
          <table:table-cell table:number-columns-repeated="12"/>
          <table:table-cell office:value-type="float" office:value="20.12" calcext:value-type="float">
            <text:p>20.12</text:p>
          </table:table-cell>
          <table:table-cell table:formula="of:=[.T91]+[.S92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/>
          <table:table-cell office:value-type="string" calcext:value-type="string">
            <text:p>PENDENZA1</text:p>
          </table:table-cell>
          <table:table-cell table:formula="of:=SLOPE([.U87:.U93];[.T87:.T93])" office:value-type="float" office:value="-0.0130605349539274" calcext:value-type="float">
            <text:p>-0.0130605349539274</text:p>
          </table:table-cell>
          <table:table-cell table:number-columns-repeated="6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B92]+[.A93]" office:value-type="float" office:value="120.44" calcext:value-type="float">
            <text:p>120.44</text:p>
          </table:table-cell>
          <table:table-cell table:style-name="ce3" office:value-type="float" office:value="1554.01" calcext:value-type="float">
            <text:p>1554.01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87:.C102];[.B87:.B102])" office:value-type="float" office:value="1555.67097474835" calcext:value-type="float">
            <text:p>1555.67097474835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07:.C121];[.B107:.B121];1;1)" office:value-type="float" office:value="-0.0149897231882692" calcext:value-type="float">
            <text:p>-0.0149897231882692</text:p>
          </table:table-cell>
          <table:table-cell office:value-type="float" office:value="1546.3068332149" calcext:value-type="float">
            <text:p>1546.3068332149</text:p>
          </table:table-cell>
          <table:table-cell table:number-columns-repeated="8"/>
          <table:table-cell office:value-type="float" office:value="19.94" calcext:value-type="float">
            <text:p>19.94</text:p>
          </table:table-cell>
          <table:table-cell table:formula="of:=[.T92]+[.S93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U87:.U93];[.T87:.T93])" office:value-type="float" office:value="1467.88530073838" calcext:value-type="float">
            <text:p>1467.88530073838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U100:.U117];[.T100:.T117];1;1)" office:value-type="float" office:value="-0.0106935144115225" calcext:value-type="float">
            <text:p>-0.0106935144115225</text:p>
          </table:table-cell>
          <table:table-cell office:value-type="float" office:value="1458.84189029066" calcext:value-type="float">
            <text:p>1458.8418902906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3]+[.A94]" office:value-type="float" office:value="140.44" calcext:value-type="float">
            <text:p>140.44</text:p>
          </table:table-cell>
          <table:table-cell table:style-name="ce3" office:value-type="float" office:value="1553.68" calcext:value-type="float">
            <text:p>1553.68</text:p>
          </table:table-cell>
          <table:table-cell table:number-columns-repeated="5"/>
          <table:table-cell office:value-type="float" office:value="0.000183530607318207" calcext:value-type="float">
            <text:p>0.000183530607318207</text:p>
          </table:table-cell>
          <table:table-cell office:value-type="float" office:value="0.0903584665269323" calcext:value-type="float">
            <text:p>0.0903584665269323</text:p>
          </table:table-cell>
          <table:table-cell table:number-columns-repeated="8"/>
          <table:table-cell table:style-name="ce8" office:value-type="float" office:value="19.87" calcext:value-type="float">
            <text:p>19.87</text:p>
          </table:table-cell>
          <table:table-cell table:style-name="ce8" table:formula="of:=[.T93]+[.S94]" office:value-type="float" office:value="140.12" calcext:value-type="float">
            <text:p>140.12</text:p>
          </table:table-cell>
          <table:table-cell table:style-name="ce8" office:value-type="float" office:value="1460.41" calcext:value-type="float">
            <text:p>1460.41</text:p>
          </table:table-cell>
          <table:table-cell office:value-type="string" calcext:value-type="string">
            <text:p>IMMERSO</text:p>
          </table:table-cell>
          <table:table-cell table:number-columns-repeated="4"/>
          <table:table-cell office:value-type="float" office:value="0.000353490125418713" calcext:value-type="float">
            <text:p>0.000353490125418713</text:p>
          </table:table-cell>
          <table:table-cell office:value-type="float" office:value="0.0952826195777857" calcext:value-type="float">
            <text:p>0.09528261957778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4]+[.A95]" office:value-type="float" office:value="160.44" calcext:value-type="float">
            <text:p>160.44</text:p>
          </table:table-cell>
          <table:table-cell table:style-name="ce3" office:value-type="float" office:value="1553.35" calcext:value-type="float">
            <text:p>1553.35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05:.C144];[.B105:.B144])" office:value-type="float" office:value="-0.0165799547471474" calcext:value-type="float">
            <text:p>-0.0165799547471474</text:p>
          </table:table-cell>
          <table:table-cell/>
          <table:table-cell office:value-type="string" calcext:value-type="string">
            <text:p>errmIII</text:p>
          </table:table-cell>
          <table:table-cell table:formula="of:=[.F90]*[.I94]+[.J94]" office:value-type="float" office:value="0.155617362224104" calcext:value-type="float">
            <text:p>0.155617362224104</text:p>
          </table:table-cell>
          <table:table-cell table:number-columns-repeated="9"/>
          <table:table-cell office:value-type="float" office:value="5.24" calcext:value-type="float">
            <text:p>5.24</text:p>
          </table:table-cell>
          <table:table-cell table:formula="of:=[.T94]+[.S95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/>
          <table:table-cell office:value-type="string" calcext:value-type="string">
            <text:p>PENDENZA3</text:p>
          </table:table-cell>
          <table:table-cell table:formula="of:=SLOPE([.U100:.U117];[.T100:.T117])" office:value-type="float" office:value="-0.0106935144115225" calcext:value-type="float">
            <text:p>-0.0106935144115225</text:p>
          </table:table-cell>
          <table:table-cell/>
          <table:table-cell office:value-type="string" calcext:value-type="string">
            <text:p>errmIII</text:p>
          </table:table-cell>
          <table:table-cell table:formula="of:=[.X90]*[.AA94]+[.AB94]" office:value-type="float" office:value="0.149260561729223" calcext:value-type="float">
            <text:p>0.149260561729223</text:p>
          </table:table-cell>
          <table:table-cell table:number-columns-repeated="3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95]+[.A96]" office:value-type="float" office:value="180.43" calcext:value-type="float">
            <text:p>180.43</text:p>
          </table:table-cell>
          <table:table-cell table:style-name="ce3" office:value-type="float" office:value="1553.02" calcext:value-type="float">
            <text:p>1553.02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05:.C144];[.B105:.B144])" office:value-type="float" office:value="1547.08647291981" calcext:value-type="float">
            <text:p>1547.08647291981</text:p>
          </table:table-cell>
          <table:table-cell table:number-columns-repeated="12"/>
          <table:table-cell office:value-type="float" office:value="4.8" calcext:value-type="float">
            <text:p>4.8</text:p>
          </table:table-cell>
          <table:table-cell table:formula="of:=[.T95]+[.S96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U100:.U117];[.T100:.T117])" office:value-type="float" office:value="1458.84189029066" calcext:value-type="float">
            <text:p>1458.84189029066</text:p>
          </table:table-cell>
          <table:table-cell table:number-columns-repeated="6"/>
        </table:table-row>
        <table:table-row table:style-name="ro1">
          <table:table-cell office:value-type="float" office:value="20.01" calcext:value-type="float">
            <text:p>20.01</text:p>
          </table:table-cell>
          <table:table-cell table:formula="of:=[.B96]+[.A97]" office:value-type="float" office:value="200.44" calcext:value-type="float">
            <text:p>200.44</text:p>
          </table:table-cell>
          <table:table-cell table:style-name="ce3" office:value-type="float" office:value="1552.65" calcext:value-type="float">
            <text:p>1552.65</text:p>
          </table:table-cell>
          <table:table-cell table:number-columns-repeated="15"/>
          <table:table-cell office:value-type="float" office:value="5.19" calcext:value-type="float">
            <text:p>5.19</text:p>
          </table:table-cell>
          <table:table-cell table:formula="of:=[.T96]+[.S97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9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97]+[.A98]" office:value-type="float" office:value="220.5" calcext:value-type="float">
            <text:p>220.5</text:p>
          </table:table-cell>
          <table:table-cell table:style-name="ce3" office:value-type="float" office:value="1552.35" calcext:value-type="float">
            <text:p>1552.35</text:p>
          </table:table-cell>
          <table:table-cell/>
          <table:table-cell office:value-type="string" calcext:value-type="string">
            <text:p>massa_i_extrp</text:p>
          </table:table-cell>
          <table:table-cell table:formula="of:=[.F93]+[.F92]*[.F90]" office:value-type="float" office:value="1550.30634734266" calcext:value-type="float">
            <text:p>1550.30634734266</text:p>
          </table:table-cell>
          <table:table-cell/>
          <table:table-cell office:value-type="string" calcext:value-type="string">
            <text:p>errmtot</text:p>
          </table:table-cell>
          <table:table-cell table:formula="of:=[.I95]+[.I91]" office:value-type="float" office:value="0.382100745537956" calcext:value-type="float">
            <text:p>0.382100745537956</text:p>
          </table:table-cell>
          <table:table-cell table:number-columns-repeated="9"/>
          <table:table-cell office:value-type="float" office:value="6.51" calcext:value-type="float">
            <text:p>6.51</text:p>
          </table:table-cell>
          <table:table-cell table:formula="of:=[.T97]+[.S98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/>
          <table:table-cell office:value-type="string" calcext:value-type="string">
            <text:p>massa_i_extrp</text:p>
          </table:table-cell>
          <table:table-cell table:formula="of:=[.X93]+[.X92]*[.X90]" office:value-type="float" office:value="1465.89095705092" calcext:value-type="float">
            <text:p>1465.89095705092</text:p>
          </table:table-cell>
          <table:table-cell/>
          <table:table-cell office:value-type="string" calcext:value-type="string">
            <text:p>errmtot</text:p>
          </table:table-cell>
          <table:table-cell table:formula="of:=[.AA95]+[.AA91]" office:value-type="float" office:value="0.194386637996247" calcext:value-type="float">
            <text:p>0.194386637996247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B98]+[.A99]" office:value-type="float" office:value="240.3" calcext:value-type="float">
            <text:p>240.3</text:p>
          </table:table-cell>
          <table:table-cell table:style-name="ce3" office:value-type="float" office:value="1552.05" calcext:value-type="float">
            <text:p>1552.05</text:p>
          </table:table-cell>
          <table:table-cell/>
          <table:table-cell office:value-type="string" calcext:value-type="string">
            <text:p>massa_f_extrp</text:p>
          </table:table-cell>
          <table:table-cell table:formula="of:=[.F96]+[.F95]*[.F90]" office:value-type="float" office:value="1541.19105551059" calcext:value-type="float">
            <text:p>1541.19105551059</text:p>
          </table:table-cell>
          <table:table-cell table:number-columns-repeated="12"/>
          <table:table-cell office:value-type="float" office:value="3.42" calcext:value-type="float">
            <text:p>3.42</text:p>
          </table:table-cell>
          <table:table-cell table:formula="of:=[.T98]+[.S99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assa_f_extrp</text:p>
          </table:table-cell>
          <table:table-cell table:formula="of:=[.X96]+[.X95]*[.X90]" office:value-type="float" office:value="1457.20899064002" calcext:value-type="float">
            <text:p>1457.20899064002</text:p>
          </table:table-cell>
          <table:table-cell table:number-columns-repeated="6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99]+[.A100]" office:value-type="float" office:value="260.45" calcext:value-type="float">
            <text:p>260.45</text:p>
          </table:table-cell>
          <table:table-cell table:style-name="ce3" office:value-type="float" office:value="1551.67" calcext:value-type="float">
            <text:p>1551.67</text:p>
          </table:table-cell>
          <table:table-cell table:number-columns-repeated="15"/>
          <table:table-cell office:value-type="float" office:value="5.13" calcext:value-type="float">
            <text:p>5.13</text:p>
          </table:table-cell>
          <table:table-cell table:formula="of:=[.T99]+[.S100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9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100]+[.A101]" office:value-type="float" office:value="280.44" calcext:value-type="float">
            <text:p>280.44</text:p>
          </table:table-cell>
          <table:table-cell table:style-name="ce3" office:value-type="float" office:value="1551.36" calcext:value-type="float">
            <text:p>1551.3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98]-[.F99]" office:value-type="float" office:value="9.11529183207222" calcext:value-type="float">
            <text:p>9.11529183207222</text:p>
          </table:table-cell>
          <table:table-cell table:number-columns-repeated="12"/>
          <table:table-cell office:value-type="float" office:value="9.65" calcext:value-type="float">
            <text:p>9.65</text:p>
          </table:table-cell>
          <table:table-cell table:formula="of:=[.T100]+[.S101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/>
          <table:table-cell office:value-type="string" calcext:value-type="string">
            <text:p>massa netta evap</text:p>
          </table:table-cell>
          <table:table-cell table:formula="of:=[.X98]-[.X99]" office:value-type="float" office:value="8.68196641089594" calcext:value-type="float">
            <text:p>8.68196641089594</text:p>
          </table:table-cell>
          <table:table-cell/>
          <table:table-cell table:formula="of:=[.X90]-[.X87]" office:value-type="float" office:value="12.58" calcext:value-type="float">
            <text:p>12.58</text:p>
          </table:table-cell>
          <table:table-cell table:number-columns-repeated="4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[.B101]+[.A102]" office:value-type="float" office:value="300.39" calcext:value-type="float">
            <text:p>300.39</text:p>
          </table:table-cell>
          <table:table-cell table:style-name="ce3" office:value-type="float" office:value="1551.02" calcext:value-type="float">
            <text:p>1551.02</text:p>
          </table:table-cell>
          <table:table-cell table:number-columns-repeated="4"/>
          <table:table-cell table:formula="of:=[.F90]-[.F87]" office:value-type="float" office:value="35.025" calcext:value-type="float">
            <text:p>35.025</text:p>
          </table:table-cell>
          <table:table-cell table:number-columns-repeated="10"/>
          <table:table-cell office:value-type="float" office:value="20.03" calcext:value-type="float">
            <text:p>20.03</text:p>
          </table:table-cell>
          <table:table-cell table:formula="of:=[.T101]+[.S102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9"/>
        </table:table-row>
        <table:table-row table:style-name="ro1">
          <table:table-cell table:style-name="ce8" office:value-type="float" office:value="20.16" calcext:value-type="float">
            <text:p>20.16</text:p>
          </table:table-cell>
          <table:table-cell table:style-name="ce8" table:formula="of:=[.B102]+[.A103]" office:value-type="float" office:value="320.55" calcext:value-type="float">
            <text:p>320.55</text:p>
          </table:table-cell>
          <table:table-cell table:style-name="ce15"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table:number-columns-repeated="3"/>
          <table:table-cell table:formula="of:=[.F90]" office:value-type="float" office:value="355.575" calcext:value-type="float">
            <text:p>355.575</text:p>
          </table:table-cell>
          <table:table-cell office:value-type="float" office:value="1540" calcext:value-type="float">
            <text:p>1540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table:formula="of:=[.T102]+[.S103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4"/>
          <table:table-cell office:value-type="float" office:value="152.7" calcext:value-type="float">
            <text:p>152.7</text:p>
          </table:table-cell>
          <table:table-cell office:value-type="float" office:value="1455" calcext:value-type="float">
            <text:p>1455</text:p>
          </table:table-cell>
          <table:table-cell table:number-columns-repeated="3"/>
        </table:table-row>
        <table:table-row table:style-name="ro1">
          <table:table-cell table:formula="of:=60.91+0.61+8.53" office:value-type="float" office:value="70.05" calcext:value-type="float">
            <text:p>70.05</text:p>
          </table:table-cell>
          <table:table-cell table:formula="of:=[.B103]+[.A104]" office:value-type="float" office:value="390.6" calcext:value-type="float">
            <text:p>390.6</text:p>
          </table:table-cell>
          <table:table-cell table:style-name="ce3" office:value-type="float" office:value="1540.33" calcext:value-type="float">
            <text:p>1540.3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calore specifico</text:p>
          </table:table-cell>
          <table:table-cell table:formula="of:=([.F101]*[.F85])/([.F84]*([.H84]-[.H85]))*([.H86]/4.184)" office:value-type="float" office:value="1.2151500682642" calcext:value-type="float">
            <text:p>1.2151500682642</text:p>
          </table:table-cell>
          <table:table-cell/>
          <table:table-cell table:formula="of:=[.F90]" office:value-type="float" office:value="355.575" calcext:value-type="float">
            <text:p>355.575</text:p>
          </table:table-cell>
          <table:table-cell office:value-type="float" office:value="1551" calcext:value-type="float">
            <text:p>1551</text:p>
          </table:table-cell>
          <table:table-cell table:number-columns-repeated="9"/>
          <table:table-cell office:value-type="float" office:value="10.06" calcext:value-type="float">
            <text:p>10.06</text:p>
          </table:table-cell>
          <table:table-cell table:formula="of:=[.T103]+[.S104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X101]*[.X85])/([.X84]*([.Z84]-[.Z85]))*([.Z86]/4.184)" office:value-type="float" office:value="1.15738390730924" calcext:value-type="float">
            <text:p>1.15738390730924</text:p>
          </table:table-cell>
          <table:table-cell/>
          <table:table-cell office:value-type="float" office:value="152.7" calcext:value-type="float">
            <text:p>152.7</text:p>
          </table:table-cell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9.98" calcext:value-type="float">
            <text:p>9.98</text:p>
          </table:table-cell>
          <table:table-cell table:formula="of:=[.B104]+[.A105]" office:value-type="float" office:value="400.58" calcext:value-type="float">
            <text:p>400.58</text:p>
          </table:table-cell>
          <table:table-cell table:style-name="ce3" office:value-type="float" office:value="1540.26" calcext:value-type="float">
            <text:p>1540.26</text:p>
          </table:table-cell>
          <table:table-cell table:number-columns-repeated="15"/>
          <table:table-cell office:value-type="float" office:value="10.05" calcext:value-type="float">
            <text:p>10.05</text:p>
          </table:table-cell>
          <table:table-cell table:formula="of:=[.T104]+[.S105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9"/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B105]+[.A106]" office:value-type="float" office:value="410.44" calcext:value-type="float">
            <text:p>410.44</text:p>
          </table:table-cell>
          <table:table-cell table:style-name="ce3" office:value-type="float" office:value="1540.14" calcext:value-type="float">
            <text:p>1540.14</text:p>
          </table:table-cell>
          <table:table-cell table:number-columns-repeated="15"/>
          <table:table-cell office:value-type="float" office:value="9.98" calcext:value-type="float">
            <text:p>9.98</text:p>
          </table:table-cell>
          <table:table-cell table:formula="of:=[.T105]+[.S106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9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06]+[.A107]" office:value-type="float" office:value="420.37" calcext:value-type="float">
            <text:p>420.37</text:p>
          </table:table-cell>
          <table:table-cell table:style-name="ce3" office:value-type="float" office:value="1540.01" calcext:value-type="float">
            <text:p>1540.01</text:p>
          </table:table-cell>
          <table:table-cell table:number-columns-repeated="15"/>
          <table:table-cell office:value-type="float" office:value="9.92" calcext:value-type="float">
            <text:p>9.92</text:p>
          </table:table-cell>
          <table:table-cell table:formula="of:=[.T106]+[.S107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9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B107]+[.A108]" office:value-type="float" office:value="430.47" calcext:value-type="float">
            <text:p>430.47</text:p>
          </table:table-cell>
          <table:table-cell table:style-name="ce3" office:value-type="float" office:value="1539.85" calcext:value-type="float">
            <text:p>1539.85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07]+[.S108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9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B108]+[.A109]" office:value-type="float" office:value="440.37" calcext:value-type="float">
            <text:p>440.37</text:p>
          </table:table-cell>
          <table:table-cell table:style-name="ce3" office:value-type="float" office:value="1539.7" calcext:value-type="float">
            <text:p>1539.70</text:p>
          </table:table-cell>
          <table:table-cell table:number-columns-repeated="15"/>
          <table:table-cell office:value-type="float" office:value="9.94" calcext:value-type="float">
            <text:p>9.94</text:p>
          </table:table-cell>
          <table:table-cell table:formula="of:=[.T108]+[.S109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9"/>
        </table:table-row>
        <table:table-row table:style-name="ro1">
          <table:table-cell office:value-type="float" office:value="10.13" calcext:value-type="float">
            <text:p>10.13</text:p>
          </table:table-cell>
          <table:table-cell table:formula="of:=[.B109]+[.A110]" office:value-type="float" office:value="450.5" calcext:value-type="float">
            <text:p>450.5</text:p>
          </table:table-cell>
          <table:table-cell table:style-name="ce3" office:value-type="float" office:value="1539.56" calcext:value-type="float">
            <text:p>1539.56</text:p>
          </table:table-cell>
          <table:table-cell table:number-columns-repeated="15"/>
          <table:table-cell office:value-type="float" office:value="10.07" calcext:value-type="float">
            <text:p>10.07</text:p>
          </table:table-cell>
          <table:table-cell table:formula="of:=[.T109]+[.S110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9"/>
        </table:table-row>
        <table:table-row table:style-name="ro1">
          <table:table-cell office:value-type="float" office:value="9.81" calcext:value-type="float">
            <text:p>9.81</text:p>
          </table:table-cell>
          <table:table-cell table:formula="of:=[.B110]+[.A111]" office:value-type="float" office:value="460.31" calcext:value-type="float">
            <text:p>460.31</text:p>
          </table:table-cell>
          <table:table-cell table:style-name="ce3" office:value-type="float" office:value="1539.43" calcext:value-type="float">
            <text:p>1539.43</text:p>
          </table:table-cell>
          <table:table-cell table:number-columns-repeated="15"/>
          <table:table-cell office:value-type="float" office:value="9.87" calcext:value-type="float">
            <text:p>9.87</text:p>
          </table:table-cell>
          <table:table-cell table:formula="of:=[.T110]+[.S111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9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1]+[.A112]" office:value-type="float" office:value="470.36" calcext:value-type="float">
            <text:p>470.36</text:p>
          </table:table-cell>
          <table:table-cell table:style-name="ce3" office:value-type="float" office:value="1539.27" calcext:value-type="float">
            <text:p>1539.27</text:p>
          </table:table-cell>
          <table:table-cell table:number-columns-repeated="15"/>
          <table:table-cell office:value-type="float" office:value="10.14" calcext:value-type="float">
            <text:p>10.14</text:p>
          </table:table-cell>
          <table:table-cell table:formula="of:=[.T111]+[.S112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9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[.B112]+[.A113]" office:value-type="float" office:value="480.44" calcext:value-type="float">
            <text:p>480.44</text:p>
          </table:table-cell>
          <table:table-cell table:style-name="ce3" office:value-type="float" office:value="1539.14" calcext:value-type="float">
            <text:p>1539.14</text:p>
          </table:table-cell>
          <table:table-cell table:number-columns-repeated="15"/>
          <table:table-cell office:value-type="float" office:value="9.99" calcext:value-type="float">
            <text:p>9.99</text:p>
          </table:table-cell>
          <table:table-cell table:formula="of:=[.T112]+[.S113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9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3]+[.A114]" office:value-type="float" office:value="490.49" calcext:value-type="float">
            <text:p>490.49</text:p>
          </table:table-cell>
          <table:table-cell table:style-name="ce3" office:value-type="float" office:value="1538.86" calcext:value-type="float">
            <text:p>1538.86</text:p>
          </table:table-cell>
          <table:table-cell table:number-columns-repeated="15"/>
          <table:table-cell office:value-type="float" office:value="9.91" calcext:value-type="float">
            <text:p>9.91</text:p>
          </table:table-cell>
          <table:table-cell table:formula="of:=[.T113]+[.S114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9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[.B114]+[.A115]" office:value-type="float" office:value="501" calcext:value-type="float">
            <text:p>501</text:p>
          </table:table-cell>
          <table:table-cell table:style-name="ce3" office:value-type="float" office:value="1538.78" calcext:value-type="float">
            <text:p>1538.78</text:p>
          </table:table-cell>
          <table:table-cell table:number-columns-repeated="15"/>
          <table:table-cell office:value-type="float" office:value="10.06" calcext:value-type="float">
            <text:p>10.06</text:p>
          </table:table-cell>
          <table:table-cell table:formula="of:=[.T114]+[.S115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9"/>
        </table:table-row>
        <table:table-row table:style-name="ro1">
          <table:table-cell office:value-type="float" office:value="9.43" calcext:value-type="float">
            <text:p>9.43</text:p>
          </table:table-cell>
          <table:table-cell table:formula="of:=[.B115]+[.A116]" office:value-type="float" office:value="510.43" calcext:value-type="float">
            <text:p>510.43</text:p>
          </table:table-cell>
          <table:table-cell table:style-name="ce3" office:value-type="float" office:value="1538.66" calcext:value-type="float">
            <text:p>1538.66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15]+[.S116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6]+[.A117]" office:value-type="float" office:value="520.43" calcext:value-type="float">
            <text:p>520.43</text:p>
          </table:table-cell>
          <table:table-cell table:style-name="ce3" office:value-type="float" office:value="1538.52" calcext:value-type="float">
            <text:p>1538.52</text:p>
          </table:table-cell>
          <table:table-cell table:number-columns-repeated="15"/>
          <table:table-cell office:value-type="float" office:value="9.72" calcext:value-type="float">
            <text:p>9.72</text:p>
          </table:table-cell>
          <table:table-cell table:formula="of:=[.T116]+[.S117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9"/>
        </table:table-row>
        <table:table-row table:style-name="ro1">
          <table:table-cell office:value-type="float" office:value="9.88" calcext:value-type="float">
            <text:p>9.88</text:p>
          </table:table-cell>
          <table:table-cell table:formula="of:=[.B117]+[.A118]" office:value-type="float" office:value="530.31" calcext:value-type="float">
            <text:p>530.31</text:p>
          </table:table-cell>
          <table:table-cell table:style-name="ce3" office:value-type="float" office:value="1538.38" calcext:value-type="float">
            <text:p>1538.38</text:p>
          </table:table-cell>
          <table:table-cell table:number-columns-repeated="27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18]+[.A119]" office:value-type="float" office:value="540.37" calcext:value-type="float">
            <text:p>540.37</text:p>
          </table:table-cell>
          <table:table-cell table:style-name="ce3" office:value-type="float" office:value="1538.2" calcext:value-type="float">
            <text:p>1538.20</text:p>
          </table:table-cell>
          <table:table-cell table:number-columns-repeated="27"/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[.B119]+[.A120]" office:value-type="float" office:value="550.33" calcext:value-type="float">
            <text:p>550.33</text:p>
          </table:table-cell>
          <table:table-cell table:style-name="ce3" office:value-type="float" office:value="1538.05" calcext:value-type="float">
            <text:p>1538.05</text:p>
          </table:table-cell>
          <table:table-cell table:number-columns-repeated="27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0]+[.A121]" office:value-type="float" office:value="560.36" calcext:value-type="float">
            <text:p>560.36</text:p>
          </table:table-cell>
          <table:table-cell table:style-name="ce3" office:value-type="float" office:value="1537.92" calcext:value-type="float">
            <text:p>1537.92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1]+[.A122]" office:value-type="float" office:value="570.36" calcext:value-type="float">
            <text:p>570.36</text:p>
          </table:table-cell>
          <table:table-cell table:style-name="ce3" office:value-type="float" office:value="1537.76" calcext:value-type="float">
            <text:p>1537.76</text:p>
          </table:table-cell>
          <table:table-cell table:number-columns-repeated="27"/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[.B122]+[.A123]" office:value-type="float" office:value="580.31" calcext:value-type="float">
            <text:p>580.31</text:p>
          </table:table-cell>
          <table:table-cell table:style-name="ce3" office:value-type="float" office:value="1537.61" calcext:value-type="float">
            <text:p>1537.61</text:p>
          </table:table-cell>
          <table:table-cell table:number-columns-repeated="27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3]+[.A124]" office:value-type="float" office:value="590.34" calcext:value-type="float">
            <text:p>590.34</text:p>
          </table:table-cell>
          <table:table-cell table:style-name="ce3" office:value-type="float" office:value="1537.42" calcext:value-type="float">
            <text:p>1537.42</text:p>
          </table:table-cell>
          <table:table-cell table:number-columns-repeated="27"/>
        </table:table-row>
        <table:table-row table:style-name="ro1">
          <table:table-cell office:value-type="float" office:value="10.23" calcext:value-type="float">
            <text:p>10.23</text:p>
          </table:table-cell>
          <table:table-cell table:formula="of:=[.B124]+[.A125]" office:value-type="float" office:value="600.57" calcext:value-type="float">
            <text:p>600.57</text:p>
          </table:table-cell>
          <table:table-cell table:style-name="ce3" office:value-type="float" office:value="1537.28" calcext:value-type="float">
            <text:p>1537.28</text:p>
          </table:table-cell>
          <table:table-cell table:number-columns-repeated="27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formula="of:=[.B125]+[.A126]" office:value-type="float" office:value="610.35" calcext:value-type="float">
            <text:p>610.35</text:p>
          </table:table-cell>
          <table:table-cell table:style-name="ce3" office:value-type="float" office:value="1537.15" calcext:value-type="float">
            <text:p>1537.1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6]+[.A127]" office:value-type="float" office:value="620.35" calcext:value-type="float">
            <text:p>620.35</text:p>
          </table:table-cell>
          <table:table-cell table:style-name="ce3" office:value-type="float" office:value="1536.97" calcext:value-type="float">
            <text:p>1536.97</text:p>
          </table:table-cell>
          <table:table-cell table:number-columns-repeated="27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27]+[.A128]" office:value-type="float" office:value="630.28" calcext:value-type="float">
            <text:p>630.28</text:p>
          </table:table-cell>
          <table:table-cell table:style-name="ce3" office:value-type="float" office:value="1536.83" calcext:value-type="float">
            <text:p>1536.83</text:p>
          </table:table-cell>
          <table:table-cell table:number-columns-repeated="27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B128]+[.A129]" office:value-type="float" office:value="640.48" calcext:value-type="float">
            <text:p>640.48</text:p>
          </table:table-cell>
          <table:table-cell table:style-name="ce3" office:value-type="float" office:value="1536.4" calcext:value-type="float">
            <text:p>1536.40</text:p>
          </table:table-cell>
          <table:table-cell table:number-columns-repeated="27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29]+[.A130]" office:value-type="float" office:value="650.31" calcext:value-type="float">
            <text:p>650.31</text:p>
          </table:table-cell>
          <table:table-cell table:style-name="ce3" office:value-type="float" office:value="1536.19" calcext:value-type="float">
            <text:p>1536.19</text:p>
          </table:table-cell>
          <table:table-cell table:number-columns-repeated="27"/>
        </table:table-row>
        <table:table-row table:style-name="ro1">
          <table:table-cell office:value-type="float" office:value="19.96" calcext:value-type="float">
            <text:p>19.96</text:p>
          </table:table-cell>
          <table:table-cell table:formula="of:=[.B130]+[.A131]" office:value-type="float" office:value="670.27" calcext:value-type="float">
            <text:p>670.27</text:p>
          </table:table-cell>
          <table:table-cell table:style-name="ce3" office:value-type="float" office:value="1535.87" calcext:value-type="float">
            <text:p>1535.87</text:p>
          </table:table-cell>
          <table:table-cell table:number-columns-repeated="27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31]+[.A132]" office:value-type="float" office:value="690.47" calcext:value-type="float">
            <text:p>690.47</text:p>
          </table:table-cell>
          <table:table-cell table:style-name="ce3" office:value-type="float" office:value="1535.57" calcext:value-type="float">
            <text:p>1535.57</text:p>
          </table:table-cell>
          <table:table-cell table:number-columns-repeated="27"/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[.B132]+[.A133]" office:value-type="float" office:value="710.22" calcext:value-type="float">
            <text:p>710.22</text:p>
          </table:table-cell>
          <table:table-cell table:style-name="ce3" office:value-type="float" office:value="1535.24" calcext:value-type="float">
            <text:p>1535.24</text:p>
          </table:table-cell>
          <table:table-cell table:number-columns-repeated="27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133]+[.A134]" office:value-type="float" office:value="730.37" calcext:value-type="float">
            <text:p>730.37</text:p>
          </table:table-cell>
          <table:table-cell table:style-name="ce3" office:value-type="float" office:value="1534.92" calcext:value-type="float">
            <text:p>1534.92</text:p>
          </table:table-cell>
          <table:table-cell table:number-columns-repeated="27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4]+[.A135]" office:value-type="float" office:value="750.3" calcext:value-type="float">
            <text:p>750.3</text:p>
          </table:table-cell>
          <table:table-cell table:style-name="ce3" office:value-type="float" office:value="1534.61" calcext:value-type="float">
            <text:p>1534.61</text:p>
          </table:table-cell>
          <table:table-cell table:number-columns-repeated="27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formula="of:=[.B135]+[.A136]" office:value-type="float" office:value="770.33" calcext:value-type="float">
            <text:p>770.33</text:p>
          </table:table-cell>
          <table:table-cell table:style-name="ce3" office:value-type="float" office:value="1534.31" calcext:value-type="float">
            <text:p>1534.31</text:p>
          </table:table-cell>
          <table:table-cell table:number-columns-repeated="27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136]+[.A137]" office:value-type="float" office:value="790.39" calcext:value-type="float">
            <text:p>790.39</text:p>
          </table:table-cell>
          <table:table-cell table:style-name="ce3" office:value-type="float" office:value="1533.98" calcext:value-type="float">
            <text:p>1533.98</text:p>
          </table:table-cell>
          <table:table-cell table:number-columns-repeated="27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7]+[.A138]" office:value-type="float" office:value="810.32" calcext:value-type="float">
            <text:p>810.32</text:p>
          </table:table-cell>
          <table:table-cell table:style-name="ce3" office:value-type="float" office:value="1533.64" calcext:value-type="float">
            <text:p>1533.64</text:p>
          </table:table-cell>
          <table:table-cell table:number-columns-repeated="27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38]+[.A139]" office:value-type="float" office:value="830.3" calcext:value-type="float">
            <text:p>830.3</text:p>
          </table:table-cell>
          <table:table-cell table:style-name="ce3" office:value-type="float" office:value="1533.3" calcext:value-type="float">
            <text:p>1533.30</text:p>
          </table:table-cell>
          <table:table-cell table:number-columns-repeated="27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formula="of:=[.B139]+[.A140]" office:value-type="float" office:value="850.18" calcext:value-type="float">
            <text:p>850.18</text:p>
          </table:table-cell>
          <table:table-cell table:style-name="ce3" office:value-type="float" office:value="1532.93" calcext:value-type="float">
            <text:p>1532.93</text:p>
          </table:table-cell>
          <table:table-cell table:number-columns-repeated="27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B140]+[.A141]" office:value-type="float" office:value="870.04" calcext:value-type="float">
            <text:p>870.04</text:p>
          </table:table-cell>
          <table:table-cell table:style-name="ce3" office:value-type="float" office:value="1532.65" calcext:value-type="float">
            <text:p>1532.65</text:p>
          </table:table-cell>
          <table:table-cell table:number-columns-repeated="27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41]+[.A142]" office:value-type="float" office:value="890.24" calcext:value-type="float">
            <text:p>890.24</text:p>
          </table:table-cell>
          <table:table-cell table:style-name="ce3" office:value-type="float" office:value="1532.2" calcext:value-type="float">
            <text:p>1532.20</text:p>
          </table:table-cell>
          <table:table-cell table:number-columns-repeated="27"/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[.B142]+[.A143]" office:value-type="float" office:value="910.49" calcext:value-type="float">
            <text:p>910.49</text:p>
          </table:table-cell>
          <table:table-cell table:style-name="ce3" office:value-type="float" office:value="1531.99" calcext:value-type="float">
            <text:p>1531.99</text:p>
          </table:table-cell>
          <table:table-cell table:number-columns-repeated="27"/>
        </table:table-row>
        <table:table-row table:style-name="ro1">
          <table:table-cell office:value-type="float" office:value="19.58" calcext:value-type="float">
            <text:p>19.58</text:p>
          </table:table-cell>
          <table:table-cell table:formula="of:=[.B143]+[.A144]" office:value-type="float" office:value="930.07" calcext:value-type="float">
            <text:p>930.07</text:p>
          </table:table-cell>
          <table:table-cell office:value-type="float" office:value="1531.65" calcext:value-type="float">
            <text:p>1531.65</text:p>
          </table:table-cell>
          <table:table-cell table:number-columns-repeated="27"/>
        </table:table-row>
        <table:table-row table:style-name="ro1" table:number-rows-repeated="26">
          <table:table-cell table:number-columns-repeated="30"/>
        </table:table-row>
        <table:table-row table:style-name="ro1">
          <table:table-cell/>
          <table:table-cell office:value-type="string" calcext:value-type="string">
            <text:p>TABELLA PIOMBO PRIMA VOLTA</text:p>
          </table:table-cell>
          <table:table-cell table:number-columns-repeated="2"/>
          <table:table-cell office:value-type="string" calcext:value-type="string">
            <text:p>massa_piombo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10"/>
          <table:table-cell office:value-type="string" calcext:value-type="string">
            <text:p>TABELLA PIOMBO SECONDA VOLTA</text:p>
          </table:table-cell>
          <table:table-cell table:number-columns-repeated="2"/>
          <table:table-cell office:value-type="string" calcext:value-type="string">
            <text:p>massa_piombo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0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38.2" calcext:value-type="float">
            <text:p>1538.20</text:p>
          </table:table-cell>
          <table:table-cell/>
          <table:table-cell office:value-type="string" calcext:value-type="string">
            <text:p>t_start</text:p>
          </table:table-cell>
          <table:table-cell table:formula="of:=[.B189]" office:value-type="float" office:value="301.8" calcext:value-type="float">
            <text:p>301.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  <table:table-cell/>
          <table:table-cell office:value-type="string" calcext:value-type="string">
            <text:p>t_start</text:p>
          </table:table-cell>
          <table:table-cell table:formula="of:=[.S183]" office:value-type="float" office:value="180.36" calcext:value-type="float">
            <text:p>180.36</text:p>
          </table:table-cell>
          <table:table-cell table:number-columns-repeated="7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formula="of:=[.B174]+[.A175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/>
          <table:table-cell office:value-type="string" calcext:value-type="string">
            <text:p>t_stop</text:p>
          </table:table-cell>
          <table:table-cell table:formula="of:=[.B193]" office:value-type="float" office:value="341.87" calcext:value-type="float">
            <text:p>341.87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8"/>
          <table:table-cell office:value-type="float" office:value="20.22" calcext:value-type="float">
            <text:p>20.22</text:p>
          </table:table-cell>
          <table:table-cell table:formula="of:=[.S174]+[.R175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  <table:table-cell/>
          <table:table-cell office:value-type="string" calcext:value-type="string">
            <text:p>t_stop</text:p>
          </table:table-cell>
          <table:table-cell table:formula="of:=[.S187]" office:value-type="float" office:value="205.4" calcext:value-type="float">
            <text:p>205.4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4"/>
        </table:table-row>
        <table:table-row table:style-name="ro1">
          <table:table-cell office:value-type="float" office:value="20.39" calcext:value-type="float">
            <text:p>20.39</text:p>
          </table:table-cell>
          <table:table-cell table:formula="of:=[.B175]+[.A176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/>
          <table:table-cell office:value-type="string" calcext:value-type="string">
            <text:p>dt</text:p>
          </table:table-cell>
          <table:table-cell table:formula="of:=[.F175]-[.F174]" office:value-type="float" office:value="40.07" calcext:value-type="float">
            <text:p>40.0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174:.C188];[.B174:.B188];1;1)" office:value-type="float" office:value="-0.0156402388367962" calcext:value-type="float">
            <text:p>-0.0156402388367962</text:p>
          </table:table-cell>
          <table:table-cell office:value-type="float" office:value="1537.99791881503" calcext:value-type="float">
            <text:p>1537.99791881503</text:p>
          </table:table-cell>
          <table:table-cell table:number-columns-repeated="7"/>
          <table:table-cell office:value-type="float" office:value="20.09" calcext:value-type="float">
            <text:p>20.09</text:p>
          </table:table-cell>
          <table:table-cell table:formula="of:=[.S175]+[.R176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  <table:table-cell/>
          <table:table-cell office:value-type="string" calcext:value-type="string">
            <text:p>dt</text:p>
          </table:table-cell>
          <table:table-cell table:formula="of:=[.W175]-[.W174]" office:value-type="float" office:value="25.04" calcext:value-type="float">
            <text:p>25.04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T174:.T183];[.S174:.S183];1;1)" office:value-type="float" office:value="-0.0128146991732574" calcext:value-type="float">
            <text:p>-0.0128146991732574</text:p>
          </table:table-cell>
          <table:table-cell office:value-type="float" office:value="1471.97698838302" calcext:value-type="float">
            <text:p>1471.97698838302</text:p>
          </table:table-cell>
          <table:table-cell table:number-columns-repeated="3"/>
        </table:table-row>
        <table:table-row table:style-name="ro1">
          <table:table-cell office:value-type="float" office:value="19.66" calcext:value-type="float">
            <text:p>19.66</text:p>
          </table:table-cell>
          <table:table-cell table:formula="of:=[.B176]+[.A177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/>
          <table:table-cell office:value-type="string" calcext:value-type="string">
            <text:p>t_medio</text:p>
          </table:table-cell>
          <table:table-cell table:formula="of:=([.F174]+[.F175])/2" office:value-type="float" office:value="321.835" calcext:value-type="float">
            <text:p>321.835</text:p>
          </table:table-cell>
          <table:table-cell table:number-columns-repeated="2"/>
          <table:table-cell office:value-type="float" office:value="0.000214685050299103" calcext:value-type="float">
            <text:p>0.000214685050299103</text:p>
          </table:table-cell>
          <table:table-cell office:value-type="float" office:value="0.0356431055931303" calcext:value-type="float">
            <text:p>0.0356431055931303</text:p>
          </table:table-cell>
          <table:table-cell table:number-columns-repeated="7"/>
          <table:table-cell office:value-type="float" office:value="19.84" calcext:value-type="float">
            <text:p>19.84</text:p>
          </table:table-cell>
          <table:table-cell table:formula="of:=[.S176]+[.R177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  <table:table-cell/>
          <table:table-cell office:value-type="string" calcext:value-type="string">
            <text:p>t_medio</text:p>
          </table:table-cell>
          <table:table-cell table:formula="of:=([.W174]+[.W175])/2" office:value-type="float" office:value="192.88" calcext:value-type="float">
            <text:p>192.88</text:p>
          </table:table-cell>
          <table:table-cell table:number-columns-repeated="2"/>
          <table:table-cell office:value-type="float" office:value="0.000343193089421816" calcext:value-type="float">
            <text:p>0.000343193089421816</text:p>
          </table:table-cell>
          <table:table-cell office:value-type="float" office:value="0.0367137263697277" calcext:value-type="float">
            <text:p>0.0367137263697277</text:p>
          </table:table-cell>
          <table:table-cell table:number-columns-repeated="3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77]+[.A178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177]*[.I177]+[.J177]" office:value-type="float" office:value="0.104736268756142" calcext:value-type="float">
            <text:p>0.104736268756142</text:p>
          </table:table-cell>
          <table:table-cell table:number-columns-repeated="8"/>
          <table:table-cell office:value-type="float" office:value="20.03" calcext:value-type="float">
            <text:p>20.03</text:p>
          </table:table-cell>
          <table:table-cell table:formula="of:=[.S177]+[.R178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W177]*[.Z177]+[.AA177]" office:value-type="float" office:value="0.102908809457408" calcext:value-type="float">
            <text:p>0.102908809457408</text:p>
          </table:table-cell>
          <table:table-cell table:number-columns-repeated="4"/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B178]+[.A179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/>
          <table:table-cell office:value-type="string" calcext:value-type="string">
            <text:p>PENDENZA1</text:p>
          </table:table-cell>
          <table:table-cell table:formula="of:=SLOPE([.C174:.C188];[.B174:.B188])" office:value-type="float" office:value="-0.0156402388367962" calcext:value-type="float">
            <text:p>-0.0156402388367962</text:p>
          </table:table-cell>
          <table:table-cell table:number-columns-repeated="11"/>
          <table:table-cell office:value-type="float" office:value="19.94" calcext:value-type="float">
            <text:p>19.94</text:p>
          </table:table-cell>
          <table:table-cell table:formula="of:=[.S178]+[.R179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  <table:table-cell/>
          <table:table-cell office:value-type="string" calcext:value-type="string">
            <text:p>PENDENZA1</text:p>
          </table:table-cell>
          <table:table-cell table:formula="of:=SLOPE([.T174:.T183];[.S174:.S183])" office:value-type="float" office:value="-0.0128146991732574" calcext:value-type="float">
            <text:p>-0.0128146991732574</text:p>
          </table:table-cell>
          <table:table-cell table:number-columns-repeated="7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79]+[.A180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174:.C188];[.B174:.B188])" office:value-type="float" office:value="1537.99791881503" calcext:value-type="float">
            <text:p>1537.99791881503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94:.C208];[.B194:.B208];1;1)" office:value-type="float" office:value="-0.0108346332780463" calcext:value-type="float">
            <text:p>-0.0108346332780463</text:p>
          </table:table-cell>
          <table:table-cell office:value-type="float" office:value="1529.49406690474" calcext:value-type="float">
            <text:p>1529.49406690474</text:p>
          </table:table-cell>
          <table:table-cell table:number-columns-repeated="7"/>
          <table:table-cell office:value-type="float" office:value="20.17" calcext:value-type="float">
            <text:p>20.17</text:p>
          </table:table-cell>
          <table:table-cell table:formula="of:=[.S179]+[.R180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T174:.T183];[.S174:.S183])" office:value-type="float" office:value="1471.97698838302" calcext:value-type="float">
            <text:p>1471.97698838302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T188:.T204];[.S188:.S204];1;1)" office:value-type="float" office:value="-0.00669089944053993" calcext:value-type="float">
            <text:p>-0.00669089944053993</text:p>
          </table:table-cell>
          <table:table-cell office:value-type="float" office:value="1463.70713884415" calcext:value-type="float">
            <text:p>1463.70713884415</text:p>
          </table:table-cell>
          <table:table-cell table:number-columns-repeated="3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0]+[.A181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5"/>
          <table:table-cell office:value-type="float" office:value="0.00035113792122648" calcext:value-type="float">
            <text:p>0.00035113792122648</text:p>
          </table:table-cell>
          <table:table-cell office:value-type="float" office:value="0.15886034873065" calcext:value-type="float">
            <text:p>0.15886034873065</text:p>
          </table:table-cell>
          <table:table-cell table:number-columns-repeated="7"/>
          <table:table-cell office:value-type="float" office:value="19.9" calcext:value-type="float">
            <text:p>19.9</text:p>
          </table:table-cell>
          <table:table-cell table:formula="of:=[.S180]+[.R181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  <table:table-cell table:number-columns-repeated="5"/>
          <table:table-cell office:value-type="float" office:value="0.000223834527079763" calcext:value-type="float">
            <text:p>0.000223834527079763</text:p>
          </table:table-cell>
          <table:table-cell office:value-type="float" office:value="0.0597754407024508" calcext:value-type="float">
            <text:p>0.0597754407024508</text:p>
          </table:table-cell>
          <table:table-cell table:number-columns-repeated="3"/>
        </table:table-row>
        <table:table-row table:style-name="ro1">
          <table:table-cell office:value-type="float" office:value="20.26" calcext:value-type="float">
            <text:p>20.26</text:p>
          </table:table-cell>
          <table:table-cell table:formula="of:=[.B181]+[.A182]" office:value-type="float" office:value="161.85" calcext:value-type="float">
            <text:p>161.85</text:p>
          </table:table-cell>
          <table:table-cell table:style-name="ce3" office:value-type="float" office:value="1535.5" calcext:value-type="float">
            <text:p>1535.50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94:.C208];[.B194:.B208])" office:value-type="float" office:value="-0.0108346332780463" calcext:value-type="float">
            <text:p>-0.0108346332780463</text:p>
          </table:table-cell>
          <table:table-cell/>
          <table:table-cell office:value-type="string" calcext:value-type="string">
            <text:p>errmIII</text:p>
          </table:table-cell>
          <table:table-cell table:formula="of:=[.F177]*[.I181]+[.J181]" office:value-type="float" office:value="0.271868821608574" calcext:value-type="float">
            <text:p>0.271868821608574</text:p>
          </table:table-cell>
          <table:table-cell table:number-columns-repeated="8"/>
          <table:table-cell office:value-type="float" office:value="20.07" calcext:value-type="float">
            <text:p>20.07</text:p>
          </table:table-cell>
          <table:table-cell table:formula="of:=[.S181]+[.R182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  <table:table-cell/>
          <table:table-cell office:value-type="string" calcext:value-type="string">
            <text:p>PENDENZA3</text:p>
          </table:table-cell>
          <table:table-cell table:formula="of:=SLOPE([.T188:.T204];[.S188:.S204])" office:value-type="float" office:value="-0.00669089944053993" calcext:value-type="float">
            <text:p>-0.00669089944053993</text:p>
          </table:table-cell>
          <table:table-cell/>
          <table:table-cell office:value-type="string" calcext:value-type="string">
            <text:p>errmIII</text:p>
          </table:table-cell>
          <table:table-cell table:formula="of:=[.W177]*[.Z181]+[.AA181]" office:value-type="float" office:value="0.102948644285596" calcext:value-type="float">
            <text:p>0.102948644285596</text:p>
          </table:table-cell>
          <table:table-cell table:number-columns-repeated="4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[.B182]+[.A183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94:.C208];[.B194:.B208])" office:value-type="float" office:value="1529.49406690474" calcext:value-type="float">
            <text:p>1529.49406690474</text:p>
          </table:table-cell>
          <table:table-cell table:number-columns-repeated="11"/>
          <table:table-cell office:value-type="float" office:value="20.1" calcext:value-type="float">
            <text:p>20.1</text:p>
          </table:table-cell>
          <table:table-cell table:formula="of:=[.S182]+[.R183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  <table:table-cell office:value-type="string" calcext:value-type="string">
            <text:p>IMMERSO</text:p>
          </table:table-cell>
          <table:table-cell office:value-type="string" calcext:value-type="string">
            <text:p>INTERCETTA3</text:p>
          </table:table-cell>
          <table:table-cell table:formula="of:=INTERCEPT([.T188:.T204];[.S188:.S204])" office:value-type="float" office:value="1463.70713884415" calcext:value-type="float">
            <text:p>1463.70713884415</text:p>
          </table:table-cell>
          <table:table-cell table:number-columns-repeated="5"/>
          <table:table-cell office:value-type="string" calcext:value-type="string">
            <text:p>DT</text:p>
          </table:table-cell>
          <table:table-cell table:formula="of:=[.W177]-[.W174]"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83]+[.A184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14"/>
          <table:table-cell table:style-name="ce10" office:value-type="float" office:value="9.67" calcext:value-type="float">
            <text:p>9.67</text:p>
          </table:table-cell>
          <table:table-cell table:style-name="ce10" table:formula="of:=[.S183]+[.R184]" office:value-type="float" office:value="190.03" calcext:value-type="float">
            <text:p>190.03</text:p>
          </table:table-cell>
          <table:table-cell table:style-name="ce10" office:value-type="float" office:value="1466.46" calcext:value-type="float">
            <text:p>1466.46</text:p>
          </table:table-cell>
          <table:table-cell table:number-columns-repeated="8"/>
          <table:table-cell office:value-type="float" office:value="192.88" calcext:value-type="float">
            <text:p>192.8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[.B184]+[.A185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/>
          <table:table-cell office:value-type="string" calcext:value-type="string">
            <text:p>massa_i_extrp</text:p>
          </table:table-cell>
          <table:table-cell table:formula="of:=[.F180]+[.F179]*[.F177]" office:value-type="float" office:value="1532.96434254899" calcext:value-type="float">
            <text:p>1532.96434254899</text:p>
          </table:table-cell>
          <table:table-cell/>
          <table:table-cell office:value-type="string" calcext:value-type="string">
            <text:p>errmtot</text:p>
          </table:table-cell>
          <table:table-cell table:formula="of:=[.I182]+[.I178]" office:value-type="float" office:value="0.376605090364716" calcext:value-type="float">
            <text:p>0.376605090364716</text:p>
          </table:table-cell>
          <table:table-cell table:number-columns-repeated="8"/>
          <table:table-cell office:value-type="float" office:value="5.14" calcext:value-type="float">
            <text:p>5.14</text:p>
          </table:table-cell>
          <table:table-cell table:formula="of:=[.S184]+[.R185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  <table:table-cell/>
          <table:table-cell office:value-type="string" calcext:value-type="string">
            <text:p>massa_i_extrp</text:p>
          </table:table-cell>
          <table:table-cell table:formula="of:=[.W180]+[.W179]*[.W177]" office:value-type="float" office:value="1469.50528920648" calcext:value-type="float">
            <text:p>1469.50528920648</text:p>
          </table:table-cell>
          <table:table-cell/>
          <table:table-cell office:value-type="string" calcext:value-type="string">
            <text:p>errmtot</text:p>
          </table:table-cell>
          <table:table-cell table:formula="of:=[.Z182]+[.Z178]" office:value-type="float" office:value="0.205857453743003" calcext:value-type="float">
            <text:p>0.205857453743003</text:p>
          </table:table-cell>
          <table:table-cell table:number-columns-repeated="2"/>
          <table:table-cell office:value-type="float" office:value="192.88" calcext:value-type="float">
            <text:p>192.8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table:formula="of:=[.B185]+[.A186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/>
          <table:table-cell office:value-type="string" calcext:value-type="string">
            <text:p>massa_f_extrp</text:p>
          </table:table-cell>
          <table:table-cell table:formula="of:=[.F183]+[.F182]*[.F177]" office:value-type="float" office:value="1526.0071027037" calcext:value-type="float">
            <text:p>1526.0071027037</text:p>
          </table:table-cell>
          <table:table-cell table:number-columns-repeated="11"/>
          <table:table-cell office:value-type="float" office:value="4.89" calcext:value-type="float">
            <text:p>4.89</text:p>
          </table:table-cell>
          <table:table-cell table:formula="of:=[.S185]+[.R186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  <table:table-cell/>
          <table:table-cell office:value-type="string" calcext:value-type="string">
            <text:p>massa_f_extrp</text:p>
          </table:table-cell>
          <table:table-cell table:formula="of:=[.W183]+[.W182]*[.W177]" office:value-type="float" office:value="1462.41659816006" calcext:value-type="float">
            <text:p>1462.41659816006</text:p>
          </table:table-cell>
          <table:table-cell table:number-columns-repeated="7"/>
        </table:table-row>
        <table:table-row table:style-name="ro1">
          <table:table-cell office:value-type="float" office:value="19.91" calcext:value-type="float">
            <text:p>19.91</text:p>
          </table:table-cell>
          <table:table-cell table:formula="of:=[.B186]+[.A187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4"/>
          <table:table-cell office:value-type="string" calcext:value-type="string">
            <text:p>DT</text:p>
          </table:table-cell>
          <table:table-cell table:formula="of:=[.F177]-[.F174]" office:value-type="float" office:value="20.035" calcext:value-type="float">
            <text:p>20.035</text:p>
          </table:table-cell>
          <table:table-cell/>
          <table:table-cell office:value-type="float" office:value="321.835" calcext:value-type="float">
            <text:p>321.835</text:p>
          </table:table-cell>
          <table:table-cell office:value-type="float" office:value="1534" calcext:value-type="float">
            <text:p>1534</text:p>
          </table:table-cell>
          <table:table-cell table:number-columns-repeated="5"/>
          <table:table-cell office:value-type="float" office:value="5.34" calcext:value-type="float">
            <text:p>5.34</text:p>
          </table:table-cell>
          <table:table-cell table:formula="of:=[.S186]+[.R187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  <table:table-cell office:value-type="string" calcext:value-type="string">
            <text:p>EQ</text:p>
          </table:table-cell>
          <table:table-cell table:number-columns-repeated="9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7]+[.A188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185]-[.F186]" office:value-type="float" office:value="6.95723984528945" calcext:value-type="float">
            <text:p>6.95723984528945</text:p>
          </table:table-cell>
          <table:table-cell table:number-columns-repeated="4"/>
          <table:table-cell office:value-type="float" office:value="321.835" calcext:value-type="float">
            <text:p>321.835</text:p>
          </table:table-cell>
          <table:table-cell office:value-type="float" office:value="1525" calcext:value-type="float">
            <text:p>1525</text:p>
          </table:table-cell>
          <table:table-cell table:number-columns-repeated="5"/>
          <table:table-cell office:value-type="float" office:value="5.12" calcext:value-type="float">
            <text:p>5.12</text:p>
          </table:table-cell>
          <table:table-cell table:formula="of:=[.S187]+[.R188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  <table:table-cell/>
          <table:table-cell office:value-type="string" calcext:value-type="string">
            <text:p>massa netta evap</text:p>
          </table:table-cell>
          <table:table-cell table:formula="of:=[.W185]-[.W186]" office:value-type="float" office:value="7.0886910464219" calcext:value-type="float">
            <text:p>7.0886910464219</text:p>
          </table:table-cell>
          <table:table-cell table:number-columns-repeated="7"/>
        </table:table-row>
        <table:table-row table:style-name="ro1">
          <table:table-cell table:style-name="ce10" office:value-type="float" office:value="19.95" calcext:value-type="float">
            <text:p>19.95</text:p>
          </table:table-cell>
          <table:table-cell table:style-name="ce10" table:formula="of:=[.B188]+[.A189]" office:value-type="float" office:value="301.8" calcext:value-type="float">
            <text:p>301.8</text:p>
          </table:table-cell>
          <table:table-cell table:style-name="ce10"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 table:number-columns-repeated="13"/>
          <table:table-cell office:value-type="float" office:value="4.79" calcext:value-type="float">
            <text:p>4.79</text:p>
          </table:table-cell>
          <table:table-cell table:formula="of:=[.S188]+[.R189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+[.A190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4.8" calcext:value-type="float">
            <text:p>4.8</text:p>
          </table:table-cell>
          <table:table-cell table:formula="of:=[.S189]+[.R190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  <table:table-cell table:number-columns-repeated="10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90]+[.A191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alore specifico</text:p>
          </table:table-cell>
          <table:table-cell table:formula="of:=(([.F188]*[.F172])/([.F171]*([.H171]-[.H172])))*([.H173]/4.184)" office:value-type="float" office:value="7.13967247164687" calcext:value-type="float">
            <text:p>7.13967247164687</text:p>
          </table:table-cell>
          <table:table-cell office:value-type="string" calcext:value-type="string">
            <text:p>+-0.858</text:p>
          </table:table-cell>
          <table:table-cell table:number-columns-repeated="10"/>
          <table:table-cell office:value-type="float" office:value="5.13" calcext:value-type="float">
            <text:p>5.13</text:p>
          </table:table-cell>
          <table:table-cell table:formula="of:=[.S190]+[.R191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W188]*[.W172])/([.W171]*([.Y171]-[.Y172]))*([.Y173]/4.184)" office:value-type="float" office:value="7.27457058396733" calcext:value-type="float">
            <text:p>7.27457058396733</text:p>
          </table:table-cell>
          <table:table-cell office:value-type="string" calcext:value-type="string">
            <text:p>+-0.694</text:p>
          </table:table-cell>
          <table:table-cell table:number-columns-repeated="6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91]+[.A192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14"/>
          <table:table-cell office:value-type="float" office:value="4.86" calcext:value-type="float">
            <text:p>4.86</text:p>
          </table:table-cell>
          <table:table-cell table:formula="of:=[.S191]+[.R192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  <table:table-cell table:number-columns-repeated="10"/>
        </table:table-row>
        <table:table-row table:style-name="ro1">
          <table:table-cell office:value-type="float" office:value="10.31" calcext:value-type="float">
            <text:p>10.31</text:p>
          </table:table-cell>
          <table:table-cell table:formula="of:=[.B192]+[.A193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office:value-type="string" calcext:value-type="string">
            <text:p>EQ</text:p>
          </table:table-cell>
          <table:table-cell table:number-columns-repeated="13"/>
          <table:table-cell office:value-type="float" office:value="5.17" calcext:value-type="float">
            <text:p>5.17</text:p>
          </table:table-cell>
          <table:table-cell table:formula="of:=[.S192]+[.R193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  <table:table-cell table:number-columns-repeated="10"/>
        </table:table-row>
        <table:table-row table:style-name="ro1">
          <table:table-cell office:value-type="float" office:value="9.61" calcext:value-type="float">
            <text:p>9.61</text:p>
          </table:table-cell>
          <table:table-cell table:formula="of:=[.B193]+[.A194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14"/>
          <table:table-cell office:value-type="float" office:value="4.93" calcext:value-type="float">
            <text:p>4.93</text:p>
          </table:table-cell>
          <table:table-cell table:formula="of:=[.S193]+[.R194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  <table:table-cell table:number-columns-repeated="10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94]+[.A195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14"/>
          <table:table-cell office:value-type="float" office:value="5.14" calcext:value-type="float">
            <text:p>5.14</text:p>
          </table:table-cell>
          <table:table-cell table:formula="of:=[.S194]+[.R195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  <table:table-cell table:number-columns-repeated="10"/>
        </table:table-row>
        <table:table-row table:style-name="ro1">
          <table:table-cell office:value-type="float" office:value="10.38" calcext:value-type="float">
            <text:p>10.38</text:p>
          </table:table-cell>
          <table:table-cell table:formula="of:=[.B195]+[.A196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14"/>
          <table:table-cell office:value-type="float" office:value="4.99" calcext:value-type="float">
            <text:p>4.99</text:p>
          </table:table-cell>
          <table:table-cell table:formula="of:=[.S195]+[.R196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  <table:table-cell table:number-columns-repeated="10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formula="of:=[.B196]+[.A197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14"/>
          <table:table-cell office:value-type="float" office:value="9.93" calcext:value-type="float">
            <text:p>9.93</text:p>
          </table:table-cell>
          <table:table-cell table:formula="of:=[.S196]+[.R197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  <table:table-cell table:number-columns-repeated="10"/>
        </table:table-row>
        <table:table-row table:style-name="ro1">
          <table:table-cell office:value-type="float" office:value="10.01" calcext:value-type="float">
            <text:p>10.01</text:p>
          </table:table-cell>
          <table:table-cell table:formula="of:=[.B197]+[.A198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14"/>
          <table:table-cell office:value-type="float" office:value="10.07" calcext:value-type="float">
            <text:p>10.07</text:p>
          </table:table-cell>
          <table:table-cell table:formula="of:=[.S197]+[.R198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  <table:table-cell table:number-columns-repeated="10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98]+[.A199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14"/>
          <table:table-cell office:value-type="float" office:value="10.51" calcext:value-type="float">
            <text:p>10.51</text:p>
          </table:table-cell>
          <table:table-cell table:formula="of:=[.S198]+[.R199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  <table:table-cell table:number-columns-repeated="10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B199]+[.A200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14"/>
          <table:table-cell office:value-type="float" office:value="19.36" calcext:value-type="float">
            <text:p>19.36</text:p>
          </table:table-cell>
          <table:table-cell table:formula="of:=[.S199]+[.R200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  <table:table-cell table:number-columns-repeated="10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B200]+[.A201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14"/>
          <table:table-cell office:value-type="float" office:value="10.22" calcext:value-type="float">
            <text:p>10.22</text:p>
          </table:table-cell>
          <table:table-cell table:formula="of:=[.S200]+[.R201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  <table:table-cell table:number-columns-repeated="10"/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B201]+[.A202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14"/>
          <table:table-cell office:value-type="float" office:value="9.99" calcext:value-type="float">
            <text:p>9.99</text:p>
          </table:table-cell>
          <table:table-cell table:formula="of:=[.S201]+[.R202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  <table:table-cell table:number-columns-repeated="10"/>
        </table:table-row>
        <table:table-row table:style-name="ro1">
          <table:table-cell office:value-type="float" office:value="20.48" calcext:value-type="float">
            <text:p>20.48</text:p>
          </table:table-cell>
          <table:table-cell table:formula="of:=[.B202]+[.A203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14"/>
          <table:table-cell office:value-type="float" office:value="9.92" calcext:value-type="float">
            <text:p>9.92</text:p>
          </table:table-cell>
          <table:table-cell table:formula="of:=[.S202]+[.R203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  <table:table-cell table:number-columns-repeated="10"/>
        </table:table-row>
        <table:table-row table:style-name="ro1">
          <table:table-cell office:value-type="float" office:value="20.33" calcext:value-type="float">
            <text:p>20.33</text:p>
          </table:table-cell>
          <table:table-cell table:formula="of:=[.B203]+[.A204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14"/>
          <table:table-cell office:value-type="float" office:value="9.86" calcext:value-type="float">
            <text:p>9.86</text:p>
          </table:table-cell>
          <table:table-cell table:formula="of:=[.S203]+[.R204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  <table:table-cell table:number-columns-repeated="10"/>
        </table:table-row>
        <table:table-row table:style-name="ro1">
          <table:table-cell office:value-type="float" office:value="20.27" calcext:value-type="float">
            <text:p>20.27</text:p>
          </table:table-cell>
          <table:table-cell table:formula="of:=[.B204]+[.A205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27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B205]+[.A206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27"/>
        </table:table-row>
        <table:table-row table:style-name="ro1">
          <table:table-cell office:value-type="float" office:value="20.38" calcext:value-type="float">
            <text:p>20.38</text:p>
          </table:table-cell>
          <table:table-cell table:formula="of:=[.B206]+[.A207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27"/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B207]+[.A208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/00/0000</text:date>, <text:time style:data-style-name="N2" text:time-value="15:51:22.813952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03:09.498647801</meta:creation-date>
    <dc:date>2026-07-22T15:53:07.831624342</dc:date>
    <meta:editing-duration>PT3H33M13S</meta:editing-duration>
    <meta:editing-cycles>21</meta:editing-cycles>
    <meta:generator>LibreOffice/26.2.4.2$Linux_X86_64 LibreOffice_project/df4f15f06f7b375c1d16aa35fba92d50b262cd01</meta:generator>
    <meta:document-statistic meta:table-count="1" meta:cell-count="101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svg:x="0.32cm" svg:y="0.18cm" svg:width="15.369cm" svg:height="8.645cm">
          <chart:coordinate-region svg:x="1.814cm" svg:y="0.379cm" svg:width="13.491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319cm" svg:y="0.178cm" svg:width="15.359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15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5.025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5.025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32cm" svg:y="0.18cm" svg:width="15.36cm" svg:height="8.64cm">
          <chart:coordinate-region svg:x="1.814cm" svg:y="0.379cm" svg:width="13.48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87:Sheet1.C103" chart:class="chart:scatter">
            <chart:domain table:cell-range-address="Sheet1.B87:Sheet1.B103"/>
            <chart:regression-curve chart:style-name="ch7"/>
            <chart:data-point chart:repeated="14"/>
            <chart:data-point chart:style-name="ch8"/>
            <chart:data-point chart:repeated="2"/>
          </chart:series>
          <chart:series chart:style-name="ch9" chart:values-cell-range-address="Sheet1.I103:Sheet1.I104" chart:class="chart:scatter">
            <chart:domain table:cell-range-address="Sheet1.H103:Sheet1.H104"/>
            <chart:data-point chart:style-name="ch10" chart:repeated="2"/>
          </chart:series>
          <chart:series chart:style-name="ch11" chart:values-cell-range-address="Sheet1.C104:Sheet1.C144" chart:class="chart:scatter">
            <chart:domain table:cell-range-address="Sheet1.B104:Sheet1.B144"/>
            <chart:regression-curve chart:style-name="ch12"/>
            <chart:data-point chart:repeated="6"/>
            <chart:data-point chart:style-name="ch13"/>
            <chart:data-point chart:repeated="3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103</svg:desc>
                </draw:g>
              </table:table-cell>
              <table:table-cell office:value-type="float" office:value="1555.56">
                <text:p>1555.56</text:p>
                <draw:g>
                  <svg:desc>Sheet1.C87:Sheet1.C103</svg:desc>
                </draw:g>
              </table:table-cell>
              <table:table-cell office:value-type="float" office:value="355.575">
                <text:p>355.575</text:p>
                <draw:g>
                  <svg:desc>Sheet1.H103:Sheet1.H104</svg:desc>
                </draw:g>
              </table:table-cell>
              <table:table-cell office:value-type="float" office:value="1540">
                <text:p>1540</text:p>
                <draw:g>
                  <svg:desc>Sheet1.I103:Sheet1.I104</svg:desc>
                </draw:g>
              </table:table-cell>
              <table:table-cell office:value-type="float" office:value="390.6">
                <text:p>390.6</text:p>
                <draw:g>
                  <svg:desc>Sheet1.B104:Sheet1.B144</svg:desc>
                </draw:g>
              </table:table-cell>
              <table:table-cell office:value-type="float" office:value="1540.33">
                <text:p>1540.33</text:p>
                <draw:g>
                  <svg:desc>Sheet1.C104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  <table:table-cell office:value-type="float" office:value="355.575">
                <text:p>355.575</text:p>
              </table:table-cell>
              <table:table-cell office:value-type="float" office:value="1551">
                <text:p>1551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450" chart:origin="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1.58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6cm" svg:stroke-color="#666666" draw:fill-color="#66666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.58" chart:regression-type="linear"/>
      <style:graphic-properties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06cm" svg:height="7.658cm">
          <chart:coordinate-region svg:x="2.347cm" svg:y="0.379cm" svg:width="13.044cm" svg:height="6.812cm"/>
          <chart:axis chart:dimension="x" chart:name="primary-x" chart:style-name="ch3" chartooo:axis-type="auto">
            <chart:categories table:cell-range-address="Sheet1.AD107:Sheet1.AD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87:Sheet1.U93" chart:class="chart:scatter">
            <chart:domain table:cell-range-address="Sheet1.T87:Sheet1.T93"/>
            <chart:regression-curve chart:style-name="ch7"/>
            <chart:data-point chart:repeated="7"/>
          </chart:series>
          <chart:series chart:style-name="ch8" chart:values-cell-range-address="Sheet1.AA103:Sheet1.AA104" chart:class="chart:scatter">
            <chart:domain table:cell-range-address="Sheet1.Z103:Sheet1.Z104"/>
            <chart:data-point chart:style-name="ch9" chart:repeated="2"/>
          </chart:series>
          <chart:series chart:style-name="ch10" chart:values-cell-range-address="Sheet1.U94:Sheet1.U99" chart:class="chart:scatter">
            <chart:domain table:cell-range-address="Sheet1.T94:Sheet1.T99"/>
            <chart:data-point chart:repeated="4"/>
            <chart:data-point chart:style-name="ch11"/>
            <chart:data-point/>
          </chart:series>
          <chart:series chart:style-name="ch12" chart:values-cell-range-address="Sheet1.U100:Sheet1.U117" chart:class="chart:scatter">
            <chart:domain table:cell-range-address="Sheet1.T100:Sheet1.T117"/>
            <chart:regression-curve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D107:Sheet1.AD107</svg:desc>
                </draw:g>
              </table:table-cell>
              <table:table-cell office:value-type="float" office:value="0">
                <text:p>0</text:p>
                <draw:g>
                  <svg:desc>Sheet1.T87:Sheet1.T93</svg:desc>
                </draw:g>
              </table:table-cell>
              <table:table-cell office:value-type="float" office:value="1467.88">
                <text:p>1467.88</text:p>
                <draw:g>
                  <svg:desc>Sheet1.U87:Sheet1.U93</svg:desc>
                </draw:g>
              </table:table-cell>
              <table:table-cell office:value-type="float" office:value="152.7">
                <text:p>152.7</text:p>
                <draw:g>
                  <svg:desc>Sheet1.Z103:Sheet1.Z104</svg:desc>
                </draw:g>
              </table:table-cell>
              <table:table-cell office:value-type="float" office:value="1455">
                <text:p>1455</text:p>
                <draw:g>
                  <svg:desc>Sheet1.AA103:Sheet1.AA104</svg:desc>
                </draw:g>
              </table:table-cell>
              <table:table-cell office:value-type="float" office:value="140.12">
                <text:p>140.12</text:p>
                <draw:g>
                  <svg:desc>Sheet1.T94:Sheet1.T99</svg:desc>
                </draw:g>
              </table:table-cell>
              <table:table-cell office:value-type="float" office:value="1460.41">
                <text:p>1460.41</text:p>
                <draw:g>
                  <svg:desc>Sheet1.U94:Sheet1.U99</svg:desc>
                </draw:g>
              </table:table-cell>
              <table:table-cell office:value-type="float" office:value="170.41">
                <text:p>170.41</text:p>
                <draw:g>
                  <svg:desc>Sheet1.T100:Sheet1.T117</svg:desc>
                </draw:g>
              </table:table-cell>
              <table:table-cell office:value-type="float" office:value="1456.86">
                <text:p>1456.86</text:p>
                <draw:g>
                  <svg:desc>Sheet1.U100:Sheet1.U117</svg:desc>
                </draw:g>
              </table:table-cell>
            </table:table-row>
            <table:table-row>
              <table:table-cell office:value-type="string"/>
              <table:table-cell office:value-type="float" office:value="20.32">
                <text:p>20.32</text:p>
              </table:table-cell>
              <table:table-cell office:value-type="float" office:value="1467.62">
                <text:p>1467.62</text:p>
              </table:table-cell>
              <table:table-cell office:value-type="float" office:value="152.7">
                <text:p>152.7</text:p>
              </table:table-cell>
              <table:table-cell office:value-type="float" office:value="1468">
                <text:p>1468</text:p>
              </table:table-cell>
              <table:table-cell office:value-type="float" office:value="145.36">
                <text:p>145.36</text:p>
              </table:table-cell>
              <table:table-cell office:value-type="float" office:value="1458.22">
                <text:p>1458.22</text:p>
              </table:table-cell>
              <table:table-cell office:value-type="float" office:value="180.06">
                <text:p>180.06</text:p>
              </table:table-cell>
              <table:table-cell office:value-type="float" office:value="1456.77">
                <text:p>1456.77</text:p>
              </table:table-cell>
            </table:table-row>
            <table:table-row>
              <table:table-cell office:value-type="string"/>
              <table:table-cell office:value-type="float" office:value="40.46">
                <text:p>40.46</text:p>
              </table:table-cell>
              <table:table-cell office:value-type="float" office:value="1467.37">
                <text:p>146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6">
                <text:p>150.16</text:p>
              </table:table-cell>
              <table:table-cell office:value-type="float" office:value="1457.3">
                <text:p>1457.3</text:p>
              </table:table-cell>
              <table:table-cell office:value-type="float" office:value="200.09">
                <text:p>200.09</text:p>
              </table:table-cell>
              <table:table-cell office:value-type="float" office:value="1456.71">
                <text:p>1456.71</text:p>
              </table:table-cell>
            </table:table-row>
            <table:table-row>
              <table:table-cell office:value-type="string"/>
              <table:table-cell office:value-type="float" office:value="60.13">
                <text:p>60.13</text:p>
              </table:table-cell>
              <table:table-cell office:value-type="float" office:value="1467.09">
                <text:p>146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5">
                <text:p>155.35</text:p>
              </table:table-cell>
              <table:table-cell office:value-type="float" office:value="1457.03">
                <text:p>1457.03</text:p>
              </table:table-cell>
              <table:table-cell office:value-type="float" office:value="210.19">
                <text:p>210.19</text:p>
              </table:table-cell>
              <table:table-cell office:value-type="float" office:value="1456.62">
                <text:p>1456.62</text:p>
              </table:table-cell>
            </table:table-row>
            <table:table-row>
              <table:table-cell office:value-type="string"/>
              <table:table-cell office:value-type="float" office:value="80.19">
                <text:p>80.19</text:p>
              </table:table-cell>
              <table:table-cell office:value-type="float" office:value="1466.86">
                <text:p>146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86">
                <text:p>161.86</text:p>
              </table:table-cell>
              <table:table-cell office:value-type="float" office:value="1456.96">
                <text:p>1456.96</text:p>
              </table:table-cell>
              <table:table-cell office:value-type="float" office:value="220.25">
                <text:p>220.25</text:p>
              </table:table-cell>
              <table:table-cell office:value-type="float" office:value="1456.55">
                <text:p>1456.55</text:p>
              </table:table-cell>
            </table:table-row>
            <table:table-row>
              <table:table-cell office:value-type="string"/>
              <table:table-cell office:value-type="float" office:value="100.31">
                <text:p>100.31</text:p>
              </table:table-cell>
              <table:table-cell office:value-type="float" office:value="1466.54">
                <text:p>146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28">
                <text:p>165.28</text:p>
              </table:table-cell>
              <table:table-cell office:value-type="float" office:value="1456.9">
                <text:p>1456.9</text:p>
              </table:table-cell>
              <table:table-cell office:value-type="float" office:value="230.3">
                <text:p>230.3</text:p>
              </table:table-cell>
              <table:table-cell office:value-type="float" office:value="1456.46">
                <text:p>1456.46</text:p>
              </table:table-cell>
            </table:table-row>
            <table:table-row>
              <table:table-cell office:value-type="string"/>
              <table:table-cell office:value-type="float" office:value="120.25">
                <text:p>120.25</text:p>
              </table:table-cell>
              <table:table-cell office:value-type="float" office:value="1466.33">
                <text:p>146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28">
                <text:p>240.28</text:p>
              </table:table-cell>
              <table:table-cell office:value-type="float" office:value="1456.35">
                <text:p>1456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2">
                <text:p>250.2</text:p>
              </table:table-cell>
              <table:table-cell office:value-type="float" office:value="1456.24">
                <text:p>145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32">
                <text:p>260.32</text:p>
              </table:table-cell>
              <table:table-cell office:value-type="float" office:value="1456.13">
                <text:p>1456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26">
                <text:p>270.26</text:p>
              </table:table-cell>
              <table:table-cell office:value-type="float" office:value="1456.04">
                <text:p>14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3">
                <text:p>280.33</text:p>
              </table:table-cell>
              <table:table-cell office:value-type="float" office:value="1455.87">
                <text:p>145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2">
                <text:p>290.2</text:p>
              </table:table-cell>
              <table:table-cell office:value-type="float" office:value="1455.77">
                <text:p>1455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4">
                <text:p>300.34</text:p>
              </table:table-cell>
              <table:table-cell office:value-type="float" office:value="1455.66">
                <text:p>145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33">
                <text:p>310.33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55.37">
                <text:p>1455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3">
                <text:p>330.3</text:p>
              </table:table-cell>
              <table:table-cell office:value-type="float" office:value="1455.27">
                <text:p>145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42">
                <text:p>340.42</text:p>
              </table:table-cell>
              <table:table-cell office:value-type="float" office:value="1455.15">
                <text:p>1455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14">
                <text:p>350.14</text:p>
              </table:table-cell>
              <table:table-cell office:value-type="float" office:value="1454.99">
                <text:p>1454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1520" chart:maximum="154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0.035" loext:regression-extrapolate-backward="0" chart:regression-type="linear"/>
      <style:graphic-properties svg:stroke-color="#2a6099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.035" chart:regression-type="linear"/>
      <style:graphic-properties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446cm" svg:height="9.822cm" xlink:href=".." xlink:type="simple" chart:class="chart:scatter" chart:style-name="ch1">
        <chart:plot-area chart:style-name="ch2" svg:x="0.449cm" svg:y="0.045cm" svg:width="16.919cm" svg:height="9.348cm">
          <chart:coordinate-region svg:x="1.465cm" svg:y="0.244cm" svg:width="15.614cm" svg:height="8.502cm"/>
          <chart:axis chart:dimension="x" chart:name="primary-x" chart:style-name="ch3">
            <chart:title svg:x="8.595cm" svg:y="9.262cm" chart:style-name="ch4">
              <text:p><text:span text:style-name="T1">t [s]</text:span></text:p>
            </chart:title>
          </chart:axis>
          <chart:axis chart:dimension="y" chart:name="primary-y" chart:style-name="ch5">
            <chart:title svg:x="0cm" svg:y="5.129cm" chart:style-name="ch6">
              <text:p><text:span text:style-name="T1">m [g]</text:span></text:p>
            </chart:title>
            <chart:grid chart:style-name="ch7" chart:class="major"/>
          </chart:axis>
          <chart:series chart:style-name="ch8" chart:values-cell-range-address="Sheet1.C174:Sheet1.C189" chart:class="chart:scatter">
            <chart:domain table:cell-range-address="Sheet1.B174:Sheet1.B189"/>
            <chart:regression-curve chart:style-name="ch9"/>
            <chart:data-point chart:repeated="16"/>
          </chart:series>
          <chart:series chart:style-name="ch10" chart:values-cell-range-address="Sheet1.L187:Sheet1.L188" chart:class="chart:scatter">
            <chart:domain table:cell-range-address="Sheet1.K187:Sheet1.K188"/>
            <chart:data-point chart:repeated="2"/>
          </chart:series>
          <chart:series chart:style-name="ch11" chart:values-cell-range-address="Sheet1.C190:Sheet1.C192" chart:class="chart:scatter">
            <chart:domain table:cell-range-address="Sheet1.B190:Sheet1.B192"/>
            <chart:data-point chart:repeated="3"/>
          </chart:series>
          <chart:series chart:style-name="ch12" chart:values-cell-range-address="Sheet1.C193:Sheet1.C208" chart:class="chart:scatter">
            <chart:domain table:cell-range-address="Sheet1.B193:Sheet1.B208"/>
            <chart:regression-curve chart:style-name="ch13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74:Sheet1.B189</svg:desc>
                </draw:g>
              </table:table-cell>
              <table:table-cell office:value-type="float" office:value="1538.2">
                <text:p>1538.2</text:p>
                <draw:g>
                  <svg:desc>Sheet1.C174:Sheet1.C189</svg:desc>
                </draw:g>
              </table:table-cell>
              <table:table-cell office:value-type="float" office:value="321.835">
                <text:p>321.835</text:p>
                <draw:g>
                  <svg:desc>Sheet1.K187:Sheet1.K188</svg:desc>
                </draw:g>
              </table:table-cell>
              <table:table-cell office:value-type="float" office:value="1534">
                <text:p>1534</text:p>
                <draw:g>
                  <svg:desc>Sheet1.L187:Sheet1.L188</svg:desc>
                </draw:g>
              </table:table-cell>
              <table:table-cell office:value-type="float" office:value="311.8">
                <text:p>311.8</text:p>
                <draw:g>
                  <svg:desc>Sheet1.B190:Sheet1.B192</svg:desc>
                </draw:g>
              </table:table-cell>
              <table:table-cell office:value-type="float" office:value="1531">
                <text:p>1531</text:p>
                <draw:g>
                  <svg:desc>Sheet1.C190:Sheet1.C192</svg:desc>
                </draw:g>
              </table:table-cell>
              <table:table-cell office:value-type="float" office:value="341.87">
                <text:p>341.87</text:p>
                <draw:g>
                  <svg:desc>Sheet1.B193:Sheet1.B208</svg:desc>
                </draw:g>
              </table:table-cell>
              <table:table-cell office:value-type="float" office:value="1525.6">
                <text:p>1525.6</text:p>
                <draw:g>
                  <svg:desc>Sheet1.C193:Sheet1.C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64">
                <text:p>21.64</text:p>
              </table:table-cell>
              <table:table-cell office:value-type="float" office:value="1537.59">
                <text:p>1537.59</text:p>
              </table:table-cell>
              <table:table-cell office:value-type="float" office:value="321.835">
                <text:p>321.835</text:p>
              </table:table-cell>
              <table:table-cell office:value-type="float" office:value="1525">
                <text:p>1525</text:p>
              </table:table-cell>
              <table:table-cell office:value-type="float" office:value="321.63">
                <text:p>321.63</text:p>
              </table:table-cell>
              <table:table-cell office:value-type="float" office:value="1529">
                <text:p>1529</text:p>
              </table:table-cell>
              <table:table-cell office:value-type="float" office:value="351.48">
                <text:p>351.48</text:p>
              </table:table-cell>
              <table:table-cell office:value-type="float" office:value="1525.52">
                <text:p>1525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3">
                <text:p>42.03</text:p>
              </table:table-cell>
              <table:table-cell office:value-type="float" office:value="1537.31">
                <text:p>153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56">
                <text:p>331.56</text:p>
              </table:table-cell>
              <table:table-cell office:value-type="float" office:value="1526.04">
                <text:p>1526.04</text:p>
              </table:table-cell>
              <table:table-cell office:value-type="float" office:value="361.54">
                <text:p>361.54</text:p>
              </table:table-cell>
              <table:table-cell office:value-type="float" office:value="1525.46">
                <text:p>1525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69">
                <text:p>61.69</text:p>
              </table:table-cell>
              <table:table-cell office:value-type="float" office:value="1536.98">
                <text:p>153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92">
                <text:p>371.92</text:p>
              </table:table-cell>
              <table:table-cell office:value-type="float" office:value="1525.41">
                <text:p>1525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89">
                <text:p>81.89</text:p>
              </table:table-cell>
              <table:table-cell office:value-type="float" office:value="1536.66">
                <text:p>153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5">
                <text:p>381.5</text:p>
              </table:table-cell>
              <table:table-cell office:value-type="float" office:value="1525.35">
                <text:p>1525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1">
                <text:p>101.61</text:p>
              </table:table-cell>
              <table:table-cell office:value-type="float" office:value="1536.36">
                <text:p>153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51">
                <text:p>391.51</text:p>
              </table:table-cell>
              <table:table-cell office:value-type="float" office:value="1525.29">
                <text:p>152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54">
                <text:p>121.54</text:p>
              </table:table-cell>
              <table:table-cell office:value-type="float" office:value="1536.06">
                <text:p>153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54">
                <text:p>401.54</text:p>
              </table:table-cell>
              <table:table-cell office:value-type="float" office:value="1525.22">
                <text:p>1525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.59">
                <text:p>141.59</text:p>
              </table:table-cell>
              <table:table-cell office:value-type="float" office:value="1535.76">
                <text:p>153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7">
                <text:p>411.7</text:p>
              </table:table-cell>
              <table:table-cell office:value-type="float" office:value="1525.12">
                <text:p>1525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.85">
                <text:p>161.85</text:p>
              </table:table-cell>
              <table:table-cell office:value-type="float" office:value="1535.5">
                <text:p>15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.1">
                <text:p>432.1</text:p>
              </table:table-cell>
              <table:table-cell office:value-type="float" office:value="1524.91">
                <text:p>1524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.7">
                <text:p>181.7</text:p>
              </table:table-cell>
              <table:table-cell office:value-type="float" office:value="1535.18">
                <text:p>1535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.08">
                <text:p>453.08</text:p>
              </table:table-cell>
              <table:table-cell office:value-type="float" office:value="1524.68">
                <text:p>1524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.68">
                <text:p>201.68</text:p>
              </table:table-cell>
              <table:table-cell office:value-type="float" office:value="1534.88">
                <text:p>153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56">
                <text:p>473.56</text:p>
              </table:table-cell>
              <table:table-cell office:value-type="float" office:value="1524.47">
                <text:p>1524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.81">
                <text:p>221.81</text:p>
              </table:table-cell>
              <table:table-cell office:value-type="float" office:value="1534.56">
                <text:p>153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89">
                <text:p>493.89</text:p>
              </table:table-cell>
              <table:table-cell office:value-type="float" office:value="1524.21">
                <text:p>1524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.89">
                <text:p>241.89</text:p>
              </table:table-cell>
              <table:table-cell office:value-type="float" office:value="1534.15">
                <text:p>153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16">
                <text:p>514.16</text:p>
              </table:table-cell>
              <table:table-cell office:value-type="float" office:value="1523.95">
                <text:p>1523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.8">
                <text:p>261.8</text:p>
              </table:table-cell>
              <table:table-cell office:value-type="float" office:value="1533.95">
                <text:p>153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26">
                <text:p>534.26</text:p>
              </table:table-cell>
              <table:table-cell office:value-type="float" office:value="1523.69">
                <text:p>1523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.85">
                <text:p>281.85</text:p>
              </table:table-cell>
              <table:table-cell office:value-type="float" office:value="1533.6">
                <text:p>153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64">
                <text:p>554.64</text:p>
              </table:table-cell>
              <table:table-cell office:value-type="float" office:value="1523.39">
                <text:p>1523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.8">
                <text:p>301.8</text:p>
              </table:table-cell>
              <table:table-cell office:value-type="float" office:value="1533.24">
                <text:p>153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.87">
                <text:p>574.87</text:p>
              </table:table-cell>
              <table:table-cell office:value-type="float" office:value="1523.13">
                <text:p>1523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1458" chart:maximum="1473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2.52" loext:regression-extrapolate-backward="0" chart:regression-type="linear"/>
      <style:graphic-properties svg:stroke-color="#2a6099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2.52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751cm" svg:y="0.743cm" svg:width="14.349cm" svg:height="7.658cm">
          <chart:coordinate-region svg:x="1.767cm" svg:y="0.743cm" svg:width="13.044cm" svg:height="7.011cm"/>
          <chart:axis chart:dimension="x" chart:name="primary-x" chart:style-name="ch3">
            <chart:title svg:x="7.612cm" svg:y="8.44cm" chart:style-name="ch4">
              <text:p><text:span text:style-name="T1">t [s]</text:span></text:p>
            </chart:title>
          </chart:axis>
          <chart:axis chart:dimension="y" chart:name="primary-y" chart:style-name="ch5">
            <chart:title svg:x="0cm" svg:y="4.982cm" chart:style-name="ch6">
              <text:p><text:span text:style-name="T1">m [g]</text:span></text:p>
            </chart:title>
            <chart:grid chart:style-name="ch7" chart:class="major"/>
          </chart:axis>
          <chart:series chart:style-name="ch8" chart:values-cell-range-address="Sheet1.T174:Sheet1.T183" chart:class="chart:scatter">
            <chart:domain table:cell-range-address="Sheet1.S174:Sheet1.S183"/>
            <chart:regression-curve chart:style-name="ch9"/>
            <chart:data-point chart:repeated="10"/>
          </chart:series>
          <chart:series chart:style-name="ch10" chart:values-cell-range-address="Sheet1.AD184:Sheet1.AD185" chart:class="chart:scatter">
            <chart:domain table:cell-range-address="Sheet1.AC184:Sheet1.AC185"/>
            <chart:data-point chart:repeated="2"/>
          </chart:series>
          <chart:series chart:style-name="ch11" chart:values-cell-range-address="Sheet1.T187:Sheet1.T204" chart:class="chart:scatter">
            <chart:domain table:cell-range-address="Sheet1.S187:Sheet1.S204"/>
            <chart:regression-curve chart:style-name="ch12"/>
            <chart:data-point chart:repeated="18"/>
          </chart:series>
          <chart:series chart:style-name="ch13" chart:values-cell-range-address="Sheet1.T184:Sheet1.T186" chart:class="chart:scatter">
            <chart:domain table:cell-range-address="Sheet1.S184:Sheet1.S186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S174:Sheet1.S183</svg:desc>
                </draw:g>
              </table:table-cell>
              <table:table-cell office:value-type="float" office:value="1471.91">
                <text:p>1471.91</text:p>
                <draw:g>
                  <svg:desc>Sheet1.T174:Sheet1.T183</svg:desc>
                </draw:g>
              </table:table-cell>
              <table:table-cell office:value-type="float" office:value="192.88">
                <text:p>192.88</text:p>
                <draw:g>
                  <svg:desc>Sheet1.AC184:Sheet1.AC185</svg:desc>
                </draw:g>
              </table:table-cell>
              <table:table-cell office:value-type="float" office:value="1470">
                <text:p>1470</text:p>
                <draw:g>
                  <svg:desc>Sheet1.AD184:Sheet1.AD185</svg:desc>
                </draw:g>
              </table:table-cell>
              <table:table-cell office:value-type="float" office:value="205.4">
                <text:p>205.4</text:p>
                <draw:g>
                  <svg:desc>Sheet1.S187:Sheet1.S204</svg:desc>
                </draw:g>
              </table:table-cell>
              <table:table-cell office:value-type="float" office:value="1462.67">
                <text:p>1462.67</text:p>
                <draw:g>
                  <svg:desc>Sheet1.T187:Sheet1.T204</svg:desc>
                </draw:g>
              </table:table-cell>
              <table:table-cell office:value-type="float" office:value="190.03">
                <text:p>190.03</text:p>
                <draw:g>
                  <svg:desc>Sheet1.S184:Sheet1.S186</svg:desc>
                </draw:g>
              </table:table-cell>
              <table:table-cell office:value-type="float" office:value="1466.46">
                <text:p>1466.46</text:p>
                <draw:g>
                  <svg:desc>Sheet1.T184:Sheet1.T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22">
                <text:p>20.22</text:p>
              </table:table-cell>
              <table:table-cell office:value-type="float" office:value="1471.71">
                <text:p>1471.71</text:p>
              </table:table-cell>
              <table:table-cell office:value-type="float" office:value="192.88">
                <text:p>192.88</text:p>
              </table:table-cell>
              <table:table-cell office:value-type="float" office:value="1462">
                <text:p>1462</text:p>
              </table:table-cell>
              <table:table-cell office:value-type="float" office:value="210.52">
                <text:p>210.52</text:p>
              </table:table-cell>
              <table:table-cell office:value-type="float" office:value="1462.4">
                <text:p>1462.4</text:p>
              </table:table-cell>
              <table:table-cell office:value-type="float" office:value="195.17">
                <text:p>195.17</text:p>
              </table:table-cell>
              <table:table-cell office:value-type="float" office:value="1465.09">
                <text:p>1465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31">
                <text:p>40.31</text:p>
              </table:table-cell>
              <table:table-cell office:value-type="float" office:value="1471.47">
                <text:p>147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.31">
                <text:p>215.31</text:p>
              </table:table-cell>
              <table:table-cell office:value-type="float" office:value="1462.28">
                <text:p>1462.28</text:p>
              </table:table-cell>
              <table:table-cell office:value-type="float" office:value="200.06">
                <text:p>200.06</text:p>
              </table:table-cell>
              <table:table-cell office:value-type="float" office:value="1463.77">
                <text:p>1463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5">
                <text:p>60.15</text:p>
              </table:table-cell>
              <table:table-cell office:value-type="float" office:value="1471.21">
                <text:p>147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11">
                <text:p>220.11</text:p>
              </table:table-cell>
              <table:table-cell office:value-type="float" office:value="1462.2">
                <text:p>14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18">
                <text:p>80.18</text:p>
              </table:table-cell>
              <table:table-cell office:value-type="float" office:value="1470.98">
                <text:p>147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24">
                <text:p>225.24</text:p>
              </table:table-cell>
              <table:table-cell office:value-type="float" office:value="1462.17">
                <text:p>146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2">
                <text:p>100.12</text:p>
              </table:table-cell>
              <table:table-cell office:value-type="float" office:value="1470.74">
                <text:p>147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1">
                <text:p>230.1</text:p>
              </table:table-cell>
              <table:table-cell office:value-type="float" office:value="1462.14">
                <text:p>146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29">
                <text:p>120.29</text:p>
              </table:table-cell>
              <table:table-cell office:value-type="float" office:value="1470.48">
                <text:p>147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27">
                <text:p>235.27</text:p>
              </table:table-cell>
              <table:table-cell office:value-type="float" office:value="1462.09">
                <text:p>1462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19">
                <text:p>140.19</text:p>
              </table:table-cell>
              <table:table-cell office:value-type="float" office:value="1470.21">
                <text:p>147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2">
                <text:p>240.2</text:p>
              </table:table-cell>
              <table:table-cell office:value-type="float" office:value="1462.09">
                <text:p>1462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26">
                <text:p>160.26</text:p>
              </table:table-cell>
              <table:table-cell office:value-type="float" office:value="1469.97">
                <text:p>146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34">
                <text:p>245.34</text:p>
              </table:table-cell>
              <table:table-cell office:value-type="float" office:value="1462.07">
                <text:p>1462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36">
                <text:p>180.36</text:p>
              </table:table-cell>
              <table:table-cell office:value-type="float" office:value="1469.53">
                <text:p>146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33">
                <text:p>250.33</text:p>
              </table:table-cell>
              <table:table-cell office:value-type="float" office:value="1462.01">
                <text:p>146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26">
                <text:p>260.26</text:p>
              </table:table-cell>
              <table:table-cell office:value-type="float" office:value="1461.96">
                <text:p>146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33">
                <text:p>270.33</text:p>
              </table:table-cell>
              <table:table-cell office:value-type="float" office:value="1461.9">
                <text:p>14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84">
                <text:p>280.84</text:p>
              </table:table-cell>
              <table:table-cell office:value-type="float" office:value="1461.83">
                <text:p>146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2">
                <text:p>300.2</text:p>
              </table:table-cell>
              <table:table-cell office:value-type="float" office:value="1461.74">
                <text:p>146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42">
                <text:p>310.42</text:p>
              </table:table-cell>
              <table:table-cell office:value-type="float" office:value="1461.66">
                <text:p>146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41">
                <text:p>320.41</text:p>
              </table:table-cell>
              <table:table-cell office:value-type="float" office:value="1461.6">
                <text:p>146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33">
                <text:p>330.33</text:p>
              </table:table-cell>
              <table:table-cell office:value-type="float" office:value="1461.48">
                <text:p>146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19">
                <text:p>340.19</text:p>
              </table:table-cell>
              <table:table-cell office:value-type="float" office:value="1461.39">
                <text:p>146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